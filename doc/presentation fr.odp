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Pictures/1000000000000B8B0000067F5F2A6CFA.jpg" manifest:media-type="image/jpeg"/>
  <manifest:file-entry manifest:full-path="Pictures/1000000100000377000002A7E5AFB874.png" manifest:media-type="image/png"/>
  <manifest:file-entry manifest:full-path="Pictures/10000001000002770000035CA248B69F.png" manifest:media-type="image/png"/>
  <manifest:file-entry manifest:full-path="Pictures/100000010000014A0000014A81EC3A6B.png" manifest:media-type="image/png"/>
  <manifest:file-entry manifest:full-path="Pictures/10000000000002D50000067FA0EA658A.jpg" manifest:media-type="image/jpeg"/>
  <manifest:file-entry manifest:full-path="Pictures/10000000000001980000067F56384566.jpg" manifest:media-type="image/jpeg"/>
  <manifest:file-entry manifest:full-path="Pictures/10000000000006D7000003A64625AE57.jpg" manifest:media-type="image/jpeg"/>
  <manifest:file-entry manifest:full-path="Pictures/1000000000000491000003595F7E172A.jpg" manifest:media-type="image/jpeg"/>
  <manifest:file-entry manifest:full-path="Pictures/1000000100000377000002A7A2E423AD.png" manifest:media-type="image/png"/>
  <manifest:file-entry manifest:full-path="Pictures/10000001000000FA000000AF57DCD893.png" manifest:media-type="image/png"/>
  <manifest:file-entry manifest:full-path="Pictures/100000010000021F000002524F80360B.png" manifest:media-type="image/png"/>
  <manifest:file-entry manifest:full-path="Pictures/1000000100000168000000B590CCEC5C.png" manifest:media-type="image/png"/>
  <manifest:file-entry manifest:full-path="Pictures/1000000000000318000001F1E98C8439.png" manifest:media-type="image/png"/>
  <manifest:file-entry manifest:full-path="Pictures/100000010000020C000002A76EA3A5F8.png" manifest:media-type="image/png"/>
  <manifest:file-entry manifest:full-path="Pictures/1000000100000168000000B55965C526.png" manifest:media-type="image/png"/>
  <manifest:file-entry manifest:full-path="Pictures/1000000000000318000001F1BD7F920C.png" manifest:media-type="image/png"/>
  <manifest:file-entry manifest:full-path="Pictures/1000000100000242000001C9EE2A158D.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Filled">
      <style:graphic-properties draw:fill="solid" draw:fill-color="#ffffff" loext:decorative="false"/>
    </style:style>
    <style:style style:name="gr4" style:family="graphic" style:parent-style-name="Filled_20_Blue">
      <style:graphic-properties draw:fill="solid" draw:fill-color="#0d84a1"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auto-grow-height="false" fo:min-height="0.074cm" fo:min-width="0.269cm" fo:wrap-option="wrap" loext:decorative="false"/>
    </style:style>
    <style:style style:name="gr7" style:family="graphic" style:parent-style-name="standard">
      <style:graphic-properties draw:textarea-horizontal-align="justify" draw:textarea-vertical-align="middle" draw:auto-grow-height="false" fo:min-height="0.555cm" fo:min-width="0.305cm"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gr10" style:family="graphic" style:parent-style-name="Object_20_with_20_no_20_fill_20_and_20_no_20_line">
      <style:graphic-properties svg:stroke-color="#808080" draw:textarea-horizontal-align="center" draw:textarea-vertical-align="middle" draw:ole-draw-aspect="1" style:protect="size" loext:decorative="false"/>
    </style:style>
    <style:style style:name="gr11" style:family="graphic" style:parent-style-name="Object_20_with_20_no_20_fill_20_and_20_no_20_line">
      <style:graphic-properties draw:textarea-horizontal-align="center" draw:textarea-vertical-align="middle" draw:ole-draw-aspect="1" style:protect="size" loext:decorative="false"/>
    </style:style>
    <style:style style:name="gr12" style:family="graphic" style:parent-style-name="standard">
      <style:graphic-properties draw:fill="solid" draw:fill-color="#ffffff" draw:textarea-horizontal-align="justify" draw:textarea-vertical-align="middle" draw:auto-grow-height="false" fo:min-height="0.749cm" fo:min-width="4.5cm" style:writing-mode="lr-tb" loext:decorative="false"/>
      <style:paragraph-properties style:writing-mode="lr-tb"/>
    </style:style>
    <style:style style:name="gr13" style:family="graphic" style:parent-style-name="standard">
      <style:graphic-properties draw:textarea-horizontal-align="justify" draw:textarea-vertical-align="middle" draw:auto-grow-height="false" fo:min-height="0.281cm" fo:min-width="0.051cm" fo:wrap-option="wrap" loext:decorative="false"/>
    </style:style>
    <style:style style:name="gr14" style:family="graphic" style:parent-style-name="objectwithoutfill">
      <style:graphic-properties draw:stroke="solid" svg:stroke-color="#3465a4" draw:marker-end="Arrow_20_short" draw:marker-end-width="0.2cm" draw:fill="none" draw:textarea-vertical-align="middle" loext:decorative="false"/>
    </style:style>
    <style:style style:name="gr15" style:family="graphic" style:parent-style-name="objectwithoutfill">
      <style:graphic-properties draw:stroke="solid" svg:stroke-color="#3465a4" draw:marker-start="Arrow_20_short" draw:marker-end="Arrow_20_short" draw:marker-end-width="0.2cm" draw:fill="none" draw:textarea-vertical-align="middle" loext:decorative="false"/>
    </style:style>
    <style:style style:name="gr16" style:family="graphic" style:parent-style-name="standard">
      <style:graphic-properties draw:textarea-horizontal-align="justify" draw:textarea-vertical-align="middle" draw:auto-grow-height="false" fo:min-height="0.282cm" fo:min-width="0.05cm" fo:wrap-option="wrap" loext:decorative="false"/>
    </style:style>
    <style:style style:name="gr17" style:family="graphic" style:parent-style-name="standard">
      <style:graphic-properties draw:textarea-horizontal-align="justify" draw:textarea-vertical-align="middle" draw:auto-grow-height="false" fo:min-height="0.281cm" fo:min-width="0.05cm" fo:wrap-option="wrap" loext:decorative="false"/>
    </style:style>
    <style:style style:name="gr18" style:family="graphic" style:parent-style-name="standard">
      <style:graphic-properties draw:textarea-horizontal-align="justify" draw:textarea-vertical-align="middle" draw:auto-grow-height="false" fo:min-height="0.282cm" fo:min-width="0.051cm" fo:wrap-option="wrap" loext:decorative="false"/>
    </style:style>
    <style:style style:name="gr19" style:family="graphic" style:parent-style-name="standard">
      <style:graphic-properties svg:stroke-color="#3465a4" draw:fill-color="#dee6ef" draw:textarea-horizontal-align="justify" draw:textarea-vertical-align="middle" draw:auto-grow-height="false" fo:min-height="1cm" fo:min-width="4cm" style:writing-mode="lr-tb" loext:decorative="false"/>
      <style:paragraph-properties style:writing-mode="lr-tb"/>
    </style:style>
    <style:style style:name="gr20" style:family="graphic" style:parent-style-name="objectwithoutfill">
      <style:graphic-properties svg:stroke-color="#3465a4" draw:fill="none" draw:textarea-vertical-align="middle" loext:decorative="false"/>
    </style:style>
    <style:style style:name="gr21" style:family="graphic" style:parent-style-name="objectwithoutfill">
      <style:graphic-properties draw:stroke="dash" draw:stroke-dash="Long_20_Dash" svg:stroke-color="#3465a4" draw:fill="none" draw:textarea-vertical-align="middle" loext:decorative="false"/>
    </style:style>
    <style:style style:name="gr22" style:family="graphic" style:parent-style-name="standard">
      <style:graphic-properties draw:fill="solid" draw:fill-color="#ffffff" draw:textarea-horizontal-align="justify" draw:textarea-vertical-align="middle" draw:auto-grow-height="false" fo:min-height="0.749cm" fo:min-width="0.499cm" style:writing-mode="lr-tb" loext:decorative="false"/>
      <style:paragraph-properties style:writing-mode="lr-tb"/>
    </style:style>
    <style:style style:name="gr23" style:family="graphic" style:parent-style-name="standard">
      <style:graphic-properties draw:fill="solid" draw:fill-color="#ffffff" draw:textarea-horizontal-align="justify" draw:textarea-vertical-align="middle" draw:auto-grow-height="false" fo:min-height="0.749cm" fo:min-width="1.5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0.812cm" fo:min-width="0.562cm" fo:wrap-option="wrap" loext:decorative="false"/>
    </style:style>
    <style:style style:name="gr25" style:family="graphic" style:parent-style-name="objectwithoutfill">
      <style:graphic-properties draw:stroke="solid" svg:stroke-width="0.2cm" svg:stroke-color="#5983b0" draw:marker-start="Arrow_20_short" draw:marker-start-width="0.5cm" draw:marker-end="Arrow_20_short" draw:marker-end-width="0.5cm" draw:fill="none" draw:textarea-vertical-align="middle" fo:padding-top="0.225cm" fo:padding-bottom="0.225cm" fo:padding-left="0.35cm" fo:padding-right="0.35cm" loext:decorative="false"/>
    </style:style>
    <style:style style:name="gr26" style:family="graphic" style:parent-style-name="standard">
      <style:graphic-properties draw:textarea-vertical-align="middle" draw:auto-grow-height="false" fo:min-height="0.75cm" fo:min-width="0.5cm" fo:wrap-option="wrap" loext:decorative="false"/>
    </style:style>
    <style:style style:name="gr27" style:family="graphic" style:parent-style-name="standard">
      <style:graphic-properties draw:textarea-horizontal-align="justify" draw:textarea-vertical-align="middle" draw:auto-grow-height="false" fo:min-height="0.625cm" fo:min-width="0cm" loext:decorative="false"/>
    </style:style>
    <style:style style:name="gr28" style:family="graphic" style:parent-style-name="objectwithoutfill">
      <style:graphic-properties draw:stroke="solid" svg:stroke-color="#3465a4" draw:marker-start="" draw:marker-end="Arrow_20_short" draw:marker-end-width="0.2cm" draw:fill="none" draw:textarea-vertical-align="middle" loext:decorative="false"/>
    </style:style>
    <style:style style:name="gr29" style:family="graphic" style:parent-style-name="objectwithoutfill">
      <style:graphic-properties svg:stroke-color="#3465a4" draw:fill="none" draw:fill-color="#dee6ef" draw:textarea-vertical-align="middle" loext:decorative="false"/>
    </style:style>
    <style:style style:name="gr30" style:family="graphic" style:parent-style-name="standard">
      <style:graphic-properties svg:stroke-color="#3465a4" draw:fill-color="#800080" draw:textarea-vertical-align="middle" draw:auto-grow-height="false" fo:min-height="0.751cm" fo:min-width="0.501cm" fo:wrap-option="wrap" loext:decorative="false"/>
    </style:style>
    <style:style style:name="gr31" style:family="graphic" style:parent-style-name="objectwithoutfill">
      <style:graphic-properties draw:stroke="solid" svg:stroke-color="#3465a4" draw:marker-start="Arrow_20_short" draw:marker-end="" draw:marker-end-width="0.2cm" draw:fill="none" draw:textarea-vertical-align="middle" loext:decorative="false"/>
    </style:style>
    <style:style style:name="gr32" style:family="graphic" style:parent-style-name="standard">
      <style:graphic-properties svg:stroke-color="#3465a4" draw:fill-color="#800080" draw:textarea-vertical-align="middle" draw:auto-grow-height="false" fo:min-height="1.741cm" fo:min-width="5.028cm" fo:wrap-option="wrap" loext:decorative="false"/>
    </style:style>
    <style:style style:name="gr33" style:family="graphic" style:parent-style-name="objectwithoutfill">
      <style:graphic-properties draw:stroke="solid" svg:stroke-color="#3465a4" draw:fill="none" draw:fill-color="#dee6ef" draw:textarea-vertical-align="middle" loext:decorative="false"/>
    </style:style>
    <style:style style:name="gr34" style:family="graphic" style:parent-style-name="standard">
      <style:graphic-properties draw:fill-color="#b2b2b2" draw:textarea-horizontal-align="justify" draw:textarea-vertical-align="middle" draw:auto-grow-height="false" fo:min-height="0.625cm" fo:min-width="0cm" loext:decorative="false"/>
    </style:style>
    <style:style style:name="gr35" style:family="graphic" style:parent-style-name="standard">
      <style:graphic-properties draw:textarea-horizontal-align="justify" draw:textarea-vertical-align="middle" draw:auto-grow-height="false" fo:min-height="1.75cm" fo:min-width="3.5cm" style:writing-mode="lr-tb" loext:decorative="false"/>
      <style:paragraph-properties style:writing-mode="lr-tb"/>
    </style:style>
    <style:style style:name="gr36" style:family="graphic" style:parent-style-name="standard">
      <style:graphic-properties draw:textarea-horizontal-align="justify" draw:textarea-vertical-align="middle" draw:auto-grow-height="false" fo:min-height="1.75cm" fo:min-width="7.5cm" style:writing-mode="lr-tb" loext:decorative="false"/>
      <style:paragraph-properties style:writing-mode="lr-tb"/>
    </style:style>
    <style:style style:name="gr37" style:family="graphic" style:parent-style-name="standard">
      <style:graphic-properties draw:fill-color="#ffff6d" draw:textarea-horizontal-align="justify" draw:textarea-vertical-align="middle" draw:auto-grow-height="false" fo:min-height="1.75cm" fo:min-width="7.5cm" style:writing-mode="lr-tb" loext:decorative="false"/>
      <style:paragraph-properties style:writing-mode="lr-tb"/>
    </style:style>
    <style:style style:name="gr38" style:family="graphic" style:parent-style-name="standard">
      <style:graphic-properties draw:fill-color="#a1467e" draw:textarea-horizontal-align="justify" draw:textarea-vertical-align="middle" draw:auto-grow-height="false" fo:min-height="1.75cm" fo:min-width="10.5cm" style:writing-mode="lr-tb" loext:decorative="false"/>
      <style:paragraph-properties style:writing-mode="lr-tb"/>
    </style:style>
    <style:style style:name="gr39" style:family="graphic" style:parent-style-name="standard">
      <style:graphic-properties draw:fill-color="#bbe33d" draw:textarea-horizontal-align="justify" draw:textarea-vertical-align="middle" draw:auto-grow-height="false" fo:min-height="1.75cm" fo:min-width="10.5cm" style:writing-mode="lr-tb" loext:decorative="false"/>
      <style:paragraph-properties style:writing-mode="lr-tb"/>
    </style:style>
    <style:style style:name="gr40" style:family="graphic" style:parent-style-name="standard">
      <style:graphic-properties draw:fill-color="#729fcf" draw:textarea-horizontal-align="justify" draw:textarea-vertical-align="middle" draw:auto-grow-height="false" fo:min-height="1.75cm" fo:min-width="10.5cm" style:writing-mode="lr-tb" loext:decorative="false"/>
      <style:paragraph-properties style:writing-mode="lr-tb"/>
    </style:style>
    <style:style style:name="gr41" style:family="graphic" style:parent-style-name="standard">
      <style:graphic-properties draw:fill-color="#ff5429" draw:textarea-horizontal-align="justify" draw:textarea-vertical-align="middle" draw:auto-grow-height="false" fo:min-height="1.75cm" fo:min-width="10.5cm" style:writing-mode="lr-tb" loext:decorative="false"/>
      <style:paragraph-properties style:writing-mode="lr-tb"/>
    </style:style>
    <style:style style:name="gr42" style:family="graphic" style:parent-style-name="standard">
      <style:graphic-properties draw:fill-color="#127622" draw:textarea-horizontal-align="justify" draw:textarea-vertical-align="middle" draw:auto-grow-height="false" fo:min-height="1.75cm" fo:min-width="10.5cm" style:writing-mode="lr-tb" loext:decorative="false"/>
      <style:paragraph-properties style:writing-mode="lr-tb"/>
    </style:style>
    <style:style style:name="gr43"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style:writing-mode="lr-tb" loext:decorative="false"/>
      <style:paragraph-properties style:writing-mode="lr-tb"/>
    </style:style>
    <style:style style:name="gr44"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45"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fo:min-height="14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subtitle">
      <style:graphic-properties draw:fill-color="#ffffff" fo:min-height="3.5cm" loext:decorative="false"/>
      <style:paragraph-properties style:writing-mode="lr-tb"/>
    </style:style>
    <style:style style:name="pr6" style:family="presentation" style:parent-style-name="One_20_Bullet-subtitle">
      <style:graphic-properties draw:fill-color="#ffffff" fo:min-height="6.149cm" loext:decorative="false"/>
      <style:paragraph-properties style:writing-mode="lr-tb"/>
    </style:style>
    <style:style style:name="pr7" style:family="presentation" style:parent-style-name="One_20_Bullet-notes">
      <style:graphic-properties draw:fill-color="#ffffff" fo:min-height="14cm" loext:decorative="false"/>
      <style:paragraph-properties style:writing-mode="lr-tb"/>
    </style:style>
    <style:style style:name="pr8" style:family="presentation" style:parent-style-name="Two_20_Bullets-title">
      <style:graphic-properties fo:min-height="0cm" loext:decorative="false"/>
      <style:paragraph-properties style:writing-mode="lr-tb"/>
    </style:style>
    <style:style style:name="pr9" style:family="presentation" style:parent-style-name="Two_20_Bullets-outline1">
      <style:graphic-properties fo:min-height="0cm" loext:decorative="false"/>
      <style:paragraph-properties style:writing-mode="lr-tb"/>
    </style:style>
    <style:style style:name="pr10" style:family="presentation" style:parent-style-name="Two_20_Bullets-notes">
      <style:graphic-properties draw:fill-color="#ffffff" fo:min-height="14cm" loext:decorative="false"/>
      <style:paragraph-properties style:writing-mode="lr-tb"/>
    </style:style>
    <style:style style:name="pr11" style:family="presentation" style:parent-style-name="White_2f_Blue_20_Chart-title">
      <style:graphic-properties fo:min-height="1.75cm" loext:decorative="false"/>
      <style:paragraph-properties style:writing-mode="lr-tb"/>
    </style:style>
    <style:style style:name="pr12" style:family="presentation" style:parent-style-name="White_2f_Blue_20_Chart-outline1">
      <style:graphic-properties fo:min-height="10.25cm" loext:decorative="false"/>
      <style:paragraph-properties style:writing-mode="lr-tb"/>
    </style:style>
    <style:style style:name="pr13" style:family="presentation" style:parent-style-name="White_2f_Blue_20_Chart-notes">
      <style:graphic-properties draw:fill-color="#ffffff" fo:min-height="14cm" loext:decorative="false"/>
      <style:paragraph-properties style:writing-mode="lr-tb"/>
    </style:style>
    <style:style style:name="pr14" style:family="presentation" style:parent-style-name="Three_20_Bullets-outline1">
      <style:graphic-properties fo:min-height="0cm" loext:decorative="false"/>
      <style:paragraph-properties style:writing-mode="lr-tb"/>
    </style:style>
    <style:style style:name="pr15" style:family="presentation" style:parent-style-name="Three_20_Bullets-title">
      <style:graphic-properties fo:min-height="0cm" loext:decorative="false"/>
      <style:paragraph-properties style:writing-mode="lr-tb"/>
    </style:style>
    <style:style style:name="pr16" style:family="presentation" style:parent-style-name="Three_20_Bullets-notes">
      <style:graphic-properties draw:fill-color="#ffffff" fo:min-height="14cm" loext:decorative="false"/>
      <style:paragraph-properties style:writing-mode="lr-tb"/>
    </style:style>
    <style:style style:name="pr17" style:family="presentation" style:parent-style-name="White_2f_Blue_20_Chart-title">
      <style:graphic-properties fo:min-height="0cm" loext:decorative="false"/>
      <style:paragraph-properties style:writing-mode="lr-tb"/>
    </style:style>
    <style:style style:name="pr18" style:family="presentation" style:parent-style-name="White_2f_Blue_20_Chart-outline1">
      <style:graphic-properties fo:min-height="0cm" loext:decorative="false"/>
      <style:paragraph-properties style:writing-mode="lr-tb"/>
    </style:style>
    <style:style style:name="pr19" style:family="presentation" style:parent-style-name="Four_20_Bullets-outline1">
      <style:graphic-properties fo:min-height="0cm" loext:decorative="false"/>
      <style:paragraph-properties style:writing-mode="lr-tb"/>
    </style:style>
    <style:style style:name="pr20" style:family="presentation" style:parent-style-name="Four_20_Bullets-title">
      <style:graphic-properties fo:min-height="0cm" loext:decorative="false"/>
      <style:paragraph-properties style:writing-mode="lr-tb"/>
    </style:style>
    <style:style style:name="pr21" style:family="presentation" style:parent-style-name="Four_20_Bullets-notes">
      <style:graphic-properties draw:fill-color="#ffffff" fo:min-height="14cm" loext:decorative="false"/>
      <style:paragraph-properties style:writing-mode="lr-tb"/>
    </style:style>
    <style:style style:name="pr22" style:family="presentation" style:parent-style-name="Blue_2f_White_20_Chart-title">
      <style:graphic-properties fo:min-height="0cm" loext:decorative="false"/>
      <style:paragraph-properties style:writing-mode="lr-tb"/>
    </style:style>
    <style:style style:name="pr23" style:family="presentation" style:parent-style-name="Blue_2f_White_20_Chart-outline1">
      <style:graphic-properties fo:min-height="0cm" loext:decorative="false"/>
      <style:paragraph-properties style:writing-mode="lr-tb"/>
    </style:style>
    <style:style style:name="pr24" style:family="presentation" style:parent-style-name="Blue_2f_White_20_Chart-notes">
      <style:graphic-properties draw:fill-color="#ffffff" fo:min-height="14cm" loext:decorative="false"/>
      <style:paragraph-properties style:writing-mode="lr-tb"/>
    </style:style>
    <style:style style:name="pr25" style:family="presentation" style:parent-style-name="Left_20_Bar-title">
      <style:graphic-properties fo:min-height="0cm" loext:decorative="false"/>
      <style:paragraph-properties style:writing-mode="lr-tb"/>
    </style:style>
    <style:style style:name="pr26" style:family="presentation" style:parent-style-name="Left_20_Bar-outline1">
      <style:graphic-properties fo:min-height="0cm" loext:decorative="false"/>
      <style:paragraph-properties style:writing-mode="lr-tb"/>
    </style:style>
    <style:style style:name="pr27" style:family="presentation" style:parent-style-name="Left_20_Bar-notes">
      <style:graphic-properties draw:fill-color="#ffffff" fo:min-height="14cm" loext:decorative="false"/>
      <style:paragraph-properties style:writing-mode="lr-tb"/>
    </style:style>
    <style:style style:name="pr28" style:family="presentation" style:parent-style-name="Right_20_Bar-title">
      <style:graphic-properties fo:min-height="0cm" loext:decorative="false"/>
      <style:paragraph-properties style:writing-mode="lr-tb"/>
    </style:style>
    <style:style style:name="pr29" style:family="presentation" style:parent-style-name="Right_20_Bar-outline1">
      <style:graphic-properties fo:min-height="0cm" loext:decorative="false"/>
      <style:paragraph-properties style:writing-mode="lr-tb"/>
    </style:style>
    <style:style style:name="pr30" style:family="presentation" style:parent-style-name="Right_20_Bar-notes">
      <style:graphic-properties draw:fill-color="#ffffff" fo:min-height="14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solid" draw:fill-color="#0d84a1"/>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ffffff"/>
      <style:text-properties fo:font-size="20pt"/>
    </style:style>
    <style:style style:name="P8" style:family="paragraph">
      <style:paragraph-properties fo:text-align="center"/>
      <style:text-properties fo:color="#b2b2b2" loext:opacity="100%"/>
    </style:style>
    <style:style style:name="P9" style:family="paragraph">
      <loext:graphic-properties draw:fill="solid" draw:fill-color="#ffffff"/>
      <style:paragraph-properties fo:text-align="center" style:writing-mode="lr-tb"/>
      <style:text-properties fo:color="#b2b2b2" loext:opacity="100%"/>
    </style:style>
    <style:style style:name="P10" style:family="paragraph">
      <loext:graphic-properties draw:fill-color="#dee6ef"/>
      <style:paragraph-properties fo:text-align="center" style:writing-mode="lr-tb"/>
    </style:style>
    <style:style style:name="P11" style:family="paragraph">
      <loext:graphic-properties draw:fill="solid" draw:fill-color="#ffffff"/>
      <style:paragraph-properties fo:text-align="center" style:writing-mode="lr-tb"/>
    </style:style>
    <style:style style:name="P12" style:family="paragraph">
      <style:text-properties fo:font-size="24pt" style:font-size-asian="24pt" style:font-size-complex="24pt"/>
    </style:style>
    <style:style style:name="P13" style:family="paragraph">
      <style:text-properties fo:font-size="24pt"/>
    </style:style>
    <style:style style:name="P14" style:family="paragraph">
      <loext:graphic-properties draw:fill="none" draw:fill-color="#dee6ef"/>
      <style:paragraph-properties fo:text-align="center"/>
    </style:style>
    <style:style style:name="P15" style:family="paragraph">
      <loext:graphic-properties draw:fill-color="#800080"/>
      <style:paragraph-properties fo:text-align="center"/>
    </style:style>
    <style:style style:name="P16" style:family="paragraph">
      <style:text-properties fo:font-size="18pt" style:font-size-asian="18pt" style:font-size-complex="18pt"/>
    </style:style>
    <style:style style:name="P17" style:family="paragraph">
      <loext:graphic-properties draw:fill-color="#b2b2b2"/>
      <style:paragraph-properties fo:text-align="center"/>
    </style:style>
    <style:style style:name="P18" style:family="paragraph">
      <style:text-properties fo:font-size="20pt" style:font-size-asian="20pt" style:font-size-complex="20pt"/>
    </style:style>
    <style:style style:name="P19" style:family="paragraph">
      <style:paragraph-properties fo:text-align="center" style:writing-mode="lr-tb"/>
    </style:style>
    <style:style style:name="P20" style:family="paragraph">
      <loext:graphic-properties draw:fill-color="#ffff6d"/>
      <style:paragraph-properties fo:text-align="center" style:writing-mode="lr-tb"/>
    </style:style>
    <style:style style:name="P21" style:family="paragraph">
      <loext:graphic-properties draw:fill-color="#a1467e"/>
      <style:paragraph-properties fo:text-align="center" style:writing-mode="lr-tb"/>
    </style:style>
    <style:style style:name="P22" style:family="paragraph">
      <loext:graphic-properties draw:fill-color="#bbe33d"/>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ff5429"/>
      <style:paragraph-properties fo:text-align="center" style:writing-mode="lr-tb"/>
    </style:style>
    <style:style style:name="P25" style:family="paragraph">
      <loext:graphic-properties draw:fill-color="#127622"/>
      <style:paragraph-properties fo:text-align="center" style:writing-mode="lr-tb"/>
    </style:style>
    <style:style style:name="P26" style:family="paragraph">
      <style:text-properties fo:color="#0d84a1" loext:opacity="100%" fo:font-size="24pt" style:font-size-asian="24pt" style:font-size-complex="24pt"/>
    </style:style>
    <style:style style:name="P27" style:family="paragraph">
      <loext:graphic-properties draw:fill="none" draw:opacity="100%"/>
      <style:paragraph-properties style:writing-mode="lr-tb"/>
      <style:text-properties fo:color="#0d84a1" loext:opacity="100%" fo:font-size="24pt" style:font-size-asian="24pt" style:font-size-complex="24pt"/>
    </style:style>
    <style:style style:name="P28" style:family="paragraph">
      <style:text-properties fo:color="#0d84a1" loext:opacity="100%"/>
    </style:style>
    <style:style style:name="P29" style:family="paragraph">
      <style:paragraph-properties fo:margin-top="0.42cm" fo:margin-bottom="0.35cm"/>
    </style:style>
    <style:style style:name="P30" style:family="paragraph">
      <loext:graphic-properties draw:fill="solid" draw:fill-color="#ffffff" draw:opacity="50%"/>
    </style:style>
    <style:style style:name="T1" style:family="text">
      <style:text-properties fo:font-size="12pt" style:font-size-asian="12pt" style:font-size-complex="12pt"/>
    </style:style>
    <style:style style:name="T2" style:family="text">
      <style:text-properties fo:color="#ffff00" loext:opacity="100%"/>
    </style:style>
    <style:style style:name="T3" style:family="text">
      <style:text-properties fo:color="#b2b2b2" loext:opacity="100%"/>
    </style:style>
    <style:style style:name="T4" style:family="text">
      <style:text-properties fo:font-size="24pt" style:text-underline-style="solid" style:text-underline-width="auto" style:text-underline-color="font-color" style:font-size-asian="24pt" style:font-size-complex="24pt"/>
    </style:style>
    <style:style style:name="T5" style:family="text">
      <style:text-properties fo:font-size="24pt" style:font-size-asian="24pt" style:font-size-complex="24pt"/>
    </style:style>
    <style:style style:name="T6" style:family="text">
      <style:text-properties fo:font-size="24pt"/>
    </style:style>
    <style:style style:name="T7" style:family="text">
      <style:text-properties fo:font-size="18pt" style:font-size-asian="18pt" style:font-size-complex="18pt"/>
    </style:style>
    <style:style style:name="T8" style:family="text">
      <style:text-properties fo:font-size="20pt" style:font-size-asian="20pt" style:font-size-complex="20pt"/>
    </style:style>
    <style:style style:name="T9" style:family="text">
      <style:text-properties fo:color="#0d84a1" loext:opacity="100%" fo:font-size="24pt" fo:font-weight="bold" style:font-size-asian="24pt" style:font-weight-asian="bold" style:font-size-complex="24pt" style:font-weight-complex="bold"/>
    </style:style>
    <style:style style:name="T10"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reshes" presentation:presentation-page-layout-name="AL1T0" xml:id="id84" draw:id="id84">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presentation:user-transformed="true">
          <draw:text-box>
            <text:p>PIFOCAST</text:p>
          </draw:text-box>
        </draw:frame>
        <draw:frame presentation:style-name="pr2" draw:layer="layout" svg:width="19cm" svg:height="5cm" svg:x="2cm" svg:y="9.2cm" presentation:class="subtitle" presentation:user-transformed="true">
          <draw:text-box>
            <text:p>Un modèle simple de prévision météo<text:line-break/></text:p>
            <text:p><text:span text:style-name="T1">Nicolas Gasnier 2025</text:span></text:p>
          </draw:text-box>
        </draw:frame>
        <anim:par presentation:node-type="timing-root">
          <anim:par smil:begin="id8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85" draw:id="id85">
        <office:forms form:automatic-focus="false" form:apply-design-mode="false"/>
        <draw:path draw:style-name="gr3"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layer="layout" svg:width="25cm" svg:height="2cm" svg:x="1.5cm" svg:y="6.5cm" presentation:class="title" presentation:user-transformed="true">
          <draw:text-box>
            <text:p>Introduction</text:p>
          </draw:text-box>
        </draw:frame>
        <draw:frame presentation:style-name="pr5" draw:text-style-name="P2" draw:layer="layout" svg:width="17cm" svg:height="3.5cm" svg:x="9.5cm" svg:y="9cm" presentation:class="subtitle" presentation:user-transformed="true">
          <draw:text-box>
            <text:p>La suite de PIFO, un modèle Javascript simple</text:p>
          </draw:text-box>
        </draw:frame>
        <draw:frame presentation:style-name="pr6" draw:text-style-name="P2" draw:layer="layout" svg:width="8.5cm" svg:height="6.149cm" svg:x="1.5cm" svg:y="8.926cm">
          <draw:text-box>
            <text:p text:style-name="P3"><text:span text:style-name="T2">P</text:span>rojet<text:span text:style-name="T2"><text:line-break/></text:span><text:span text:style-name="T2">I</text:span>nformatique à<text:line-break/><text:span text:style-name="T2">F</text:span>ormules<text:line-break/><text:span text:style-name="T2">O</text:span>uvertes</text:p>
          </draw:text-box>
        </draw:frame>
        <anim:par presentation:node-type="timing-root">
          <anim:par smil:begin="id8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7" draw:text-style-name="P2"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86" draw:id="id86">
        <office:forms form:automatic-focus="false" form:apply-design-mode="false"/>
        <draw:frame presentation:style-name="pr8" draw:layer="backgroundobjects" svg:width="15cm" svg:height="2.629cm" svg:x="12cm" svg:y="2cm" presentation:class="title" presentation:user-transformed="true">
          <draw:text-box>
            <text:p>Fonctions clés de PIFO</text:p>
          </draw:text-box>
        </draw:frame>
        <draw:frame presentation:style-name="pr9" draw:layer="layout" svg:width="11.25cm" svg:height="3.5cm" svg:x="15.7cm" svg:y="5cm" presentation:class="outline" presentation:user-transformed="true">
          <draw:text-box>
            <text:list text:style-name="L4">
              <text:list-item>
                <text:p>Coeurs barotropique and barocliniques</text:p>
              </text:list-item>
            </text:list>
          </draw:text-box>
        </draw:frame>
        <draw:path draw:style-name="gr4" draw:text-style-name="P4" draw:layer="layout" svg:width="1.226cm" svg:height="0.963cm" svg:x="13.773cm" svg:y="12.036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9" draw:layer="layout" svg:width="11.25cm" svg:height="3.5cm" svg:x="15.75cm" svg:y="8.5cm" presentation:class="outline" presentation:user-transformed="true">
          <draw:text-box>
            <text:list text:style-name="L4">
              <text:list-item>
                <text:p>Initialisation depuis les analyses GFS</text:p>
              </text:list-item>
            </text:list>
          </draw:text-box>
        </draw:frame>
        <draw:frame draw:style-name="gr5" draw:text-style-name="P5" draw:layer="layout" svg:width="11cm" svg:height="6.903cm" svg:x="0.5cm" svg:y="1.5cm">
          <draw:image xlink:href="Pictures/1000000000000318000001F1E98C8439.png" xlink:type="simple" xlink:show="embed" xlink:actuate="onLoad" draw:mime-type="image/png">
            <text:p/>
          </draw:image>
        </draw:frame>
        <draw:frame draw:style-name="gr5" draw:text-style-name="P5" draw:layer="layout" svg:width="11cm" svg:height="6.903cm" svg:x="0.5cm" svg:y="8.597cm">
          <draw:image xlink:href="Pictures/1000000000000318000001F1BD7F920C.png" xlink:type="simple" xlink:show="embed" xlink:actuate="onLoad" draw:mime-type="image/png">
            <text:p/>
          </draw:image>
        </draw:frame>
        <draw:custom-shape draw:style-name="gr6" draw:layer="layout" svg:width="0.999cm" svg:height="0.999cm" svg:x="14.001cm" svg:y="6.00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 draw:text-style-name="P6" draw:layer="layout" svg:width="0.999cm" svg:height="0.999cm" svg:x="14cm" svg:y="9.001cm">
          <text:p/>
          <draw:enhanced-geometry svg:viewBox="0 0 21600 21600" draw:text-areas="4230 4230 21600 21600" draw:type="flowchart-internal-storage" draw:enhanced-path="M 0 0 L 21600 0 21600 21600 0 21600 Z N M 4230 0 L 4230 21600 N M 0 4230 L 21600 4230 N"/>
        </draw:custom-shape>
        <draw:frame presentation:style-name="pr9" draw:layer="layout" svg:width="11.25cm" svg:height="3.5cm" svg:x="15.75cm" svg:y="11.5cm" presentation:class="outline" presentation:user-transformed="true">
          <draw:text-box>
            <text:list text:style-name="L4">
              <text:list-item>
                <text:p>Aire limitée, résolution ~1°</text:p>
              </text:list-item>
            </text:list>
          </draw:text-box>
        </draw:frame>
        <anim:par presentation:node-type="timing-root">
          <anim:par smil:begin="id8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10" draw:text-style-name="P2" draw:layer="layout" svg:width="17cm" svg:height="14cm" svg:x="2cm" svg:y="13cm" presentation:class="notes" presentation:placeholder="true">
            <draw:text-box/>
          </draw:frame>
        </presentation:notes>
      </draw:page>
      <draw:page draw:name="page4" draw:style-name="dp1" draw:master-page-name="White_2f_Blue_20_Chart" presentation:presentation-page-layout-name="AL3T1" xml:id="id87" draw:id="id87">
        <office:forms form:automatic-focus="false" form:apply-design-mode="false"/>
        <draw:frame presentation:style-name="pr11" draw:layer="layout" svg:width="9.8cm" svg:height="2cm" svg:x="0cm" svg:y="0.8cm" presentation:class="title" presentation:user-transformed="true">
          <draw:text-box>
            <text:p>Modèle classique</text:p>
          </draw:text-box>
        </draw:frame>
        <draw:frame presentation:style-name="pr12" draw:layer="layout" svg:width="25.2cm" svg:height="10.5cm" svg:x="1.4cm" svg:y="3.5cm" presentation:class="outline" presentation:user-transformed="true">
          <draw:text-box>
            <text:list text:style-name="L4">
              <text:list-item>
                <text:p>Itération :</text:p>
                <text:list>
                  <text:list-item>
                    <text:p>Calcul de dérivées <text:line-break/>(eq. Dynamiques + paramétrisations)</text:p>
                  </text:list-item>
                  <text:list-item>
                    <text:p>Etat T+1 = Dérivée + Etat T<text:line-break/>(Euler, Leapfrog, Runge Kutta, méthodes <text:line-break/>lagrangiennes...)</text:p>
                  </text:list-item>
                </text:list>
              </text:list-item>
              <text:list-item>
                <text:p>Problématiques : </text:p>
                <text:list>
                  <text:list-item>
                    <text:p>Ingénierie humaine complexe <text:line-break/>(modèles dans le modèle, <text:line-break/>problèmes d’instabilité numériques…)</text:p>
                  </text:list-item>
                  <text:list-item>
                    <text:p>Non linéarité (pas de temps petit)</text:p>
                  </text:list-item>
                </text:list>
              </text:list-item>
            </text:list>
          </draw:text-box>
        </draw:frame>
        <draw:frame draw:style-name="gr8" draw:text-style-name="P6" draw:layer="layout" svg:width="4.614cm" svg:height="3.229cm" svg:x="22.886cm" svg:y="10.771cm">
          <draw:image xlink:href="Pictures/10000001000000FA000000AF57DCD893.png" xlink:type="simple" xlink:show="embed" xlink:actuate="onLoad" draw:mime-type="image/png">
            <text:p/>
          </draw:image>
        </draw:frame>
        <draw:frame draw:style-name="gr8" draw:text-style-name="P6" draw:layer="layout" svg:width="4.73cm" svg:height="4.73cm" svg:x="17.77cm" svg:y="9.77cm">
          <draw:image xlink:href="Pictures/100000010000014A0000014A81EC3A6B.png" xlink:type="simple" xlink:show="embed" xlink:actuate="onLoad" draw:mime-type="image/png">
            <text:p/>
          </draw:image>
        </draw:frame>
        <draw:frame draw:style-name="gr8" draw:text-style-name="P6" draw:layer="layout" svg:width="5.473cm" svg:height="5.987cm" svg:x="20.527cm" svg:y="3.013cm">
          <draw:image xlink:href="Pictures/100000010000021F000002524F80360B.png" xlink:type="simple" xlink:show="embed" xlink:actuate="onLoad" draw:mime-type="image/png">
            <text:p/>
          </draw:image>
        </draw:frame>
        <anim:par presentation:node-type="timing-root">
          <anim:par smil:begin="id87.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4" presentation:class="page"/>
          <draw:frame presentation:style-name="pr13" draw:text-style-name="P7" draw:layer="layout" svg:width="17cm" svg:height="14cm" svg:x="2cm" svg:y="13cm" presentation:class="notes" presentation:placeholder="true">
            <draw:text-box/>
          </draw:frame>
        </presentation:notes>
      </draw:page>
      <draw:page draw:name="page5" draw:style-name="dp1" draw:master-page-name="Three_20_Bullets" presentation:presentation-page-layout-name="AL4T12" xml:id="id88" draw:id="id88">
        <office:forms form:automatic-focus="false" form:apply-design-mode="false"/>
        <draw:path draw:style-name="gr4" draw:text-style-name="P4"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presentation:style-name="pr14" draw:layer="layout" svg:width="8.4cm" svg:height="5cm" svg:x="0.7cm" svg:y="9.6cm" presentation:class="outline" presentation:user-transformed="true">
          <draw:text-box>
            <text:list text:style-name="L4">
              <text:list-item>
                <text:p>Utiliser l’approche GNN</text:p>
              </text:list-item>
            </text:list>
          </draw:text-box>
        </draw:frame>
        <draw:path draw:style-name="gr4" draw:text-style-name="P4"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14" draw:layer="layout" svg:width="8.4cm" svg:height="5cm" svg:x="9.8cm" svg:y="9.6cm" presentation:class="outline" presentation:user-transformed="true">
          <draw:text-box>
            <text:list text:style-name="L4">
              <text:list-item>
                <text:p>Puissance de calcul limitée</text:p>
              </text:list-item>
            </text:list>
          </draw:text-box>
        </draw:frame>
        <draw:path draw:style-name="gr4" draw:text-style-name="P4"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4" draw:layer="layout" svg:width="8.4cm" svg:height="5cm" svg:x="18.9cm" svg:y="9.6cm" presentation:class="outline" presentation:user-transformed="true">
          <draw:text-box>
            <text:list text:style-name="L4">
              <text:list-item>
                <text:p>Résultats <text:s/>physiquemnt réalistes</text:p>
              </text:list-item>
            </text:list>
          </draw:text-box>
        </draw:frame>
        <draw:frame presentation:style-name="pr15" draw:layer="layout" svg:width="25.2cm" svg:height="5cm" svg:x="1.4cm" svg:y="0.9cm" presentation:class="title" presentation:user-transformed="true">
          <draw:text-box>
            <text:p>Objectifs PIFOCast</text:p>
          </draw:text-box>
        </draw:frame>
        <anim:par presentation:node-type="timing-root">
          <anim:par smil:begin="id8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6" draw:text-style-name="P2" draw:layer="layout" svg:width="17cm" svg:height="14cm" svg:x="2cm" svg:y="13cm" presentation:class="notes" presentation:placeholder="true">
            <draw:text-box/>
          </draw:frame>
        </presentation:notes>
      </draw:page>
      <draw:page draw:name="page6" draw:style-name="dp1" draw:master-page-name="White_2f_Blue_20_Chart" presentation:presentation-page-layout-name="AL3T1" xml:id="id89" draw:id="id89">
        <office:forms form:automatic-focus="false" form:apply-design-mode="false"/>
        <draw:frame presentation:style-name="pr17" draw:layer="layout" svg:width="10cm" svg:height="2cm" svg:x="0cm" svg:y="0.8cm" presentation:class="title" presentation:user-transformed="true">
          <draw:text-box>
            <text:p>Générer une prévision</text:p>
          </draw:text-box>
        </draw:frame>
        <draw:frame presentation:style-name="pr18" draw:layer="layout" svg:width="25.5cm" svg:height="2cm" svg:x="1.5cm" svg:y="4cm" presentation:class="outline" presentation:user-transformed="true">
          <draw:text-box>
            <text:list text:style-name="L4">
              <text:list-item>
                <text:p>Pour un état X, le modèle prédit un nouvel état :</text:p>
              </text:list-item>
            </text:list>
          </draw:text-box>
        </draw:frame>
        <draw:connector draw:style-name="gr9" draw:text-style-name="P1" draw:layer="layout" draw:type="lines" svg:x1="16.825cm" svg:y1="7.725cm" svg:x2="19.325cm" svg:y2="7.725cm" svg:d="M16825 7725h550 1400 550" svg:viewBox="0 0 2501 1">
          <text:p/>
        </draw:connector>
        <draw:frame draw:style-name="gr10" draw:text-style-name="P6" draw:layer="layout" svg:width="9.732cm" svg:height="1.497cm" svg:x="3.033cm" svg:y="6.5cm">
          <draw:object xlink:href="./Object 4" xlink:type="simple" xlink:show="embed" xlink:actuate="onLoad">
            <loext:p/>
          </draw:object>
          <draw:image xlink:href="./ObjectReplacements/Object 4" xlink:type="simple" xlink:show="embed" xlink:actuate="onLoad"/>
        </draw:frame>
        <draw:frame draw:style-name="gr11" draw:text-style-name="P6" draw:layer="layout" svg:width="30.184cm" svg:height="2.756cm" svg:x="3cm" svg:y="10.5cm">
          <draw:object xlink:href="./Object 5" xlink:type="simple" xlink:show="embed" xlink:actuate="onLoad">
            <loext:p/>
          </draw:object>
          <draw:image xlink:href="./ObjectReplacements/Object 5" xlink:type="simple" xlink:show="embed" xlink:actuate="onLoad"/>
        </draw:frame>
        <draw:frame presentation:style-name="pr18" draw:layer="layout" svg:width="25.5cm" svg:height="2cm" svg:x="1.5cm" svg:y="8.5cm" presentation:class="outline" presentation:user-transformed="true">
          <draw:text-box>
            <text:list text:style-name="L4">
              <text:list-item>
                <text:p>On itère pour créer une prévision complète : </text:p>
              </text:list-item>
            </text:list>
          </draw:text-box>
        </draw:frame>
        <anim:par presentation:node-type="timing-root">
          <anim:par smil:begin="id8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3" draw:text-style-name="P7"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3T1" xml:id="id90" draw:id="id90">
        <office:forms form:automatic-focus="false" form:apply-design-mode="false"/>
        <draw:custom-shape draw:style-name="gr12" draw:text-style-name="P9" draw:layer="layout" svg:width="5cm" svg:height="0.999cm" draw:transform="rotate (1.5707963267949) translate (2.408cm 11.732cm)">
          <text:p text:style-name="P8"><text:span text:style-name="T3">(rebouclage)</text:span></text:p>
          <draw:enhanced-geometry svg:viewBox="0 0 21600 21600" draw:type="rectangle" draw:enhanced-path="M 0 0 L 21600 0 21600 21600 0 21600 0 0 Z N"/>
        </draw:custom-shape>
        <draw:frame presentation:style-name="pr11" draw:layer="layout" svg:width="9.8cm" svg:height="2cm" svg:x="0cm" svg:y="0.8cm" presentation:class="title" presentation:user-transformed="true">
          <draw:text-box>
            <text:p>Architecture</text:p>
          </draw:text-box>
        </draw:frame>
        <draw:custom-shape draw:style-name="gr13" draw:text-style-name="P6" xml:id="id1" draw:id="id1"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2" draw:id="id2"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3" draw:id="id3"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4.464cm" svg:x2="4.057cm" svg:y2="5.215cm" draw:start-shape="id1" draw:start-glue-point="8" draw:end-shape="id2" draw:end-glue-point="4" svg:d="M4057 4464v751" svg:viewBox="0 0 1 752">
          <text:p/>
        </draw:connector>
        <draw:connector draw:style-name="gr14" draw:text-style-name="P5" draw:layer="layout" draw:type="line" svg:x1="4.057cm" svg:y1="4.464cm" svg:x2="4.057cm" svg:y2="5.215cm" draw:start-shape="id1" draw:start-glue-point="8" draw:end-shape="id2" draw:end-glue-point="4" svg:d="M4057 4464v751" svg:viewBox="0 0 1 752">
          <text:p/>
        </draw:connector>
        <draw:connector draw:style-name="gr14" draw:text-style-name="P5" draw:layer="layout" svg:x1="6.001cm" svg:y1="4.464cm" svg:x2="6.001cm" svg:y2="5.215cm" svg:d="M6001 4464v751" svg:viewBox="0 0 1 752">
          <text:p/>
        </draw:connector>
        <draw:connector draw:style-name="gr14" draw:text-style-name="P5" draw:layer="layout" draw:type="line" svg:x1="6.001cm" svg:y1="4.464cm" svg:x2="6.001cm" svg:y2="5.215cm" svg:d="M6001 4464v751" svg:viewBox="0 0 1 752">
          <text:p/>
        </draw:connector>
        <draw:connector draw:style-name="gr14" draw:text-style-name="P5" draw:layer="layout" svg:x1="7.946cm" svg:y1="4.464cm" svg:x2="7.946cm" svg:y2="5.215cm" svg:d="M7946 4464v751" svg:viewBox="0 0 1 752">
          <text:p/>
        </draw:connector>
        <draw:connector draw:style-name="gr14" draw:text-style-name="P5" draw:layer="layout" draw:type="line" svg:x1="7.946cm" svg:y1="4.464cm" svg:x2="7.946cm" svg:y2="5.215cm" svg:d="M7946 4464v751" svg:viewBox="0 0 1 752">
          <text:p/>
        </draw:connector>
        <draw:connector draw:style-name="gr15" draw:text-style-name="P5" draw:layer="layout" svg:x1="4.056cm" svg:y1="5.964cm" svg:x2="4.056cm" svg:y2="6.715cm" svg:d="M4056 5964v751" svg:viewBox="0 0 1 752">
          <text:p/>
        </draw:connector>
        <draw:connector draw:style-name="gr15" draw:text-style-name="P5" draw:layer="layout" draw:type="line" svg:x1="4.056cm" svg:y1="5.964cm" svg:x2="4.056cm" svg:y2="6.715cm" svg:d="M4056 5964v751" svg:viewBox="0 0 1 752">
          <text:p/>
        </draw:connector>
        <draw:connector draw:style-name="gr15" draw:text-style-name="P5" draw:layer="layout" svg:x1="4.056cm" svg:y1="5.965cm" svg:x2="4.056cm" svg:y2="6.715cm" svg:d="M4056 5965v750" svg:viewBox="0 0 1 751">
          <text:p/>
        </draw:connector>
        <draw:connector draw:style-name="gr15" draw:text-style-name="P5" draw:layer="layout" draw:type="line" svg:x1="6.001cm" svg:y1="7.464cm" svg:x2="6.001cm" svg:y2="8.215cm" svg:d="M6001 7464v751" svg:viewBox="0 0 1 752">
          <text:p/>
        </draw:connector>
        <draw:connector draw:style-name="gr15" draw:text-style-name="P5" draw:layer="layout" svg:x1="6.001cm" svg:y1="5.964cm" svg:x2="6.001cm" svg:y2="6.715cm" svg:d="M6001 5964v751" svg:viewBox="0 0 1 752">
          <text:p/>
        </draw:connector>
        <draw:connector draw:style-name="gr15" draw:text-style-name="P5" draw:layer="layout" draw:type="line" svg:x1="6.001cm" svg:y1="5.964cm" svg:x2="6.001cm" svg:y2="6.715cm" svg:d="M6001 5964v751" svg:viewBox="0 0 1 752">
          <text:p/>
        </draw:connector>
        <draw:connector draw:style-name="gr15" draw:text-style-name="P5" draw:layer="layout" svg:x1="6.001cm" svg:y1="5.965cm" svg:x2="6.001cm" svg:y2="6.715cm" svg:d="M6001 5965v750" svg:viewBox="0 0 1 751">
          <text:p/>
        </draw:connector>
        <draw:connector draw:style-name="gr15" draw:text-style-name="P5" draw:layer="layout" draw:type="line" svg:x1="6.001cm" svg:y1="5.965cm" svg:x2="6.001cm" svg:y2="6.715cm" svg:d="M6001 5965v750" svg:viewBox="0 0 1 751">
          <text:p/>
        </draw:connector>
        <draw:connector draw:style-name="gr15" draw:text-style-name="P5" draw:layer="layout" svg:x1="7.946cm" svg:y1="5.964cm" svg:x2="7.946cm" svg:y2="6.715cm" svg:d="M7946 5964v751" svg:viewBox="0 0 1 752">
          <text:p/>
        </draw:connector>
        <draw:connector draw:style-name="gr15" draw:text-style-name="P5" draw:layer="layout" draw:type="line" svg:x1="7.946cm" svg:y1="5.964cm" svg:x2="7.946cm" svg:y2="6.715cm" svg:d="M7946 5964v751" svg:viewBox="0 0 1 752">
          <text:p/>
        </draw:connector>
        <draw:connector draw:style-name="gr15" draw:text-style-name="P5" draw:layer="layout" svg:x1="7.946cm" svg:y1="5.965cm" svg:x2="7.946cm" svg:y2="6.715cm" svg:d="M7946 5965v750" svg:viewBox="0 0 1 751">
          <text:p/>
        </draw:connector>
        <draw:connector draw:style-name="gr15" draw:text-style-name="P5" draw:layer="layout" draw:type="line" svg:x1="7.946cm" svg:y1="5.965cm" svg:x2="7.946cm" svg:y2="6.715cm" svg:d="M7946 5965v750" svg:viewBox="0 0 1 751">
          <text:p/>
        </draw:connector>
        <draw:connector draw:style-name="gr15" draw:text-style-name="P5" draw:layer="layout" draw:type="line" svg:x1="4.445cm" svg:y1="5.59cm" svg:x2="5.613cm" svg:y2="5.589cm" draw:start-shape="id2" draw:start-glue-point="10" draw:end-shape="id3" draw:end-glue-point="6" svg:d="M4445 5590l1168-1" svg:viewBox="0 0 1169 2">
          <text:p/>
        </draw:connector>
        <draw:connector draw:style-name="gr15" draw:text-style-name="P5" draw:layer="layout" draw:type="line" svg:x1="4.445cm" svg:y1="5.59cm" svg:x2="5.613cm" svg:y2="5.589cm" draw:start-shape="id2" draw:start-glue-point="10" draw:end-shape="id3" draw:end-glue-point="6" svg:d="M4445 5590l1168-1" svg:viewBox="0 0 1169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4.056cm" svg:y1="7.464cm" svg:x2="4.056cm" svg:y2="8.215cm" svg:d="M4056 7464v751" svg:viewBox="0 0 1 752">
          <text:p/>
        </draw:connector>
        <draw:connector draw:style-name="gr15" draw:text-style-name="P5" draw:layer="layout" draw:type="line" svg:x1="4.056cm" svg:y1="7.465cm" svg:x2="4.056cm" svg:y2="8.215cm" svg:d="M4056 7465v750" svg:viewBox="0 0 1 751">
          <text:p/>
        </draw:connector>
        <draw:connector draw:style-name="gr15" draw:text-style-name="P5" draw:layer="layout" draw:type="line" svg:x1="7.946cm" svg:y1="7.464cm" svg:x2="7.946cm" svg:y2="8.215cm" svg:d="M7946 7464v751" svg:viewBox="0 0 1 75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7.09cm" svg:x2="3.668cm" svg:y2="7.089cm" svg:d="M2500 7090l1168-1" svg:viewBox="0 0 1169 2">
          <text:p/>
        </draw:connector>
        <draw:connector draw:style-name="gr15" draw:text-style-name="P5" draw:layer="layout" draw:type="line" svg:x1="2.5cm" svg:y1="7.09cm" svg:x2="3.668cm" svg:y2="7.089cm" svg:d="M2500 7090l1168-1" svg:viewBox="0 0 1169 2">
          <text:p/>
        </draw:connector>
        <draw:custom-shape draw:style-name="gr13" draw:text-style-name="P6" xml:id="id4" draw:id="id4"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5" draw:id="id5"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 draw:id="id6"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4.464cm" svg:x2="4.057cm" svg:y2="5.215cm" draw:start-shape="id4" draw:start-glue-point="8" draw:end-shape="id5" draw:end-glue-point="4" svg:d="M4057 4464v751" svg:viewBox="0 0 1 752">
          <text:p/>
        </draw:connector>
        <draw:connector draw:style-name="gr14" draw:text-style-name="P5" draw:layer="layout" draw:type="line" svg:x1="4.057cm" svg:y1="4.464cm" svg:x2="4.057cm" svg:y2="5.215cm" draw:start-shape="id4" draw:start-glue-point="8" draw:end-shape="id5" draw:end-glue-point="4" svg:d="M4057 4464v751" svg:viewBox="0 0 1 752">
          <text:p/>
        </draw:connector>
        <draw:connector draw:style-name="gr14" draw:text-style-name="P5" draw:layer="layout" svg:x1="6.001cm" svg:y1="4.464cm" svg:x2="6.001cm" svg:y2="5.215cm" svg:d="M6001 4464v751" svg:viewBox="0 0 1 752">
          <text:p/>
        </draw:connector>
        <draw:connector draw:style-name="gr14" draw:text-style-name="P5" draw:layer="layout" draw:type="line" svg:x1="6.001cm" svg:y1="4.464cm" svg:x2="6.001cm" svg:y2="5.215cm" svg:d="M6001 4464v751" svg:viewBox="0 0 1 752">
          <text:p/>
        </draw:connector>
        <draw:connector draw:style-name="gr14" draw:text-style-name="P5" draw:layer="layout" svg:x1="7.946cm" svg:y1="4.464cm" svg:x2="7.946cm" svg:y2="5.215cm" svg:d="M7946 4464v751" svg:viewBox="0 0 1 752">
          <text:p/>
        </draw:connector>
        <draw:connector draw:style-name="gr14" draw:text-style-name="P5" draw:layer="layout" draw:type="line" svg:x1="7.946cm" svg:y1="4.464cm" svg:x2="7.946cm" svg:y2="5.215cm" svg:d="M7946 4464v751" svg:viewBox="0 0 1 752">
          <text:p/>
        </draw:connector>
        <draw:connector draw:style-name="gr15" draw:text-style-name="P5" draw:layer="layout" svg:x1="4.056cm" svg:y1="5.964cm" svg:x2="4.056cm" svg:y2="6.715cm" svg:d="M4056 5964v751" svg:viewBox="0 0 1 752">
          <text:p/>
        </draw:connector>
        <draw:connector draw:style-name="gr15" draw:text-style-name="P5" draw:layer="layout" draw:type="line" svg:x1="4.056cm" svg:y1="5.964cm" svg:x2="4.056cm" svg:y2="6.715cm" svg:d="M4056 5964v751" svg:viewBox="0 0 1 752">
          <text:p/>
        </draw:connector>
        <draw:connector draw:style-name="gr15" draw:text-style-name="P5" draw:layer="layout" svg:x1="4.056cm" svg:y1="5.965cm" svg:x2="4.056cm" svg:y2="6.715cm" svg:d="M4056 5965v750" svg:viewBox="0 0 1 751">
          <text:p/>
        </draw:connector>
        <draw:connector draw:style-name="gr15" draw:text-style-name="P5" draw:layer="layout" draw:type="line" svg:x1="6.001cm" svg:y1="7.464cm" svg:x2="6.001cm" svg:y2="8.215cm" svg:d="M6001 7464v751" svg:viewBox="0 0 1 752">
          <text:p/>
        </draw:connector>
        <draw:connector draw:style-name="gr15" draw:text-style-name="P5" draw:layer="layout" svg:x1="6.001cm" svg:y1="5.964cm" svg:x2="6.001cm" svg:y2="6.715cm" svg:d="M6001 5964v751" svg:viewBox="0 0 1 752">
          <text:p/>
        </draw:connector>
        <draw:connector draw:style-name="gr15" draw:text-style-name="P5" draw:layer="layout" draw:type="line" svg:x1="6.001cm" svg:y1="5.964cm" svg:x2="6.001cm" svg:y2="6.715cm" svg:d="M6001 5964v751" svg:viewBox="0 0 1 752">
          <text:p/>
        </draw:connector>
        <draw:connector draw:style-name="gr15" draw:text-style-name="P5" draw:layer="layout" svg:x1="6.001cm" svg:y1="5.965cm" svg:x2="6.001cm" svg:y2="6.715cm" svg:d="M6001 5965v750" svg:viewBox="0 0 1 751">
          <text:p/>
        </draw:connector>
        <draw:connector draw:style-name="gr15" draw:text-style-name="P5" draw:layer="layout" draw:type="line" svg:x1="6.001cm" svg:y1="5.965cm" svg:x2="6.001cm" svg:y2="6.715cm" svg:d="M6001 5965v750" svg:viewBox="0 0 1 751">
          <text:p/>
        </draw:connector>
        <draw:connector draw:style-name="gr15" draw:text-style-name="P5" draw:layer="layout" svg:x1="7.946cm" svg:y1="5.964cm" svg:x2="7.946cm" svg:y2="6.715cm" svg:d="M7946 5964v751" svg:viewBox="0 0 1 752">
          <text:p/>
        </draw:connector>
        <draw:connector draw:style-name="gr15" draw:text-style-name="P5" draw:layer="layout" draw:type="line" svg:x1="7.946cm" svg:y1="5.964cm" svg:x2="7.946cm" svg:y2="6.715cm" svg:d="M7946 5964v751" svg:viewBox="0 0 1 752">
          <text:p/>
        </draw:connector>
        <draw:connector draw:style-name="gr15" draw:text-style-name="P5" draw:layer="layout" svg:x1="7.946cm" svg:y1="5.965cm" svg:x2="7.946cm" svg:y2="6.715cm" svg:d="M7946 5965v750" svg:viewBox="0 0 1 751">
          <text:p/>
        </draw:connector>
        <draw:connector draw:style-name="gr15" draw:text-style-name="P5" draw:layer="layout" draw:type="line" svg:x1="7.946cm" svg:y1="5.965cm" svg:x2="7.946cm" svg:y2="6.715cm" svg:d="M7946 5965v750" svg:viewBox="0 0 1 751">
          <text:p/>
        </draw:connector>
        <draw:connector draw:style-name="gr15" draw:text-style-name="P5" draw:layer="layout" draw:type="line" svg:x1="4.445cm" svg:y1="5.59cm" svg:x2="5.613cm" svg:y2="5.589cm" draw:start-shape="id5" draw:start-glue-point="10" draw:end-shape="id6" draw:end-glue-point="6" svg:d="M4445 5590l1168-1" svg:viewBox="0 0 1169 2">
          <text:p/>
        </draw:connector>
        <draw:connector draw:style-name="gr15" draw:text-style-name="P5" draw:layer="layout" draw:type="line" svg:x1="4.445cm" svg:y1="5.59cm" svg:x2="5.613cm" svg:y2="5.589cm" draw:start-shape="id5" draw:start-glue-point="10" draw:end-shape="id6" draw:end-glue-point="6" svg:d="M4445 5590l1168-1" svg:viewBox="0 0 1169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4.056cm" svg:y1="7.464cm" svg:x2="4.056cm" svg:y2="8.215cm" svg:d="M4056 7464v751" svg:viewBox="0 0 1 752">
          <text:p/>
        </draw:connector>
        <draw:connector draw:style-name="gr15" draw:text-style-name="P5" draw:layer="layout" draw:type="line" svg:x1="4.056cm" svg:y1="7.465cm" svg:x2="4.056cm" svg:y2="8.215cm" svg:d="M4056 7465v750" svg:viewBox="0 0 1 751">
          <text:p/>
        </draw:connector>
        <draw:connector draw:style-name="gr15" draw:text-style-name="P5" draw:layer="layout" draw:type="line" svg:x1="7.946cm" svg:y1="7.464cm" svg:x2="7.946cm" svg:y2="8.215cm" svg:d="M7946 7464v751" svg:viewBox="0 0 1 75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7.09cm" svg:x2="3.668cm" svg:y2="7.089cm" svg:d="M2500 7090l1168-1" svg:viewBox="0 0 1169 2">
          <text:p/>
        </draw:connector>
        <draw:connector draw:style-name="gr15" draw:text-style-name="P5" draw:layer="layout" draw:type="line" svg:x1="2.5cm" svg:y1="7.09cm" svg:x2="3.668cm" svg:y2="7.089cm" svg:d="M2500 7090l1168-1" svg:viewBox="0 0 1169 2">
          <text:p/>
        </draw:connector>
        <draw:custom-shape draw:style-name="gr13" draw:text-style-name="P6" xml:id="id7" draw:id="id7"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8" draw:id="id8"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9" draw:id="id9"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4.464cm" svg:x2="4.057cm" svg:y2="5.215cm" draw:start-shape="id7" draw:start-glue-point="8" draw:end-shape="id8" draw:end-glue-point="4" svg:d="M4057 4464v751" svg:viewBox="0 0 1 752">
          <text:p/>
        </draw:connector>
        <draw:connector draw:style-name="gr14" draw:text-style-name="P5" draw:layer="layout" draw:type="line" svg:x1="4.057cm" svg:y1="4.464cm" svg:x2="4.057cm" svg:y2="5.215cm" draw:start-shape="id7" draw:start-glue-point="8" draw:end-shape="id8" draw:end-glue-point="4" svg:d="M4057 4464v751" svg:viewBox="0 0 1 752">
          <text:p/>
        </draw:connector>
        <draw:connector draw:style-name="gr14" draw:text-style-name="P5" draw:layer="layout" svg:x1="6.001cm" svg:y1="4.464cm" svg:x2="6.001cm" svg:y2="5.215cm" svg:d="M6001 4464v751" svg:viewBox="0 0 1 752">
          <text:p/>
        </draw:connector>
        <draw:connector draw:style-name="gr14" draw:text-style-name="P5" draw:layer="layout" draw:type="line" svg:x1="6.001cm" svg:y1="4.464cm" svg:x2="6.001cm" svg:y2="5.215cm" svg:d="M6001 4464v751" svg:viewBox="0 0 1 752">
          <text:p/>
        </draw:connector>
        <draw:connector draw:style-name="gr14" draw:text-style-name="P5" draw:layer="layout" svg:x1="7.946cm" svg:y1="4.464cm" svg:x2="7.946cm" svg:y2="5.215cm" svg:d="M7946 4464v751" svg:viewBox="0 0 1 752">
          <text:p/>
        </draw:connector>
        <draw:connector draw:style-name="gr14" draw:text-style-name="P5" draw:layer="layout" draw:type="line" svg:x1="7.946cm" svg:y1="4.464cm" svg:x2="7.946cm" svg:y2="5.215cm" svg:d="M7946 4464v751" svg:viewBox="0 0 1 752">
          <text:p/>
        </draw:connector>
        <draw:connector draw:style-name="gr15" draw:text-style-name="P5" draw:layer="layout" svg:x1="4.056cm" svg:y1="5.964cm" svg:x2="4.056cm" svg:y2="6.715cm" svg:d="M4056 5964v751" svg:viewBox="0 0 1 752">
          <text:p/>
        </draw:connector>
        <draw:connector draw:style-name="gr15" draw:text-style-name="P5" draw:layer="layout" draw:type="line" svg:x1="4.056cm" svg:y1="5.964cm" svg:x2="4.056cm" svg:y2="6.715cm" svg:d="M4056 5964v751" svg:viewBox="0 0 1 752">
          <text:p/>
        </draw:connector>
        <draw:connector draw:style-name="gr15" draw:text-style-name="P5" draw:layer="layout" svg:x1="4.056cm" svg:y1="5.965cm" svg:x2="4.056cm" svg:y2="6.715cm" svg:d="M4056 5965v750" svg:viewBox="0 0 1 751">
          <text:p/>
        </draw:connector>
        <draw:connector draw:style-name="gr15" draw:text-style-name="P5" draw:layer="layout" draw:type="line" svg:x1="6.001cm" svg:y1="7.464cm" svg:x2="6.001cm" svg:y2="8.215cm" svg:d="M6001 7464v751" svg:viewBox="0 0 1 752">
          <text:p/>
        </draw:connector>
        <draw:connector draw:style-name="gr15" draw:text-style-name="P5" draw:layer="layout" svg:x1="6.001cm" svg:y1="5.964cm" svg:x2="6.001cm" svg:y2="6.715cm" svg:d="M6001 5964v751" svg:viewBox="0 0 1 752">
          <text:p/>
        </draw:connector>
        <draw:connector draw:style-name="gr15" draw:text-style-name="P5" draw:layer="layout" draw:type="line" svg:x1="6.001cm" svg:y1="5.964cm" svg:x2="6.001cm" svg:y2="6.715cm" svg:d="M6001 5964v751" svg:viewBox="0 0 1 752">
          <text:p/>
        </draw:connector>
        <draw:connector draw:style-name="gr15" draw:text-style-name="P5" draw:layer="layout" svg:x1="6.001cm" svg:y1="5.965cm" svg:x2="6.001cm" svg:y2="6.715cm" svg:d="M6001 5965v750" svg:viewBox="0 0 1 751">
          <text:p/>
        </draw:connector>
        <draw:connector draw:style-name="gr15" draw:text-style-name="P5" draw:layer="layout" draw:type="line" svg:x1="6.001cm" svg:y1="5.965cm" svg:x2="6.001cm" svg:y2="6.715cm" svg:d="M6001 5965v750" svg:viewBox="0 0 1 751">
          <text:p/>
        </draw:connector>
        <draw:connector draw:style-name="gr15" draw:text-style-name="P5" draw:layer="layout" svg:x1="7.946cm" svg:y1="5.964cm" svg:x2="7.946cm" svg:y2="6.715cm" svg:d="M7946 5964v751" svg:viewBox="0 0 1 752">
          <text:p/>
        </draw:connector>
        <draw:connector draw:style-name="gr15" draw:text-style-name="P5" draw:layer="layout" draw:type="line" svg:x1="7.946cm" svg:y1="5.964cm" svg:x2="7.946cm" svg:y2="6.715cm" svg:d="M7946 5964v751" svg:viewBox="0 0 1 752">
          <text:p/>
        </draw:connector>
        <draw:connector draw:style-name="gr15" draw:text-style-name="P5" draw:layer="layout" svg:x1="7.946cm" svg:y1="5.965cm" svg:x2="7.946cm" svg:y2="6.715cm" svg:d="M7946 5965v750" svg:viewBox="0 0 1 751">
          <text:p/>
        </draw:connector>
        <draw:connector draw:style-name="gr15" draw:text-style-name="P5" draw:layer="layout" draw:type="line" svg:x1="7.946cm" svg:y1="5.965cm" svg:x2="7.946cm" svg:y2="6.715cm" svg:d="M7946 5965v750" svg:viewBox="0 0 1 751">
          <text:p/>
        </draw:connector>
        <draw:connector draw:style-name="gr15" draw:text-style-name="P5" draw:layer="layout" draw:type="line" svg:x1="4.445cm" svg:y1="5.59cm" svg:x2="5.613cm" svg:y2="5.589cm" draw:start-shape="id8" draw:start-glue-point="10" draw:end-shape="id9" draw:end-glue-point="6" svg:d="M4445 5590l1168-1" svg:viewBox="0 0 1169 2">
          <text:p/>
        </draw:connector>
        <draw:connector draw:style-name="gr15" draw:text-style-name="P5" draw:layer="layout" draw:type="line" svg:x1="4.445cm" svg:y1="5.59cm" svg:x2="5.613cm" svg:y2="5.589cm" draw:start-shape="id8" draw:start-glue-point="10" draw:end-shape="id9" draw:end-glue-point="6" svg:d="M4445 5590l1168-1" svg:viewBox="0 0 1169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4.056cm" svg:y1="7.464cm" svg:x2="4.056cm" svg:y2="8.215cm" svg:d="M4056 7464v751" svg:viewBox="0 0 1 752">
          <text:p/>
        </draw:connector>
        <draw:connector draw:style-name="gr15" draw:text-style-name="P5" draw:layer="layout" draw:type="line" svg:x1="4.056cm" svg:y1="7.465cm" svg:x2="4.056cm" svg:y2="8.215cm" svg:d="M4056 7465v750" svg:viewBox="0 0 1 751">
          <text:p/>
        </draw:connector>
        <draw:connector draw:style-name="gr15" draw:text-style-name="P5" draw:layer="layout" draw:type="line" svg:x1="7.946cm" svg:y1="7.464cm" svg:x2="7.946cm" svg:y2="8.215cm" svg:d="M7946 7464v751" svg:viewBox="0 0 1 75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7.09cm" svg:x2="3.668cm" svg:y2="7.089cm" svg:d="M2500 7090l1168-1" svg:viewBox="0 0 1169 2">
          <text:p/>
        </draw:connector>
        <draw:connector draw:style-name="gr15" draw:text-style-name="P5" draw:layer="layout" draw:type="line" svg:x1="2.5cm" svg:y1="7.09cm" svg:x2="3.668cm" svg:y2="7.089cm" svg:d="M2500 7090l1168-1" svg:viewBox="0 0 1169 2">
          <text:p/>
        </draw:connector>
        <draw:custom-shape draw:style-name="gr13" draw:text-style-name="P6" xml:id="id10" draw:id="id10"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11" draw:id="id11"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12" draw:id="id12"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4.464cm" svg:x2="4.057cm" svg:y2="5.215cm" draw:start-shape="id10" draw:start-glue-point="8" draw:end-shape="id11" draw:end-glue-point="4" svg:d="M4057 4464v751" svg:viewBox="0 0 1 752">
          <text:p/>
        </draw:connector>
        <draw:connector draw:style-name="gr14" draw:text-style-name="P5" draw:layer="layout" draw:type="line" svg:x1="4.057cm" svg:y1="4.464cm" svg:x2="4.057cm" svg:y2="5.215cm" draw:start-shape="id10" draw:start-glue-point="8" draw:end-shape="id11" draw:end-glue-point="4" svg:d="M4057 4464v751" svg:viewBox="0 0 1 752">
          <text:p/>
        </draw:connector>
        <draw:connector draw:style-name="gr14" draw:text-style-name="P5" draw:layer="layout" svg:x1="6.001cm" svg:y1="4.464cm" svg:x2="6.001cm" svg:y2="5.215cm" svg:d="M6001 4464v751" svg:viewBox="0 0 1 752">
          <text:p/>
        </draw:connector>
        <draw:connector draw:style-name="gr14" draw:text-style-name="P5" draw:layer="layout" draw:type="line" svg:x1="6.001cm" svg:y1="4.464cm" svg:x2="6.001cm" svg:y2="5.215cm" svg:d="M6001 4464v751" svg:viewBox="0 0 1 752">
          <text:p/>
        </draw:connector>
        <draw:connector draw:style-name="gr14" draw:text-style-name="P5" draw:layer="layout" svg:x1="7.946cm" svg:y1="4.464cm" svg:x2="7.946cm" svg:y2="5.215cm" svg:d="M7946 4464v751" svg:viewBox="0 0 1 752">
          <text:p/>
        </draw:connector>
        <draw:connector draw:style-name="gr14" draw:text-style-name="P5" draw:layer="layout" draw:type="line" svg:x1="7.946cm" svg:y1="4.464cm" svg:x2="7.946cm" svg:y2="5.215cm" svg:d="M7946 4464v751" svg:viewBox="0 0 1 752">
          <text:p/>
        </draw:connector>
        <draw:connector draw:style-name="gr15" draw:text-style-name="P5" draw:layer="layout" svg:x1="4.056cm" svg:y1="5.964cm" svg:x2="4.056cm" svg:y2="6.715cm" svg:d="M4056 5964v751" svg:viewBox="0 0 1 752">
          <text:p/>
        </draw:connector>
        <draw:connector draw:style-name="gr15" draw:text-style-name="P5" draw:layer="layout" draw:type="line" svg:x1="4.056cm" svg:y1="5.964cm" svg:x2="4.056cm" svg:y2="6.715cm" svg:d="M4056 5964v751" svg:viewBox="0 0 1 752">
          <text:p/>
        </draw:connector>
        <draw:connector draw:style-name="gr15" draw:text-style-name="P5" draw:layer="layout" svg:x1="4.056cm" svg:y1="5.965cm" svg:x2="4.056cm" svg:y2="6.715cm" svg:d="M4056 5965v750" svg:viewBox="0 0 1 751">
          <text:p/>
        </draw:connector>
        <draw:connector draw:style-name="gr15" draw:text-style-name="P5" draw:layer="layout" draw:type="line" svg:x1="6.001cm" svg:y1="7.464cm" svg:x2="6.001cm" svg:y2="8.215cm" svg:d="M6001 7464v751" svg:viewBox="0 0 1 752">
          <text:p/>
        </draw:connector>
        <draw:connector draw:style-name="gr15" draw:text-style-name="P5" draw:layer="layout" svg:x1="6.001cm" svg:y1="5.964cm" svg:x2="6.001cm" svg:y2="6.715cm" svg:d="M6001 5964v751" svg:viewBox="0 0 1 752">
          <text:p/>
        </draw:connector>
        <draw:connector draw:style-name="gr15" draw:text-style-name="P5" draw:layer="layout" draw:type="line" svg:x1="6.001cm" svg:y1="5.964cm" svg:x2="6.001cm" svg:y2="6.715cm" svg:d="M6001 5964v751" svg:viewBox="0 0 1 752">
          <text:p/>
        </draw:connector>
        <draw:connector draw:style-name="gr15" draw:text-style-name="P5" draw:layer="layout" svg:x1="6.001cm" svg:y1="5.965cm" svg:x2="6.001cm" svg:y2="6.715cm" svg:d="M6001 5965v750" svg:viewBox="0 0 1 751">
          <text:p/>
        </draw:connector>
        <draw:connector draw:style-name="gr15" draw:text-style-name="P5" draw:layer="layout" draw:type="line" svg:x1="6.001cm" svg:y1="5.965cm" svg:x2="6.001cm" svg:y2="6.715cm" svg:d="M6001 5965v750" svg:viewBox="0 0 1 751">
          <text:p/>
        </draw:connector>
        <draw:connector draw:style-name="gr15" draw:text-style-name="P5" draw:layer="layout" svg:x1="7.946cm" svg:y1="5.964cm" svg:x2="7.946cm" svg:y2="6.715cm" svg:d="M7946 5964v751" svg:viewBox="0 0 1 752">
          <text:p/>
        </draw:connector>
        <draw:connector draw:style-name="gr15" draw:text-style-name="P5" draw:layer="layout" draw:type="line" svg:x1="7.946cm" svg:y1="5.964cm" svg:x2="7.946cm" svg:y2="6.715cm" svg:d="M7946 5964v751" svg:viewBox="0 0 1 752">
          <text:p/>
        </draw:connector>
        <draw:connector draw:style-name="gr15" draw:text-style-name="P5" draw:layer="layout" svg:x1="7.946cm" svg:y1="5.965cm" svg:x2="7.946cm" svg:y2="6.715cm" svg:d="M7946 5965v750" svg:viewBox="0 0 1 751">
          <text:p/>
        </draw:connector>
        <draw:connector draw:style-name="gr15" draw:text-style-name="P5" draw:layer="layout" draw:type="line" svg:x1="7.946cm" svg:y1="5.965cm" svg:x2="7.946cm" svg:y2="6.715cm" svg:d="M7946 5965v750" svg:viewBox="0 0 1 751">
          <text:p/>
        </draw:connector>
        <draw:connector draw:style-name="gr15" draw:text-style-name="P5" draw:layer="layout" draw:type="line" svg:x1="4.445cm" svg:y1="5.59cm" svg:x2="5.613cm" svg:y2="5.589cm" draw:start-shape="id11" draw:start-glue-point="10" draw:end-shape="id12" draw:end-glue-point="6" svg:d="M4445 5590l1168-1" svg:viewBox="0 0 1169 2">
          <text:p/>
        </draw:connector>
        <draw:connector draw:style-name="gr15" draw:text-style-name="P5" draw:layer="layout" draw:type="line" svg:x1="4.445cm" svg:y1="5.59cm" svg:x2="5.613cm" svg:y2="5.589cm" draw:start-shape="id11" draw:start-glue-point="10" draw:end-shape="id12" draw:end-glue-point="6" svg:d="M4445 5590l1168-1" svg:viewBox="0 0 1169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4.056cm" svg:y1="7.464cm" svg:x2="4.056cm" svg:y2="8.215cm" svg:d="M4056 7464v751" svg:viewBox="0 0 1 752">
          <text:p/>
        </draw:connector>
        <draw:connector draw:style-name="gr15" draw:text-style-name="P5" draw:layer="layout" draw:type="line" svg:x1="4.056cm" svg:y1="7.465cm" svg:x2="4.056cm" svg:y2="8.215cm" svg:d="M4056 7465v750" svg:viewBox="0 0 1 751">
          <text:p/>
        </draw:connector>
        <draw:connector draw:style-name="gr15" draw:text-style-name="P5" draw:layer="layout" draw:type="line" svg:x1="7.946cm" svg:y1="7.464cm" svg:x2="7.946cm" svg:y2="8.215cm" svg:d="M7946 7464v751" svg:viewBox="0 0 1 75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7.09cm" svg:x2="3.668cm" svg:y2="7.089cm" svg:d="M2500 7090l1168-1" svg:viewBox="0 0 1169 2">
          <text:p/>
        </draw:connector>
        <draw:connector draw:style-name="gr15" draw:text-style-name="P5" draw:layer="layout" draw:type="line" svg:x1="2.5cm" svg:y1="7.09cm" svg:x2="3.668cm" svg:y2="7.089cm" svg:d="M2500 7090l1168-1" svg:viewBox="0 0 1169 2">
          <text:p/>
        </draw:connector>
        <draw:custom-shape draw:style-name="gr13" draw:text-style-name="P6" xml:id="id13" draw:id="id13"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14" draw:id="id14"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15" draw:id="id15"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4.464cm" svg:x2="4.057cm" svg:y2="5.215cm" draw:start-shape="id13" draw:start-glue-point="8" draw:end-shape="id14" draw:end-glue-point="4" svg:d="M4057 4464v751" svg:viewBox="0 0 1 752">
          <text:p/>
        </draw:connector>
        <draw:connector draw:style-name="gr14" draw:text-style-name="P5" draw:layer="layout" draw:type="line" svg:x1="4.057cm" svg:y1="4.464cm" svg:x2="4.057cm" svg:y2="5.215cm" draw:start-shape="id13" draw:start-glue-point="8" draw:end-shape="id14" draw:end-glue-point="4" svg:d="M4057 4464v751" svg:viewBox="0 0 1 752">
          <text:p/>
        </draw:connector>
        <draw:connector draw:style-name="gr14" draw:text-style-name="P5" draw:layer="layout" svg:x1="6.001cm" svg:y1="4.464cm" svg:x2="6.001cm" svg:y2="5.215cm" svg:d="M6001 4464v751" svg:viewBox="0 0 1 752">
          <text:p/>
        </draw:connector>
        <draw:connector draw:style-name="gr14" draw:text-style-name="P5" draw:layer="layout" draw:type="line" svg:x1="6.001cm" svg:y1="4.464cm" svg:x2="6.001cm" svg:y2="5.215cm" svg:d="M6001 4464v751" svg:viewBox="0 0 1 752">
          <text:p/>
        </draw:connector>
        <draw:connector draw:style-name="gr14" draw:text-style-name="P5" draw:layer="layout" svg:x1="7.946cm" svg:y1="4.464cm" svg:x2="7.946cm" svg:y2="5.215cm" svg:d="M7946 4464v751" svg:viewBox="0 0 1 752">
          <text:p/>
        </draw:connector>
        <draw:connector draw:style-name="gr14" draw:text-style-name="P5" draw:layer="layout" draw:type="line" svg:x1="7.946cm" svg:y1="4.464cm" svg:x2="7.946cm" svg:y2="5.215cm" svg:d="M7946 4464v751" svg:viewBox="0 0 1 752">
          <text:p/>
        </draw:connector>
        <draw:connector draw:style-name="gr15" draw:text-style-name="P5" draw:layer="layout" svg:x1="4.056cm" svg:y1="5.964cm" svg:x2="4.056cm" svg:y2="6.715cm" svg:d="M4056 5964v751" svg:viewBox="0 0 1 752">
          <text:p/>
        </draw:connector>
        <draw:connector draw:style-name="gr15" draw:text-style-name="P5" draw:layer="layout" draw:type="line" svg:x1="4.056cm" svg:y1="5.964cm" svg:x2="4.056cm" svg:y2="6.715cm" svg:d="M4056 5964v751" svg:viewBox="0 0 1 752">
          <text:p/>
        </draw:connector>
        <draw:connector draw:style-name="gr15" draw:text-style-name="P5" draw:layer="layout" svg:x1="4.056cm" svg:y1="5.965cm" svg:x2="4.056cm" svg:y2="6.715cm" svg:d="M4056 5965v750" svg:viewBox="0 0 1 751">
          <text:p/>
        </draw:connector>
        <draw:connector draw:style-name="gr15" draw:text-style-name="P5" draw:layer="layout" draw:type="line" svg:x1="6.001cm" svg:y1="7.464cm" svg:x2="6.001cm" svg:y2="8.215cm" svg:d="M6001 7464v751" svg:viewBox="0 0 1 752">
          <text:p/>
        </draw:connector>
        <draw:connector draw:style-name="gr15" draw:text-style-name="P5" draw:layer="layout" svg:x1="6.001cm" svg:y1="5.964cm" svg:x2="6.001cm" svg:y2="6.715cm" svg:d="M6001 5964v751" svg:viewBox="0 0 1 752">
          <text:p/>
        </draw:connector>
        <draw:connector draw:style-name="gr15" draw:text-style-name="P5" draw:layer="layout" draw:type="line" svg:x1="6.001cm" svg:y1="5.964cm" svg:x2="6.001cm" svg:y2="6.715cm" svg:d="M6001 5964v751" svg:viewBox="0 0 1 752">
          <text:p/>
        </draw:connector>
        <draw:connector draw:style-name="gr15" draw:text-style-name="P5" draw:layer="layout" svg:x1="6.001cm" svg:y1="5.965cm" svg:x2="6.001cm" svg:y2="6.715cm" svg:d="M6001 5965v750" svg:viewBox="0 0 1 751">
          <text:p/>
        </draw:connector>
        <draw:connector draw:style-name="gr15" draw:text-style-name="P5" draw:layer="layout" draw:type="line" svg:x1="6.001cm" svg:y1="5.965cm" svg:x2="6.001cm" svg:y2="6.715cm" svg:d="M6001 5965v750" svg:viewBox="0 0 1 751">
          <text:p/>
        </draw:connector>
        <draw:connector draw:style-name="gr15" draw:text-style-name="P5" draw:layer="layout" svg:x1="7.946cm" svg:y1="5.964cm" svg:x2="7.946cm" svg:y2="6.715cm" svg:d="M7946 5964v751" svg:viewBox="0 0 1 752">
          <text:p/>
        </draw:connector>
        <draw:connector draw:style-name="gr15" draw:text-style-name="P5" draw:layer="layout" draw:type="line" svg:x1="7.946cm" svg:y1="5.964cm" svg:x2="7.946cm" svg:y2="6.715cm" svg:d="M7946 5964v751" svg:viewBox="0 0 1 752">
          <text:p/>
        </draw:connector>
        <draw:connector draw:style-name="gr15" draw:text-style-name="P5" draw:layer="layout" svg:x1="7.946cm" svg:y1="5.965cm" svg:x2="7.946cm" svg:y2="6.715cm" svg:d="M7946 5965v750" svg:viewBox="0 0 1 751">
          <text:p/>
        </draw:connector>
        <draw:connector draw:style-name="gr15" draw:text-style-name="P5" draw:layer="layout" draw:type="line" svg:x1="7.946cm" svg:y1="5.965cm" svg:x2="7.946cm" svg:y2="6.715cm" svg:d="M7946 5965v750" svg:viewBox="0 0 1 751">
          <text:p/>
        </draw:connector>
        <draw:connector draw:style-name="gr15" draw:text-style-name="P5" draw:layer="layout" draw:type="line" svg:x1="4.445cm" svg:y1="5.59cm" svg:x2="5.613cm" svg:y2="5.589cm" draw:start-shape="id14" draw:start-glue-point="10" draw:end-shape="id15" draw:end-glue-point="6" svg:d="M4445 5590l1168-1" svg:viewBox="0 0 1169 2">
          <text:p/>
        </draw:connector>
        <draw:connector draw:style-name="gr15" draw:text-style-name="P5" draw:layer="layout" draw:type="line" svg:x1="4.445cm" svg:y1="5.59cm" svg:x2="5.613cm" svg:y2="5.589cm" draw:start-shape="id14" draw:start-glue-point="10" draw:end-shape="id15" draw:end-glue-point="6" svg:d="M4445 5590l1168-1" svg:viewBox="0 0 1169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4.056cm" svg:y1="7.464cm" svg:x2="4.056cm" svg:y2="8.215cm" svg:d="M4056 7464v751" svg:viewBox="0 0 1 752">
          <text:p/>
        </draw:connector>
        <draw:connector draw:style-name="gr15" draw:text-style-name="P5" draw:layer="layout" draw:type="line" svg:x1="4.056cm" svg:y1="7.465cm" svg:x2="4.056cm" svg:y2="8.215cm" svg:d="M4056 7465v750" svg:viewBox="0 0 1 751">
          <text:p/>
        </draw:connector>
        <draw:connector draw:style-name="gr15" draw:text-style-name="P5" draw:layer="layout" draw:type="line" svg:x1="7.946cm" svg:y1="7.464cm" svg:x2="7.946cm" svg:y2="8.215cm" svg:d="M7946 7464v751" svg:viewBox="0 0 1 75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7.09cm" svg:x2="3.668cm" svg:y2="7.089cm" svg:d="M2500 7090l1168-1" svg:viewBox="0 0 1169 2">
          <text:p/>
        </draw:connector>
        <draw:connector draw:style-name="gr15" draw:text-style-name="P5" draw:layer="layout" draw:type="line" svg:x1="2.5cm" svg:y1="7.09cm" svg:x2="3.668cm" svg:y2="7.089cm" svg:d="M2500 7090l1168-1" svg:viewBox="0 0 1169 2">
          <text:p/>
        </draw:connector>
        <draw:custom-shape draw:style-name="gr13" draw:text-style-name="P6" xml:id="id16" draw:id="id16"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17" draw:id="id17"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18" draw:id="id18"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4.464cm" svg:x2="4.057cm" svg:y2="5.215cm" draw:start-shape="id16" draw:start-glue-point="8" draw:end-shape="id17" draw:end-glue-point="4" svg:d="M4057 4464v751" svg:viewBox="0 0 1 752">
          <text:p/>
        </draw:connector>
        <draw:connector draw:style-name="gr14" draw:text-style-name="P5" draw:layer="layout" draw:type="line" svg:x1="4.057cm" svg:y1="4.464cm" svg:x2="4.057cm" svg:y2="5.215cm" draw:start-shape="id16" draw:start-glue-point="8" draw:end-shape="id17" draw:end-glue-point="4" svg:d="M4057 4464v751" svg:viewBox="0 0 1 752">
          <text:p/>
        </draw:connector>
        <draw:connector draw:style-name="gr14" draw:text-style-name="P5" draw:layer="layout" svg:x1="6.001cm" svg:y1="4.464cm" svg:x2="6.001cm" svg:y2="5.215cm" svg:d="M6001 4464v751" svg:viewBox="0 0 1 752">
          <text:p/>
        </draw:connector>
        <draw:connector draw:style-name="gr14" draw:text-style-name="P5" draw:layer="layout" draw:type="line" svg:x1="6.001cm" svg:y1="4.464cm" svg:x2="6.001cm" svg:y2="5.215cm" svg:d="M6001 4464v751" svg:viewBox="0 0 1 752">
          <text:p/>
        </draw:connector>
        <draw:connector draw:style-name="gr14" draw:text-style-name="P5" draw:layer="layout" svg:x1="7.946cm" svg:y1="4.464cm" svg:x2="7.946cm" svg:y2="5.215cm" svg:d="M7946 4464v751" svg:viewBox="0 0 1 752">
          <text:p/>
        </draw:connector>
        <draw:connector draw:style-name="gr14" draw:text-style-name="P5" draw:layer="layout" draw:type="line" svg:x1="7.946cm" svg:y1="4.464cm" svg:x2="7.946cm" svg:y2="5.215cm" svg:d="M7946 4464v751" svg:viewBox="0 0 1 752">
          <text:p/>
        </draw:connector>
        <draw:connector draw:style-name="gr15" draw:text-style-name="P5" draw:layer="layout" svg:x1="4.056cm" svg:y1="5.964cm" svg:x2="4.056cm" svg:y2="6.715cm" svg:d="M4056 5964v751" svg:viewBox="0 0 1 752">
          <text:p/>
        </draw:connector>
        <draw:connector draw:style-name="gr15" draw:text-style-name="P5" draw:layer="layout" draw:type="line" svg:x1="4.056cm" svg:y1="5.964cm" svg:x2="4.056cm" svg:y2="6.715cm" svg:d="M4056 5964v751" svg:viewBox="0 0 1 752">
          <text:p/>
        </draw:connector>
        <draw:connector draw:style-name="gr15" draw:text-style-name="P5" draw:layer="layout" svg:x1="4.056cm" svg:y1="5.965cm" svg:x2="4.056cm" svg:y2="6.715cm" svg:d="M4056 5965v750" svg:viewBox="0 0 1 751">
          <text:p/>
        </draw:connector>
        <draw:connector draw:style-name="gr15" draw:text-style-name="P5" draw:layer="layout" draw:type="line" svg:x1="6.001cm" svg:y1="7.464cm" svg:x2="6.001cm" svg:y2="8.215cm" svg:d="M6001 7464v751" svg:viewBox="0 0 1 752">
          <text:p/>
        </draw:connector>
        <draw:connector draw:style-name="gr15" draw:text-style-name="P5" draw:layer="layout" svg:x1="6.001cm" svg:y1="5.964cm" svg:x2="6.001cm" svg:y2="6.715cm" svg:d="M6001 5964v751" svg:viewBox="0 0 1 752">
          <text:p/>
        </draw:connector>
        <draw:connector draw:style-name="gr15" draw:text-style-name="P5" draw:layer="layout" draw:type="line" svg:x1="6.001cm" svg:y1="5.964cm" svg:x2="6.001cm" svg:y2="6.715cm" svg:d="M6001 5964v751" svg:viewBox="0 0 1 752">
          <text:p/>
        </draw:connector>
        <draw:connector draw:style-name="gr15" draw:text-style-name="P5" draw:layer="layout" svg:x1="6.001cm" svg:y1="5.965cm" svg:x2="6.001cm" svg:y2="6.715cm" svg:d="M6001 5965v750" svg:viewBox="0 0 1 751">
          <text:p/>
        </draw:connector>
        <draw:connector draw:style-name="gr15" draw:text-style-name="P5" draw:layer="layout" draw:type="line" svg:x1="6.001cm" svg:y1="5.965cm" svg:x2="6.001cm" svg:y2="6.715cm" svg:d="M6001 5965v750" svg:viewBox="0 0 1 751">
          <text:p/>
        </draw:connector>
        <draw:connector draw:style-name="gr15" draw:text-style-name="P5" draw:layer="layout" svg:x1="7.946cm" svg:y1="5.964cm" svg:x2="7.946cm" svg:y2="6.715cm" svg:d="M7946 5964v751" svg:viewBox="0 0 1 752">
          <text:p/>
        </draw:connector>
        <draw:connector draw:style-name="gr15" draw:text-style-name="P5" draw:layer="layout" draw:type="line" svg:x1="7.946cm" svg:y1="5.964cm" svg:x2="7.946cm" svg:y2="6.715cm" svg:d="M7946 5964v751" svg:viewBox="0 0 1 752">
          <text:p/>
        </draw:connector>
        <draw:connector draw:style-name="gr15" draw:text-style-name="P5" draw:layer="layout" svg:x1="7.946cm" svg:y1="5.965cm" svg:x2="7.946cm" svg:y2="6.715cm" svg:d="M7946 5965v750" svg:viewBox="0 0 1 751">
          <text:p/>
        </draw:connector>
        <draw:connector draw:style-name="gr15" draw:text-style-name="P5" draw:layer="layout" draw:type="line" svg:x1="7.946cm" svg:y1="5.965cm" svg:x2="7.946cm" svg:y2="6.715cm" svg:d="M7946 5965v750" svg:viewBox="0 0 1 751">
          <text:p/>
        </draw:connector>
        <draw:connector draw:style-name="gr15" draw:text-style-name="P5" draw:layer="layout" draw:type="line" svg:x1="4.445cm" svg:y1="5.59cm" svg:x2="5.613cm" svg:y2="5.589cm" draw:start-shape="id17" draw:start-glue-point="10" draw:end-shape="id18" draw:end-glue-point="6" svg:d="M4445 5590l1168-1" svg:viewBox="0 0 1169 2">
          <text:p/>
        </draw:connector>
        <draw:connector draw:style-name="gr15" draw:text-style-name="P5" draw:layer="layout" draw:type="line" svg:x1="4.445cm" svg:y1="5.59cm" svg:x2="5.613cm" svg:y2="5.589cm" draw:start-shape="id17" draw:start-glue-point="10" draw:end-shape="id18" draw:end-glue-point="6" svg:d="M4445 5590l1168-1" svg:viewBox="0 0 1169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4.056cm" svg:y1="7.464cm" svg:x2="4.056cm" svg:y2="8.215cm" svg:d="M4056 7464v751" svg:viewBox="0 0 1 752">
          <text:p/>
        </draw:connector>
        <draw:connector draw:style-name="gr15" draw:text-style-name="P5" draw:layer="layout" draw:type="line" svg:x1="4.056cm" svg:y1="7.465cm" svg:x2="4.056cm" svg:y2="8.215cm" svg:d="M4056 7465v750" svg:viewBox="0 0 1 751">
          <text:p/>
        </draw:connector>
        <draw:connector draw:style-name="gr15" draw:text-style-name="P5" draw:layer="layout" draw:type="line" svg:x1="7.946cm" svg:y1="7.464cm" svg:x2="7.946cm" svg:y2="8.215cm" svg:d="M7946 7464v751" svg:viewBox="0 0 1 75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7.09cm" svg:x2="3.668cm" svg:y2="7.089cm" svg:d="M2500 7090l1168-1" svg:viewBox="0 0 1169 2">
          <text:p/>
        </draw:connector>
        <draw:connector draw:style-name="gr15" draw:text-style-name="P5" draw:layer="layout" draw:type="line" svg:x1="2.5cm" svg:y1="7.09cm" svg:x2="3.668cm" svg:y2="7.089cm" svg:d="M2500 7090l1168-1" svg:viewBox="0 0 1169 2">
          <text:p/>
        </draw:connector>
        <draw:custom-shape draw:style-name="gr13" draw:text-style-name="P6" xml:id="id19" draw:id="id19"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20" draw:id="id20"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21" draw:id="id21"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4.464cm" svg:x2="4.057cm" svg:y2="5.215cm" draw:start-shape="id19" draw:start-glue-point="8" draw:end-shape="id20" draw:end-glue-point="4" svg:d="M4057 4464v751" svg:viewBox="0 0 1 752">
          <text:p/>
        </draw:connector>
        <draw:connector draw:style-name="gr14" draw:text-style-name="P5" draw:layer="layout" draw:type="line" svg:x1="4.057cm" svg:y1="4.464cm" svg:x2="4.057cm" svg:y2="5.215cm" draw:start-shape="id19" draw:start-glue-point="8" draw:end-shape="id20" draw:end-glue-point="4" svg:d="M4057 4464v751" svg:viewBox="0 0 1 752">
          <text:p/>
        </draw:connector>
        <draw:connector draw:style-name="gr14" draw:text-style-name="P5" draw:layer="layout" svg:x1="6.001cm" svg:y1="4.464cm" svg:x2="6.001cm" svg:y2="5.215cm" svg:d="M6001 4464v751" svg:viewBox="0 0 1 752">
          <text:p/>
        </draw:connector>
        <draw:connector draw:style-name="gr14" draw:text-style-name="P5" draw:layer="layout" draw:type="line" svg:x1="6.001cm" svg:y1="4.464cm" svg:x2="6.001cm" svg:y2="5.215cm" svg:d="M6001 4464v751" svg:viewBox="0 0 1 752">
          <text:p/>
        </draw:connector>
        <draw:connector draw:style-name="gr14" draw:text-style-name="P5" draw:layer="layout" svg:x1="7.946cm" svg:y1="4.464cm" svg:x2="7.946cm" svg:y2="5.215cm" svg:d="M7946 4464v751" svg:viewBox="0 0 1 752">
          <text:p/>
        </draw:connector>
        <draw:connector draw:style-name="gr14" draw:text-style-name="P5" draw:layer="layout" draw:type="line" svg:x1="7.946cm" svg:y1="4.464cm" svg:x2="7.946cm" svg:y2="5.215cm" svg:d="M7946 4464v751" svg:viewBox="0 0 1 752">
          <text:p/>
        </draw:connector>
        <draw:connector draw:style-name="gr15" draw:text-style-name="P5" draw:layer="layout" svg:x1="4.056cm" svg:y1="5.964cm" svg:x2="4.056cm" svg:y2="6.715cm" svg:d="M4056 5964v751" svg:viewBox="0 0 1 752">
          <text:p/>
        </draw:connector>
        <draw:connector draw:style-name="gr15" draw:text-style-name="P5" draw:layer="layout" draw:type="line" svg:x1="4.056cm" svg:y1="5.964cm" svg:x2="4.056cm" svg:y2="6.715cm" svg:d="M4056 5964v751" svg:viewBox="0 0 1 752">
          <text:p/>
        </draw:connector>
        <draw:connector draw:style-name="gr15" draw:text-style-name="P5" draw:layer="layout" svg:x1="4.056cm" svg:y1="5.965cm" svg:x2="4.056cm" svg:y2="6.715cm" svg:d="M4056 5965v750" svg:viewBox="0 0 1 751">
          <text:p/>
        </draw:connector>
        <draw:connector draw:style-name="gr15" draw:text-style-name="P5" draw:layer="layout" draw:type="line" svg:x1="6.001cm" svg:y1="7.464cm" svg:x2="6.001cm" svg:y2="8.215cm" svg:d="M6001 7464v751" svg:viewBox="0 0 1 752">
          <text:p/>
        </draw:connector>
        <draw:connector draw:style-name="gr15" draw:text-style-name="P5" draw:layer="layout" svg:x1="6.001cm" svg:y1="5.964cm" svg:x2="6.001cm" svg:y2="6.715cm" svg:d="M6001 5964v751" svg:viewBox="0 0 1 752">
          <text:p/>
        </draw:connector>
        <draw:connector draw:style-name="gr15" draw:text-style-name="P5" draw:layer="layout" draw:type="line" svg:x1="6.001cm" svg:y1="5.964cm" svg:x2="6.001cm" svg:y2="6.715cm" svg:d="M6001 5964v751" svg:viewBox="0 0 1 752">
          <text:p/>
        </draw:connector>
        <draw:connector draw:style-name="gr15" draw:text-style-name="P5" draw:layer="layout" svg:x1="6.001cm" svg:y1="5.965cm" svg:x2="6.001cm" svg:y2="6.715cm" svg:d="M6001 5965v750" svg:viewBox="0 0 1 751">
          <text:p/>
        </draw:connector>
        <draw:connector draw:style-name="gr15" draw:text-style-name="P5" draw:layer="layout" draw:type="line" svg:x1="6.001cm" svg:y1="5.965cm" svg:x2="6.001cm" svg:y2="6.715cm" svg:d="M6001 5965v750" svg:viewBox="0 0 1 751">
          <text:p/>
        </draw:connector>
        <draw:connector draw:style-name="gr15" draw:text-style-name="P5" draw:layer="layout" svg:x1="7.946cm" svg:y1="5.964cm" svg:x2="7.946cm" svg:y2="6.715cm" svg:d="M7946 5964v751" svg:viewBox="0 0 1 752">
          <text:p/>
        </draw:connector>
        <draw:connector draw:style-name="gr15" draw:text-style-name="P5" draw:layer="layout" draw:type="line" svg:x1="7.946cm" svg:y1="5.964cm" svg:x2="7.946cm" svg:y2="6.715cm" svg:d="M7946 5964v751" svg:viewBox="0 0 1 752">
          <text:p/>
        </draw:connector>
        <draw:connector draw:style-name="gr15" draw:text-style-name="P5" draw:layer="layout" svg:x1="7.946cm" svg:y1="5.965cm" svg:x2="7.946cm" svg:y2="6.715cm" svg:d="M7946 5965v750" svg:viewBox="0 0 1 751">
          <text:p/>
        </draw:connector>
        <draw:connector draw:style-name="gr15" draw:text-style-name="P5" draw:layer="layout" draw:type="line" svg:x1="7.946cm" svg:y1="5.965cm" svg:x2="7.946cm" svg:y2="6.715cm" svg:d="M7946 5965v750" svg:viewBox="0 0 1 751">
          <text:p/>
        </draw:connector>
        <draw:connector draw:style-name="gr15" draw:text-style-name="P5" draw:layer="layout" draw:type="line" svg:x1="4.445cm" svg:y1="5.59cm" svg:x2="5.613cm" svg:y2="5.589cm" draw:start-shape="id20" draw:start-glue-point="10" draw:end-shape="id21" draw:end-glue-point="6" svg:d="M4445 5590l1168-1" svg:viewBox="0 0 1169 2">
          <text:p/>
        </draw:connector>
        <draw:connector draw:style-name="gr15" draw:text-style-name="P5" draw:layer="layout" draw:type="line" svg:x1="4.445cm" svg:y1="5.59cm" svg:x2="5.613cm" svg:y2="5.589cm" draw:start-shape="id20" draw:start-glue-point="10" draw:end-shape="id21" draw:end-glue-point="6" svg:d="M4445 5590l1168-1" svg:viewBox="0 0 1169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4.056cm" svg:y1="7.464cm" svg:x2="4.056cm" svg:y2="8.215cm" svg:d="M4056 7464v751" svg:viewBox="0 0 1 752">
          <text:p/>
        </draw:connector>
        <draw:connector draw:style-name="gr15" draw:text-style-name="P5" draw:layer="layout" draw:type="line" svg:x1="4.056cm" svg:y1="7.465cm" svg:x2="4.056cm" svg:y2="8.215cm" svg:d="M4056 7465v750" svg:viewBox="0 0 1 751">
          <text:p/>
        </draw:connector>
        <draw:connector draw:style-name="gr15" draw:text-style-name="P5" draw:layer="layout" draw:type="line" svg:x1="7.946cm" svg:y1="7.464cm" svg:x2="7.946cm" svg:y2="8.215cm" svg:d="M7946 7464v751" svg:viewBox="0 0 1 75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7.09cm" svg:x2="3.668cm" svg:y2="7.089cm" svg:d="M2500 7090l1168-1" svg:viewBox="0 0 1169 2">
          <text:p/>
        </draw:connector>
        <draw:connector draw:style-name="gr15" draw:text-style-name="P5" draw:layer="layout" draw:type="line" svg:x1="2.5cm" svg:y1="7.09cm" svg:x2="3.668cm" svg:y2="7.089cm" svg:d="M2500 7090l1168-1" svg:viewBox="0 0 1169 2">
          <text:p/>
        </draw:connector>
        <draw:custom-shape draw:style-name="gr13" draw:text-style-name="P6" xml:id="id22" draw:id="id22" draw:layer="layout" svg:width="0.777cm" svg:height="0.749cm" svg:x="3.668cm" svg:y="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23" draw:id="id23" draw:layer="layout" svg:width="0.777cm" svg:height="0.749cm" svg:x="3.668cm" svg:y="5.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24" draw:id="id24" draw:layer="layout" svg:width="0.777cm" svg:height="0.749cm" svg:x="5.613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3.668cm" svg:y="6.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3.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7.557cm" svg:y="6.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4.057cm" svg:y1="4.464cm" svg:x2="4.057cm" svg:y2="5.215cm" draw:start-shape="id22" draw:start-glue-point="8" draw:end-shape="id23" draw:end-glue-point="4" svg:d="M4057 4464v751" svg:viewBox="0 0 1 752">
          <text:p/>
        </draw:connector>
        <draw:connector draw:style-name="gr14" draw:text-style-name="P5" draw:layer="layout" draw:type="line" svg:x1="4.057cm" svg:y1="4.464cm" svg:x2="4.057cm" svg:y2="5.215cm" draw:start-shape="id22" draw:start-glue-point="8" draw:end-shape="id23" draw:end-glue-point="4" svg:d="M4057 4464v751" svg:viewBox="0 0 1 752">
          <text:p/>
        </draw:connector>
        <draw:connector draw:style-name="gr14" draw:text-style-name="P5" draw:layer="layout" svg:x1="6.001cm" svg:y1="4.464cm" svg:x2="6.001cm" svg:y2="5.215cm" svg:d="M6001 4464v751" svg:viewBox="0 0 1 752">
          <text:p/>
        </draw:connector>
        <draw:connector draw:style-name="gr14" draw:text-style-name="P5" draw:layer="layout" draw:type="line" svg:x1="6.001cm" svg:y1="4.464cm" svg:x2="6.001cm" svg:y2="5.215cm" svg:d="M6001 4464v751" svg:viewBox="0 0 1 752">
          <text:p/>
        </draw:connector>
        <draw:connector draw:style-name="gr14" draw:text-style-name="P5" draw:layer="layout" svg:x1="7.946cm" svg:y1="4.464cm" svg:x2="7.946cm" svg:y2="5.215cm" svg:d="M7946 4464v751" svg:viewBox="0 0 1 752">
          <text:p/>
        </draw:connector>
        <draw:connector draw:style-name="gr14" draw:text-style-name="P5" draw:layer="layout" draw:type="line" svg:x1="7.946cm" svg:y1="4.464cm" svg:x2="7.946cm" svg:y2="5.215cm" svg:d="M7946 4464v751" svg:viewBox="0 0 1 752">
          <text:p/>
        </draw:connector>
        <draw:connector draw:style-name="gr15" draw:text-style-name="P5" draw:layer="layout" svg:x1="4.056cm" svg:y1="5.964cm" svg:x2="4.056cm" svg:y2="6.715cm" svg:d="M4056 5964v751" svg:viewBox="0 0 1 752">
          <text:p/>
        </draw:connector>
        <draw:connector draw:style-name="gr15" draw:text-style-name="P5" draw:layer="layout" draw:type="line" svg:x1="4.056cm" svg:y1="5.964cm" svg:x2="4.056cm" svg:y2="6.715cm" svg:d="M4056 5964v751" svg:viewBox="0 0 1 752">
          <text:p/>
        </draw:connector>
        <draw:connector draw:style-name="gr15" draw:text-style-name="P5" draw:layer="layout" svg:x1="4.056cm" svg:y1="5.965cm" svg:x2="4.056cm" svg:y2="6.715cm" svg:d="M4056 5965v750" svg:viewBox="0 0 1 751">
          <text:p/>
        </draw:connector>
        <draw:connector draw:style-name="gr15" draw:text-style-name="P5" draw:layer="layout" draw:type="line" svg:x1="6.001cm" svg:y1="7.464cm" svg:x2="6.001cm" svg:y2="8.215cm" svg:d="M6001 7464v751" svg:viewBox="0 0 1 752">
          <text:p/>
        </draw:connector>
        <draw:connector draw:style-name="gr15" draw:text-style-name="P5" draw:layer="layout" svg:x1="6.001cm" svg:y1="5.964cm" svg:x2="6.001cm" svg:y2="6.715cm" svg:d="M6001 5964v751" svg:viewBox="0 0 1 752">
          <text:p/>
        </draw:connector>
        <draw:connector draw:style-name="gr15" draw:text-style-name="P5" draw:layer="layout" draw:type="line" svg:x1="6.001cm" svg:y1="5.964cm" svg:x2="6.001cm" svg:y2="6.715cm" svg:d="M6001 5964v751" svg:viewBox="0 0 1 752">
          <text:p/>
        </draw:connector>
        <draw:connector draw:style-name="gr15" draw:text-style-name="P5" draw:layer="layout" svg:x1="6.001cm" svg:y1="5.965cm" svg:x2="6.001cm" svg:y2="6.715cm" svg:d="M6001 5965v750" svg:viewBox="0 0 1 751">
          <text:p/>
        </draw:connector>
        <draw:connector draw:style-name="gr15" draw:text-style-name="P5" draw:layer="layout" draw:type="line" svg:x1="6.001cm" svg:y1="5.965cm" svg:x2="6.001cm" svg:y2="6.715cm" svg:d="M6001 5965v750" svg:viewBox="0 0 1 751">
          <text:p/>
        </draw:connector>
        <draw:connector draw:style-name="gr15" draw:text-style-name="P5" draw:layer="layout" svg:x1="7.946cm" svg:y1="5.964cm" svg:x2="7.946cm" svg:y2="6.715cm" svg:d="M7946 5964v751" svg:viewBox="0 0 1 752">
          <text:p/>
        </draw:connector>
        <draw:connector draw:style-name="gr15" draw:text-style-name="P5" draw:layer="layout" draw:type="line" svg:x1="7.946cm" svg:y1="5.964cm" svg:x2="7.946cm" svg:y2="6.715cm" svg:d="M7946 5964v751" svg:viewBox="0 0 1 752">
          <text:p/>
        </draw:connector>
        <draw:connector draw:style-name="gr15" draw:text-style-name="P5" draw:layer="layout" svg:x1="7.946cm" svg:y1="5.965cm" svg:x2="7.946cm" svg:y2="6.715cm" svg:d="M7946 5965v750" svg:viewBox="0 0 1 751">
          <text:p/>
        </draw:connector>
        <draw:connector draw:style-name="gr15" draw:text-style-name="P5" draw:layer="layout" draw:type="line" svg:x1="7.946cm" svg:y1="5.965cm" svg:x2="7.946cm" svg:y2="6.715cm" svg:d="M7946 5965v750" svg:viewBox="0 0 1 751">
          <text:p/>
        </draw:connector>
        <draw:connector draw:style-name="gr15" draw:text-style-name="P5" draw:layer="layout" draw:type="line" svg:x1="4.445cm" svg:y1="5.59cm" svg:x2="5.613cm" svg:y2="5.589cm" draw:start-shape="id23" draw:start-glue-point="10" draw:end-shape="id24" draw:end-glue-point="6" svg:d="M4445 5590l1168-1" svg:viewBox="0 0 1169 2">
          <text:p/>
        </draw:connector>
        <draw:connector draw:style-name="gr15" draw:text-style-name="P5" draw:layer="layout" draw:type="line" svg:x1="4.445cm" svg:y1="5.59cm" svg:x2="5.613cm" svg:y2="5.589cm" draw:start-shape="id23" draw:start-glue-point="10" draw:end-shape="id24" draw:end-glue-point="6" svg:d="M4445 5590l1168-1" svg:viewBox="0 0 1169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6.39cm" svg:y1="5.59cm" svg:x2="7.557cm" svg:y2="5.589cm" svg:d="M6390 5590l1167-1" svg:viewBox="0 0 1168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4.445cm" svg:y1="7.09cm" svg:x2="5.613cm" svg:y2="7.089cm" svg:d="M4445 7090l1168-1" svg:viewBox="0 0 1169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6.39cm" svg:y1="7.089cm" svg:x2="7.557cm" svg:y2="7.088cm" svg:d="M6390 7089l1167-1" svg:viewBox="0 0 1168 2">
          <text:p/>
        </draw:connector>
        <draw:connector draw:style-name="gr15" draw:text-style-name="P5" draw:layer="layout" draw:type="line" svg:x1="4.056cm" svg:y1="7.464cm" svg:x2="4.056cm" svg:y2="8.215cm" svg:d="M4056 7464v751" svg:viewBox="0 0 1 752">
          <text:p/>
        </draw:connector>
        <draw:connector draw:style-name="gr15" draw:text-style-name="P5" draw:layer="layout" draw:type="line" svg:x1="4.057cm" svg:y1="7.465cm" svg:x2="4.057cm" svg:y2="8.216cm" svg:d="M4057 7465v751" svg:viewBox="0 0 1 752">
          <text:p/>
        </draw:connector>
        <draw:connector draw:style-name="gr15" draw:text-style-name="P5" draw:layer="layout" draw:type="line" svg:x1="7.946cm" svg:y1="7.464cm" svg:x2="7.946cm" svg:y2="8.215cm" svg:d="M7946 7464v751" svg:viewBox="0 0 1 75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7.09cm" svg:x2="9.502cm" svg:y2="7.089cm" svg:d="M8334 7090l1168-1" svg:viewBox="0 0 1169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8.334cm" svg:y1="5.59cm" svg:x2="9.501cm" svg:y2="5.589cm" svg:d="M8334 5590l1167-1" svg:viewBox="0 0 1168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5.59cm" svg:x2="3.668cm" svg:y2="5.589cm" svg:d="M2500 5590l1168-1" svg:viewBox="0 0 1169 2">
          <text:p/>
        </draw:connector>
        <draw:connector draw:style-name="gr15" draw:text-style-name="P5" draw:layer="layout" draw:type="line" svg:x1="2.5cm" svg:y1="7.09cm" svg:x2="3.668cm" svg:y2="7.089cm" svg:d="M2500 7090l1168-1" svg:viewBox="0 0 1169 2">
          <text:p/>
        </draw:connector>
        <draw:connector draw:style-name="gr15" draw:text-style-name="P5" draw:layer="layout" draw:type="line" svg:x1="2.5cm" svg:y1="7.09cm" svg:x2="3.668cm" svg:y2="7.089cm" svg:d="M2500 7090l1168-1" svg:viewBox="0 0 1169 2">
          <text:p/>
        </draw:connector>
        <draw:custom-shape draw:style-name="gr16"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xml:id="id25" draw:id="id25"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26" draw:id="id26"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4.057cm" svg:y1="13.218cm" svg:x2="4.057cm" svg:y2="13.969cm" svg:d="M4057 13218v751" svg:viewBox="0 0 1 752">
          <text:p/>
        </draw:connector>
        <draw:connector draw:style-name="gr15" draw:text-style-name="P5" draw:layer="layout" draw:type="line" svg:x1="4.057cm" svg:y1="13.218cm" svg:x2="4.057cm" svg:y2="13.969cm" svg:d="M4057 13218v751" svg:viewBox="0 0 1 752">
          <text:p/>
        </draw:connector>
        <draw:connector draw:style-name="gr15" draw:text-style-name="P5" draw:layer="layout" svg:x1="4.057cm" svg:y1="13.219cm" svg:x2="4.057cm" svg:y2="13.969cm" svg:d="M4057 13219v750" svg:viewBox="0 0 1 751">
          <text:p/>
        </draw:connector>
        <draw:connector draw:style-name="gr15" draw:text-style-name="P5" draw:layer="layout" draw:type="line" svg:x1="6.002cm" svg:y1="11.716cm" svg:x2="6.002cm" svg:y2="12.467cm" svg:d="M6002 11716v751" svg:viewBox="0 0 1 752">
          <text:p/>
        </draw:connector>
        <draw:connector draw:style-name="gr15" draw:text-style-name="P5" draw:layer="layout" svg:x1="6.001cm" svg:y1="13.218cm" svg:x2="6.001cm" svg:y2="13.969cm" svg:d="M6001 13218v751" svg:viewBox="0 0 1 752">
          <text:p/>
        </draw:connector>
        <draw:connector draw:style-name="gr15" draw:text-style-name="P5" draw:layer="layout" draw:type="line" svg:x1="6.001cm" svg:y1="13.218cm" svg:x2="6.001cm" svg:y2="13.969cm" svg:d="M6001 13218v751" svg:viewBox="0 0 1 752">
          <text:p/>
        </draw:connector>
        <draw:connector draw:style-name="gr15" draw:text-style-name="P5" draw:layer="layout" svg:x1="6.001cm" svg:y1="13.219cm" svg:x2="6.001cm" svg:y2="13.969cm" svg:d="M6001 13219v750" svg:viewBox="0 0 1 751">
          <text:p/>
        </draw:connector>
        <draw:connector draw:style-name="gr15" draw:text-style-name="P5" draw:layer="layout" draw:type="line" svg:x1="6.001cm" svg:y1="13.219cm" svg:x2="6.001cm" svg:y2="13.969cm" svg:d="M6001 13219v750" svg:viewBox="0 0 1 751">
          <text:p/>
        </draw:connector>
        <draw:connector draw:style-name="gr15" draw:text-style-name="P5" draw:layer="layout" svg:x1="7.945cm" svg:y1="13.218cm" svg:x2="7.945cm" svg:y2="13.969cm" svg:d="M7945 13218v751" svg:viewBox="0 0 1 752">
          <text:p/>
        </draw:connector>
        <draw:connector draw:style-name="gr15" draw:text-style-name="P5" draw:layer="layout" draw:type="line" svg:x1="7.945cm" svg:y1="13.218cm" svg:x2="7.945cm" svg:y2="13.969cm" svg:d="M7945 13218v751" svg:viewBox="0 0 1 752">
          <text:p/>
        </draw:connector>
        <draw:connector draw:style-name="gr15" draw:text-style-name="P5" draw:layer="layout" svg:x1="7.945cm" svg:y1="13.219cm" svg:x2="7.945cm" svg:y2="13.969cm" svg:d="M7945 13219v750" svg:viewBox="0 0 1 751">
          <text:p/>
        </draw:connector>
        <draw:connector draw:style-name="gr15" draw:text-style-name="P5" draw:layer="layout" draw:type="line" svg:x1="7.945cm" svg:y1="13.219cm" svg:x2="7.945cm" svg:y2="13.969cm" svg:d="M7945 13219v750" svg:viewBox="0 0 1 751">
          <text:p/>
        </draw:connector>
        <draw:connector draw:style-name="gr15" draw:text-style-name="P5" draw:layer="layout" draw:type="line" svg:x1="4.445cm" svg:y1="12.844cm" svg:x2="5.613cm" svg:y2="12.843cm" draw:start-shape="id25" draw:start-glue-point="10" draw:end-shape="id26" draw:end-glue-point="6" svg:d="M4445 12844l1168-1" svg:viewBox="0 0 1169 2">
          <text:p/>
        </draw:connector>
        <draw:connector draw:style-name="gr15" draw:text-style-name="P5" draw:layer="layout" draw:type="line" svg:x1="4.445cm" svg:y1="12.844cm" svg:x2="5.613cm" svg:y2="12.843cm" draw:start-shape="id25" draw:start-glue-point="10" draw:end-shape="id26" draw:end-glue-point="6" svg:d="M4445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4.057cm" svg:y1="11.716cm" svg:x2="4.057cm" svg:y2="12.467cm" svg:d="M4057 11716v751" svg:viewBox="0 0 1 752">
          <text:p/>
        </draw:connector>
        <draw:connector draw:style-name="gr15" draw:text-style-name="P5" draw:layer="layout" draw:type="line" svg:x1="4.057cm" svg:y1="11.717cm" svg:x2="4.057cm" svg:y2="12.468cm" svg:d="M4057 11717v751" svg:viewBox="0 0 1 752">
          <text:p/>
        </draw:connector>
        <draw:connector draw:style-name="gr15" draw:text-style-name="P5" draw:layer="layout" draw:type="line" svg:x1="7.946cm" svg:y1="11.716cm" svg:x2="7.946cm" svg:y2="12.467cm" svg:d="M7946 11716v751" svg:viewBox="0 0 1 75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01cm" svg:y1="11.37cm" svg:x2="3.669cm" svg:y2="11.37cm" svg:d="M2501 11370h1168" svg:viewBox="0 0 1169 1">
          <text:p/>
        </draw:connector>
        <draw:connector draw:style-name="gr15" draw:text-style-name="P5" draw:layer="layout" draw:type="line" svg:x1="2.501cm" svg:y1="11.37cm" svg:x2="3.669cm" svg:y2="11.37cm" svg:d="M2501 11370h1168" svg:viewBox="0 0 1169 1">
          <text:p/>
        </draw:connector>
        <draw:custom-shape draw:style-name="gr16"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xml:id="id27" draw:id="id27"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28" draw:id="id28"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4.057cm" svg:y1="13.218cm" svg:x2="4.057cm" svg:y2="13.969cm" svg:d="M4057 13218v751" svg:viewBox="0 0 1 752">
          <text:p/>
        </draw:connector>
        <draw:connector draw:style-name="gr15" draw:text-style-name="P5" draw:layer="layout" draw:type="line" svg:x1="4.057cm" svg:y1="13.218cm" svg:x2="4.057cm" svg:y2="13.969cm" svg:d="M4057 13218v751" svg:viewBox="0 0 1 752">
          <text:p/>
        </draw:connector>
        <draw:connector draw:style-name="gr15" draw:text-style-name="P5" draw:layer="layout" svg:x1="4.057cm" svg:y1="13.219cm" svg:x2="4.057cm" svg:y2="13.969cm" svg:d="M4057 13219v750" svg:viewBox="0 0 1 751">
          <text:p/>
        </draw:connector>
        <draw:connector draw:style-name="gr15" draw:text-style-name="P5" draw:layer="layout" draw:type="line" svg:x1="6.002cm" svg:y1="11.716cm" svg:x2="6.002cm" svg:y2="12.467cm" svg:d="M6002 11716v751" svg:viewBox="0 0 1 752">
          <text:p/>
        </draw:connector>
        <draw:connector draw:style-name="gr15" draw:text-style-name="P5" draw:layer="layout" svg:x1="6.001cm" svg:y1="13.218cm" svg:x2="6.001cm" svg:y2="13.969cm" svg:d="M6001 13218v751" svg:viewBox="0 0 1 752">
          <text:p/>
        </draw:connector>
        <draw:connector draw:style-name="gr15" draw:text-style-name="P5" draw:layer="layout" draw:type="line" svg:x1="6.001cm" svg:y1="13.218cm" svg:x2="6.001cm" svg:y2="13.969cm" svg:d="M6001 13218v751" svg:viewBox="0 0 1 752">
          <text:p/>
        </draw:connector>
        <draw:connector draw:style-name="gr15" draw:text-style-name="P5" draw:layer="layout" svg:x1="6.001cm" svg:y1="13.219cm" svg:x2="6.001cm" svg:y2="13.969cm" svg:d="M6001 13219v750" svg:viewBox="0 0 1 751">
          <text:p/>
        </draw:connector>
        <draw:connector draw:style-name="gr15" draw:text-style-name="P5" draw:layer="layout" draw:type="line" svg:x1="6.001cm" svg:y1="13.219cm" svg:x2="6.001cm" svg:y2="13.969cm" svg:d="M6001 13219v750" svg:viewBox="0 0 1 751">
          <text:p/>
        </draw:connector>
        <draw:connector draw:style-name="gr15" draw:text-style-name="P5" draw:layer="layout" svg:x1="7.945cm" svg:y1="13.218cm" svg:x2="7.945cm" svg:y2="13.969cm" svg:d="M7945 13218v751" svg:viewBox="0 0 1 752">
          <text:p/>
        </draw:connector>
        <draw:connector draw:style-name="gr15" draw:text-style-name="P5" draw:layer="layout" draw:type="line" svg:x1="7.945cm" svg:y1="13.218cm" svg:x2="7.945cm" svg:y2="13.969cm" svg:d="M7945 13218v751" svg:viewBox="0 0 1 752">
          <text:p/>
        </draw:connector>
        <draw:connector draw:style-name="gr15" draw:text-style-name="P5" draw:layer="layout" svg:x1="7.945cm" svg:y1="13.219cm" svg:x2="7.945cm" svg:y2="13.969cm" svg:d="M7945 13219v750" svg:viewBox="0 0 1 751">
          <text:p/>
        </draw:connector>
        <draw:connector draw:style-name="gr15" draw:text-style-name="P5" draw:layer="layout" draw:type="line" svg:x1="7.945cm" svg:y1="13.219cm" svg:x2="7.945cm" svg:y2="13.969cm" svg:d="M7945 13219v750" svg:viewBox="0 0 1 751">
          <text:p/>
        </draw:connector>
        <draw:connector draw:style-name="gr15" draw:text-style-name="P5" draw:layer="layout" draw:type="line" svg:x1="4.445cm" svg:y1="12.844cm" svg:x2="5.613cm" svg:y2="12.843cm" draw:start-shape="id27" draw:start-glue-point="10" draw:end-shape="id28" draw:end-glue-point="6" svg:d="M4445 12844l1168-1" svg:viewBox="0 0 1169 2">
          <text:p/>
        </draw:connector>
        <draw:connector draw:style-name="gr15" draw:text-style-name="P5" draw:layer="layout" draw:type="line" svg:x1="4.445cm" svg:y1="12.844cm" svg:x2="5.613cm" svg:y2="12.843cm" draw:start-shape="id27" draw:start-glue-point="10" draw:end-shape="id28" draw:end-glue-point="6" svg:d="M4445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4.057cm" svg:y1="11.716cm" svg:x2="4.057cm" svg:y2="12.467cm" svg:d="M4057 11716v751" svg:viewBox="0 0 1 752">
          <text:p/>
        </draw:connector>
        <draw:connector draw:style-name="gr15" draw:text-style-name="P5" draw:layer="layout" draw:type="line" svg:x1="4.057cm" svg:y1="11.717cm" svg:x2="4.057cm" svg:y2="12.468cm" svg:d="M4057 11717v751" svg:viewBox="0 0 1 752">
          <text:p/>
        </draw:connector>
        <draw:connector draw:style-name="gr15" draw:text-style-name="P5" draw:layer="layout" draw:type="line" svg:x1="7.946cm" svg:y1="11.716cm" svg:x2="7.946cm" svg:y2="12.467cm" svg:d="M7946 11716v751" svg:viewBox="0 0 1 75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01cm" svg:y1="11.37cm" svg:x2="3.669cm" svg:y2="11.37cm" svg:d="M2501 11370h1168" svg:viewBox="0 0 1169 1">
          <text:p/>
        </draw:connector>
        <draw:connector draw:style-name="gr15" draw:text-style-name="P5" draw:layer="layout" draw:type="line" svg:x1="2.501cm" svg:y1="11.37cm" svg:x2="3.669cm" svg:y2="11.37cm" svg:d="M2501 11370h1168" svg:viewBox="0 0 1169 1">
          <text:p/>
        </draw:connector>
        <draw:custom-shape draw:style-name="gr16"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xml:id="id29" draw:id="id29"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30" draw:id="id30"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4.057cm" svg:y1="13.218cm" svg:x2="4.057cm" svg:y2="13.969cm" svg:d="M4057 13218v751" svg:viewBox="0 0 1 752">
          <text:p/>
        </draw:connector>
        <draw:connector draw:style-name="gr15" draw:text-style-name="P5" draw:layer="layout" draw:type="line" svg:x1="4.057cm" svg:y1="13.218cm" svg:x2="4.057cm" svg:y2="13.969cm" svg:d="M4057 13218v751" svg:viewBox="0 0 1 752">
          <text:p/>
        </draw:connector>
        <draw:connector draw:style-name="gr15" draw:text-style-name="P5" draw:layer="layout" svg:x1="4.057cm" svg:y1="13.219cm" svg:x2="4.057cm" svg:y2="13.969cm" svg:d="M4057 13219v750" svg:viewBox="0 0 1 751">
          <text:p/>
        </draw:connector>
        <draw:connector draw:style-name="gr15" draw:text-style-name="P5" draw:layer="layout" draw:type="line" svg:x1="6.002cm" svg:y1="11.716cm" svg:x2="6.002cm" svg:y2="12.467cm" svg:d="M6002 11716v751" svg:viewBox="0 0 1 752">
          <text:p/>
        </draw:connector>
        <draw:connector draw:style-name="gr15" draw:text-style-name="P5" draw:layer="layout" svg:x1="6.001cm" svg:y1="13.218cm" svg:x2="6.001cm" svg:y2="13.969cm" svg:d="M6001 13218v751" svg:viewBox="0 0 1 752">
          <text:p/>
        </draw:connector>
        <draw:connector draw:style-name="gr15" draw:text-style-name="P5" draw:layer="layout" draw:type="line" svg:x1="6.001cm" svg:y1="13.218cm" svg:x2="6.001cm" svg:y2="13.969cm" svg:d="M6001 13218v751" svg:viewBox="0 0 1 752">
          <text:p/>
        </draw:connector>
        <draw:connector draw:style-name="gr15" draw:text-style-name="P5" draw:layer="layout" svg:x1="6.001cm" svg:y1="13.219cm" svg:x2="6.001cm" svg:y2="13.969cm" svg:d="M6001 13219v750" svg:viewBox="0 0 1 751">
          <text:p/>
        </draw:connector>
        <draw:connector draw:style-name="gr15" draw:text-style-name="P5" draw:layer="layout" draw:type="line" svg:x1="6.001cm" svg:y1="13.219cm" svg:x2="6.001cm" svg:y2="13.969cm" svg:d="M6001 13219v750" svg:viewBox="0 0 1 751">
          <text:p/>
        </draw:connector>
        <draw:connector draw:style-name="gr15" draw:text-style-name="P5" draw:layer="layout" svg:x1="7.945cm" svg:y1="13.218cm" svg:x2="7.945cm" svg:y2="13.969cm" svg:d="M7945 13218v751" svg:viewBox="0 0 1 752">
          <text:p/>
        </draw:connector>
        <draw:connector draw:style-name="gr15" draw:text-style-name="P5" draw:layer="layout" draw:type="line" svg:x1="7.945cm" svg:y1="13.218cm" svg:x2="7.945cm" svg:y2="13.969cm" svg:d="M7945 13218v751" svg:viewBox="0 0 1 752">
          <text:p/>
        </draw:connector>
        <draw:connector draw:style-name="gr15" draw:text-style-name="P5" draw:layer="layout" svg:x1="7.945cm" svg:y1="13.219cm" svg:x2="7.945cm" svg:y2="13.969cm" svg:d="M7945 13219v750" svg:viewBox="0 0 1 751">
          <text:p/>
        </draw:connector>
        <draw:connector draw:style-name="gr15" draw:text-style-name="P5" draw:layer="layout" draw:type="line" svg:x1="7.945cm" svg:y1="13.219cm" svg:x2="7.945cm" svg:y2="13.969cm" svg:d="M7945 13219v750" svg:viewBox="0 0 1 751">
          <text:p/>
        </draw:connector>
        <draw:connector draw:style-name="gr15" draw:text-style-name="P5" draw:layer="layout" draw:type="line" svg:x1="4.445cm" svg:y1="12.844cm" svg:x2="5.613cm" svg:y2="12.843cm" draw:start-shape="id29" draw:start-glue-point="10" draw:end-shape="id30" draw:end-glue-point="6" svg:d="M4445 12844l1168-1" svg:viewBox="0 0 1169 2">
          <text:p/>
        </draw:connector>
        <draw:connector draw:style-name="gr15" draw:text-style-name="P5" draw:layer="layout" draw:type="line" svg:x1="4.445cm" svg:y1="12.844cm" svg:x2="5.613cm" svg:y2="12.843cm" draw:start-shape="id29" draw:start-glue-point="10" draw:end-shape="id30" draw:end-glue-point="6" svg:d="M4445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4.057cm" svg:y1="11.716cm" svg:x2="4.057cm" svg:y2="12.467cm" svg:d="M4057 11716v751" svg:viewBox="0 0 1 752">
          <text:p/>
        </draw:connector>
        <draw:connector draw:style-name="gr15" draw:text-style-name="P5" draw:layer="layout" draw:type="line" svg:x1="4.057cm" svg:y1="11.717cm" svg:x2="4.057cm" svg:y2="12.468cm" svg:d="M4057 11717v751" svg:viewBox="0 0 1 752">
          <text:p/>
        </draw:connector>
        <draw:connector draw:style-name="gr15" draw:text-style-name="P5" draw:layer="layout" draw:type="line" svg:x1="7.946cm" svg:y1="11.716cm" svg:x2="7.946cm" svg:y2="12.467cm" svg:d="M7946 11716v751" svg:viewBox="0 0 1 75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01cm" svg:y1="11.37cm" svg:x2="3.669cm" svg:y2="11.37cm" svg:d="M2501 11370h1168" svg:viewBox="0 0 1169 1">
          <text:p/>
        </draw:connector>
        <draw:connector draw:style-name="gr15" draw:text-style-name="P5" draw:layer="layout" draw:type="line" svg:x1="2.501cm" svg:y1="11.37cm" svg:x2="3.669cm" svg:y2="11.37cm" svg:d="M2501 11370h1168" svg:viewBox="0 0 1169 1">
          <text:p/>
        </draw:connector>
        <draw:custom-shape draw:style-name="gr16"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xml:id="id31" draw:id="id31"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32" draw:id="id32"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4.057cm" svg:y1="13.218cm" svg:x2="4.057cm" svg:y2="13.969cm" svg:d="M4057 13218v751" svg:viewBox="0 0 1 752">
          <text:p/>
        </draw:connector>
        <draw:connector draw:style-name="gr15" draw:text-style-name="P5" draw:layer="layout" draw:type="line" svg:x1="4.057cm" svg:y1="13.218cm" svg:x2="4.057cm" svg:y2="13.969cm" svg:d="M4057 13218v751" svg:viewBox="0 0 1 752">
          <text:p/>
        </draw:connector>
        <draw:connector draw:style-name="gr15" draw:text-style-name="P5" draw:layer="layout" svg:x1="4.057cm" svg:y1="13.219cm" svg:x2="4.057cm" svg:y2="13.969cm" svg:d="M4057 13219v750" svg:viewBox="0 0 1 751">
          <text:p/>
        </draw:connector>
        <draw:connector draw:style-name="gr15" draw:text-style-name="P5" draw:layer="layout" draw:type="line" svg:x1="6.002cm" svg:y1="11.716cm" svg:x2="6.002cm" svg:y2="12.467cm" svg:d="M6002 11716v751" svg:viewBox="0 0 1 752">
          <text:p/>
        </draw:connector>
        <draw:connector draw:style-name="gr15" draw:text-style-name="P5" draw:layer="layout" svg:x1="6.001cm" svg:y1="13.218cm" svg:x2="6.001cm" svg:y2="13.969cm" svg:d="M6001 13218v751" svg:viewBox="0 0 1 752">
          <text:p/>
        </draw:connector>
        <draw:connector draw:style-name="gr15" draw:text-style-name="P5" draw:layer="layout" draw:type="line" svg:x1="6.001cm" svg:y1="13.218cm" svg:x2="6.001cm" svg:y2="13.969cm" svg:d="M6001 13218v751" svg:viewBox="0 0 1 752">
          <text:p/>
        </draw:connector>
        <draw:connector draw:style-name="gr15" draw:text-style-name="P5" draw:layer="layout" svg:x1="6.001cm" svg:y1="13.219cm" svg:x2="6.001cm" svg:y2="13.969cm" svg:d="M6001 13219v750" svg:viewBox="0 0 1 751">
          <text:p/>
        </draw:connector>
        <draw:connector draw:style-name="gr15" draw:text-style-name="P5" draw:layer="layout" draw:type="line" svg:x1="6.001cm" svg:y1="13.219cm" svg:x2="6.001cm" svg:y2="13.969cm" svg:d="M6001 13219v750" svg:viewBox="0 0 1 751">
          <text:p/>
        </draw:connector>
        <draw:connector draw:style-name="gr15" draw:text-style-name="P5" draw:layer="layout" svg:x1="7.945cm" svg:y1="13.218cm" svg:x2="7.945cm" svg:y2="13.969cm" svg:d="M7945 13218v751" svg:viewBox="0 0 1 752">
          <text:p/>
        </draw:connector>
        <draw:connector draw:style-name="gr15" draw:text-style-name="P5" draw:layer="layout" draw:type="line" svg:x1="7.945cm" svg:y1="13.218cm" svg:x2="7.945cm" svg:y2="13.969cm" svg:d="M7945 13218v751" svg:viewBox="0 0 1 752">
          <text:p/>
        </draw:connector>
        <draw:connector draw:style-name="gr15" draw:text-style-name="P5" draw:layer="layout" svg:x1="7.945cm" svg:y1="13.219cm" svg:x2="7.945cm" svg:y2="13.969cm" svg:d="M7945 13219v750" svg:viewBox="0 0 1 751">
          <text:p/>
        </draw:connector>
        <draw:connector draw:style-name="gr15" draw:text-style-name="P5" draw:layer="layout" draw:type="line" svg:x1="7.945cm" svg:y1="13.219cm" svg:x2="7.945cm" svg:y2="13.969cm" svg:d="M7945 13219v750" svg:viewBox="0 0 1 751">
          <text:p/>
        </draw:connector>
        <draw:connector draw:style-name="gr15" draw:text-style-name="P5" draw:layer="layout" draw:type="line" svg:x1="4.445cm" svg:y1="12.844cm" svg:x2="5.613cm" svg:y2="12.843cm" draw:start-shape="id31" draw:start-glue-point="10" draw:end-shape="id32" draw:end-glue-point="6" svg:d="M4445 12844l1168-1" svg:viewBox="0 0 1169 2">
          <text:p/>
        </draw:connector>
        <draw:connector draw:style-name="gr15" draw:text-style-name="P5" draw:layer="layout" draw:type="line" svg:x1="4.445cm" svg:y1="12.844cm" svg:x2="5.613cm" svg:y2="12.843cm" draw:start-shape="id31" draw:start-glue-point="10" draw:end-shape="id32" draw:end-glue-point="6" svg:d="M4445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4.057cm" svg:y1="11.716cm" svg:x2="4.057cm" svg:y2="12.467cm" svg:d="M4057 11716v751" svg:viewBox="0 0 1 752">
          <text:p/>
        </draw:connector>
        <draw:connector draw:style-name="gr15" draw:text-style-name="P5" draw:layer="layout" draw:type="line" svg:x1="4.057cm" svg:y1="11.717cm" svg:x2="4.057cm" svg:y2="12.468cm" svg:d="M4057 11717v751" svg:viewBox="0 0 1 752">
          <text:p/>
        </draw:connector>
        <draw:connector draw:style-name="gr15" draw:text-style-name="P5" draw:layer="layout" draw:type="line" svg:x1="7.946cm" svg:y1="11.716cm" svg:x2="7.946cm" svg:y2="12.467cm" svg:d="M7946 11716v751" svg:viewBox="0 0 1 75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01cm" svg:y1="11.37cm" svg:x2="3.669cm" svg:y2="11.37cm" svg:d="M2501 11370h1168" svg:viewBox="0 0 1169 1">
          <text:p/>
        </draw:connector>
        <draw:connector draw:style-name="gr15" draw:text-style-name="P5" draw:layer="layout" draw:type="line" svg:x1="2.501cm" svg:y1="11.37cm" svg:x2="3.669cm" svg:y2="11.37cm" svg:d="M2501 11370h1168" svg:viewBox="0 0 1169 1">
          <text:p/>
        </draw:connector>
        <draw:custom-shape draw:style-name="gr16"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xml:id="id33" draw:id="id33"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34" draw:id="id34"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4.057cm" svg:y1="13.218cm" svg:x2="4.057cm" svg:y2="13.969cm" svg:d="M4057 13218v751" svg:viewBox="0 0 1 752">
          <text:p/>
        </draw:connector>
        <draw:connector draw:style-name="gr15" draw:text-style-name="P5" draw:layer="layout" draw:type="line" svg:x1="4.057cm" svg:y1="13.218cm" svg:x2="4.057cm" svg:y2="13.969cm" svg:d="M4057 13218v751" svg:viewBox="0 0 1 752">
          <text:p/>
        </draw:connector>
        <draw:connector draw:style-name="gr15" draw:text-style-name="P5" draw:layer="layout" svg:x1="4.057cm" svg:y1="13.219cm" svg:x2="4.057cm" svg:y2="13.969cm" svg:d="M4057 13219v750" svg:viewBox="0 0 1 751">
          <text:p/>
        </draw:connector>
        <draw:connector draw:style-name="gr15" draw:text-style-name="P5" draw:layer="layout" draw:type="line" svg:x1="6.002cm" svg:y1="11.716cm" svg:x2="6.002cm" svg:y2="12.467cm" svg:d="M6002 11716v751" svg:viewBox="0 0 1 752">
          <text:p/>
        </draw:connector>
        <draw:connector draw:style-name="gr15" draw:text-style-name="P5" draw:layer="layout" svg:x1="6.001cm" svg:y1="13.218cm" svg:x2="6.001cm" svg:y2="13.969cm" svg:d="M6001 13218v751" svg:viewBox="0 0 1 752">
          <text:p/>
        </draw:connector>
        <draw:connector draw:style-name="gr15" draw:text-style-name="P5" draw:layer="layout" draw:type="line" svg:x1="6.001cm" svg:y1="13.218cm" svg:x2="6.001cm" svg:y2="13.969cm" svg:d="M6001 13218v751" svg:viewBox="0 0 1 752">
          <text:p/>
        </draw:connector>
        <draw:connector draw:style-name="gr15" draw:text-style-name="P5" draw:layer="layout" svg:x1="6.001cm" svg:y1="13.219cm" svg:x2="6.001cm" svg:y2="13.969cm" svg:d="M6001 13219v750" svg:viewBox="0 0 1 751">
          <text:p/>
        </draw:connector>
        <draw:connector draw:style-name="gr15" draw:text-style-name="P5" draw:layer="layout" draw:type="line" svg:x1="6.001cm" svg:y1="13.219cm" svg:x2="6.001cm" svg:y2="13.969cm" svg:d="M6001 13219v750" svg:viewBox="0 0 1 751">
          <text:p/>
        </draw:connector>
        <draw:connector draw:style-name="gr15" draw:text-style-name="P5" draw:layer="layout" svg:x1="7.945cm" svg:y1="13.218cm" svg:x2="7.945cm" svg:y2="13.969cm" svg:d="M7945 13218v751" svg:viewBox="0 0 1 752">
          <text:p/>
        </draw:connector>
        <draw:connector draw:style-name="gr15" draw:text-style-name="P5" draw:layer="layout" draw:type="line" svg:x1="7.945cm" svg:y1="13.218cm" svg:x2="7.945cm" svg:y2="13.969cm" svg:d="M7945 13218v751" svg:viewBox="0 0 1 752">
          <text:p/>
        </draw:connector>
        <draw:connector draw:style-name="gr15" draw:text-style-name="P5" draw:layer="layout" svg:x1="7.945cm" svg:y1="13.219cm" svg:x2="7.945cm" svg:y2="13.969cm" svg:d="M7945 13219v750" svg:viewBox="0 0 1 751">
          <text:p/>
        </draw:connector>
        <draw:connector draw:style-name="gr15" draw:text-style-name="P5" draw:layer="layout" draw:type="line" svg:x1="7.945cm" svg:y1="13.219cm" svg:x2="7.945cm" svg:y2="13.969cm" svg:d="M7945 13219v750" svg:viewBox="0 0 1 751">
          <text:p/>
        </draw:connector>
        <draw:connector draw:style-name="gr15" draw:text-style-name="P5" draw:layer="layout" draw:type="line" svg:x1="4.445cm" svg:y1="12.844cm" svg:x2="5.613cm" svg:y2="12.843cm" draw:start-shape="id33" draw:start-glue-point="10" draw:end-shape="id34" draw:end-glue-point="6" svg:d="M4445 12844l1168-1" svg:viewBox="0 0 1169 2">
          <text:p/>
        </draw:connector>
        <draw:connector draw:style-name="gr15" draw:text-style-name="P5" draw:layer="layout" draw:type="line" svg:x1="4.445cm" svg:y1="12.844cm" svg:x2="5.613cm" svg:y2="12.843cm" draw:start-shape="id33" draw:start-glue-point="10" draw:end-shape="id34" draw:end-glue-point="6" svg:d="M4445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4.057cm" svg:y1="11.716cm" svg:x2="4.057cm" svg:y2="12.467cm" svg:d="M4057 11716v751" svg:viewBox="0 0 1 752">
          <text:p/>
        </draw:connector>
        <draw:connector draw:style-name="gr15" draw:text-style-name="P5" draw:layer="layout" draw:type="line" svg:x1="4.057cm" svg:y1="11.717cm" svg:x2="4.057cm" svg:y2="12.468cm" svg:d="M4057 11717v751" svg:viewBox="0 0 1 752">
          <text:p/>
        </draw:connector>
        <draw:connector draw:style-name="gr15" draw:text-style-name="P5" draw:layer="layout" draw:type="line" svg:x1="7.946cm" svg:y1="11.716cm" svg:x2="7.946cm" svg:y2="12.467cm" svg:d="M7946 11716v751" svg:viewBox="0 0 1 75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01cm" svg:y1="11.37cm" svg:x2="3.669cm" svg:y2="11.37cm" svg:d="M2501 11370h1168" svg:viewBox="0 0 1169 1">
          <text:p/>
        </draw:connector>
        <draw:connector draw:style-name="gr15" draw:text-style-name="P5" draw:layer="layout" draw:type="line" svg:x1="2.501cm" svg:y1="11.37cm" svg:x2="3.669cm" svg:y2="11.37cm" svg:d="M2501 11370h1168" svg:viewBox="0 0 1169 1">
          <text:p/>
        </draw:connector>
        <draw:custom-shape draw:style-name="gr16"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xml:id="id35" draw:id="id35"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36" draw:id="id36"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4.057cm" svg:y1="13.218cm" svg:x2="4.057cm" svg:y2="13.969cm" svg:d="M4057 13218v751" svg:viewBox="0 0 1 752">
          <text:p/>
        </draw:connector>
        <draw:connector draw:style-name="gr15" draw:text-style-name="P5" draw:layer="layout" draw:type="line" svg:x1="4.057cm" svg:y1="13.218cm" svg:x2="4.057cm" svg:y2="13.969cm" svg:d="M4057 13218v751" svg:viewBox="0 0 1 752">
          <text:p/>
        </draw:connector>
        <draw:connector draw:style-name="gr15" draw:text-style-name="P5" draw:layer="layout" svg:x1="4.057cm" svg:y1="13.219cm" svg:x2="4.057cm" svg:y2="13.969cm" svg:d="M4057 13219v750" svg:viewBox="0 0 1 751">
          <text:p/>
        </draw:connector>
        <draw:connector draw:style-name="gr15" draw:text-style-name="P5" draw:layer="layout" draw:type="line" svg:x1="6.002cm" svg:y1="11.716cm" svg:x2="6.002cm" svg:y2="12.467cm" svg:d="M6002 11716v751" svg:viewBox="0 0 1 752">
          <text:p/>
        </draw:connector>
        <draw:connector draw:style-name="gr15" draw:text-style-name="P5" draw:layer="layout" svg:x1="6.001cm" svg:y1="13.218cm" svg:x2="6.001cm" svg:y2="13.969cm" svg:d="M6001 13218v751" svg:viewBox="0 0 1 752">
          <text:p/>
        </draw:connector>
        <draw:connector draw:style-name="gr15" draw:text-style-name="P5" draw:layer="layout" draw:type="line" svg:x1="6.001cm" svg:y1="13.218cm" svg:x2="6.001cm" svg:y2="13.969cm" svg:d="M6001 13218v751" svg:viewBox="0 0 1 752">
          <text:p/>
        </draw:connector>
        <draw:connector draw:style-name="gr15" draw:text-style-name="P5" draw:layer="layout" svg:x1="6.001cm" svg:y1="13.219cm" svg:x2="6.001cm" svg:y2="13.969cm" svg:d="M6001 13219v750" svg:viewBox="0 0 1 751">
          <text:p/>
        </draw:connector>
        <draw:connector draw:style-name="gr15" draw:text-style-name="P5" draw:layer="layout" draw:type="line" svg:x1="6.001cm" svg:y1="13.219cm" svg:x2="6.001cm" svg:y2="13.969cm" svg:d="M6001 13219v750" svg:viewBox="0 0 1 751">
          <text:p/>
        </draw:connector>
        <draw:connector draw:style-name="gr15" draw:text-style-name="P5" draw:layer="layout" svg:x1="7.945cm" svg:y1="13.218cm" svg:x2="7.945cm" svg:y2="13.969cm" svg:d="M7945 13218v751" svg:viewBox="0 0 1 752">
          <text:p/>
        </draw:connector>
        <draw:connector draw:style-name="gr15" draw:text-style-name="P5" draw:layer="layout" draw:type="line" svg:x1="7.945cm" svg:y1="13.218cm" svg:x2="7.945cm" svg:y2="13.969cm" svg:d="M7945 13218v751" svg:viewBox="0 0 1 752">
          <text:p/>
        </draw:connector>
        <draw:connector draw:style-name="gr15" draw:text-style-name="P5" draw:layer="layout" svg:x1="7.945cm" svg:y1="13.219cm" svg:x2="7.945cm" svg:y2="13.969cm" svg:d="M7945 13219v750" svg:viewBox="0 0 1 751">
          <text:p/>
        </draw:connector>
        <draw:connector draw:style-name="gr15" draw:text-style-name="P5" draw:layer="layout" draw:type="line" svg:x1="7.945cm" svg:y1="13.219cm" svg:x2="7.945cm" svg:y2="13.969cm" svg:d="M7945 13219v750" svg:viewBox="0 0 1 751">
          <text:p/>
        </draw:connector>
        <draw:connector draw:style-name="gr15" draw:text-style-name="P5" draw:layer="layout" draw:type="line" svg:x1="4.445cm" svg:y1="12.844cm" svg:x2="5.613cm" svg:y2="12.843cm" draw:start-shape="id35" draw:start-glue-point="10" draw:end-shape="id36" draw:end-glue-point="6" svg:d="M4445 12844l1168-1" svg:viewBox="0 0 1169 2">
          <text:p/>
        </draw:connector>
        <draw:connector draw:style-name="gr15" draw:text-style-name="P5" draw:layer="layout" draw:type="line" svg:x1="4.445cm" svg:y1="12.844cm" svg:x2="5.613cm" svg:y2="12.843cm" draw:start-shape="id35" draw:start-glue-point="10" draw:end-shape="id36" draw:end-glue-point="6" svg:d="M4445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4.057cm" svg:y1="11.716cm" svg:x2="4.057cm" svg:y2="12.467cm" svg:d="M4057 11716v751" svg:viewBox="0 0 1 752">
          <text:p/>
        </draw:connector>
        <draw:connector draw:style-name="gr15" draw:text-style-name="P5" draw:layer="layout" draw:type="line" svg:x1="4.057cm" svg:y1="11.717cm" svg:x2="4.057cm" svg:y2="12.468cm" svg:d="M4057 11717v751" svg:viewBox="0 0 1 752">
          <text:p/>
        </draw:connector>
        <draw:connector draw:style-name="gr15" draw:text-style-name="P5" draw:layer="layout" draw:type="line" svg:x1="7.946cm" svg:y1="11.716cm" svg:x2="7.946cm" svg:y2="12.467cm" svg:d="M7946 11716v751" svg:viewBox="0 0 1 75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01cm" svg:y1="11.37cm" svg:x2="3.669cm" svg:y2="11.37cm" svg:d="M2501 11370h1168" svg:viewBox="0 0 1169 1">
          <text:p/>
        </draw:connector>
        <draw:connector draw:style-name="gr15" draw:text-style-name="P5" draw:layer="layout" draw:type="line" svg:x1="2.501cm" svg:y1="11.37cm" svg:x2="3.669cm" svg:y2="11.37cm" svg:d="M2501 11370h1168" svg:viewBox="0 0 1169 1">
          <text:p/>
        </draw:connector>
        <draw:custom-shape draw:style-name="gr16"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xml:id="id37" draw:id="id37"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38" draw:id="id38"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4.057cm" svg:y1="13.218cm" svg:x2="4.057cm" svg:y2="13.969cm" svg:d="M4057 13218v751" svg:viewBox="0 0 1 752">
          <text:p/>
        </draw:connector>
        <draw:connector draw:style-name="gr15" draw:text-style-name="P5" draw:layer="layout" draw:type="line" svg:x1="4.057cm" svg:y1="13.218cm" svg:x2="4.057cm" svg:y2="13.969cm" svg:d="M4057 13218v751" svg:viewBox="0 0 1 752">
          <text:p/>
        </draw:connector>
        <draw:connector draw:style-name="gr15" draw:text-style-name="P5" draw:layer="layout" svg:x1="4.057cm" svg:y1="13.219cm" svg:x2="4.057cm" svg:y2="13.969cm" svg:d="M4057 13219v750" svg:viewBox="0 0 1 751">
          <text:p/>
        </draw:connector>
        <draw:connector draw:style-name="gr15" draw:text-style-name="P5" draw:layer="layout" draw:type="line" svg:x1="6.002cm" svg:y1="11.716cm" svg:x2="6.002cm" svg:y2="12.467cm" svg:d="M6002 11716v751" svg:viewBox="0 0 1 752">
          <text:p/>
        </draw:connector>
        <draw:connector draw:style-name="gr15" draw:text-style-name="P5" draw:layer="layout" svg:x1="6.001cm" svg:y1="13.218cm" svg:x2="6.001cm" svg:y2="13.969cm" svg:d="M6001 13218v751" svg:viewBox="0 0 1 752">
          <text:p/>
        </draw:connector>
        <draw:connector draw:style-name="gr15" draw:text-style-name="P5" draw:layer="layout" draw:type="line" svg:x1="6.001cm" svg:y1="13.218cm" svg:x2="6.001cm" svg:y2="13.969cm" svg:d="M6001 13218v751" svg:viewBox="0 0 1 752">
          <text:p/>
        </draw:connector>
        <draw:connector draw:style-name="gr15" draw:text-style-name="P5" draw:layer="layout" svg:x1="6.001cm" svg:y1="13.219cm" svg:x2="6.001cm" svg:y2="13.969cm" svg:d="M6001 13219v750" svg:viewBox="0 0 1 751">
          <text:p/>
        </draw:connector>
        <draw:connector draw:style-name="gr15" draw:text-style-name="P5" draw:layer="layout" draw:type="line" svg:x1="6.001cm" svg:y1="13.219cm" svg:x2="6.001cm" svg:y2="13.969cm" svg:d="M6001 13219v750" svg:viewBox="0 0 1 751">
          <text:p/>
        </draw:connector>
        <draw:connector draw:style-name="gr15" draw:text-style-name="P5" draw:layer="layout" svg:x1="7.945cm" svg:y1="13.218cm" svg:x2="7.945cm" svg:y2="13.969cm" svg:d="M7945 13218v751" svg:viewBox="0 0 1 752">
          <text:p/>
        </draw:connector>
        <draw:connector draw:style-name="gr15" draw:text-style-name="P5" draw:layer="layout" draw:type="line" svg:x1="7.945cm" svg:y1="13.218cm" svg:x2="7.945cm" svg:y2="13.969cm" svg:d="M7945 13218v751" svg:viewBox="0 0 1 752">
          <text:p/>
        </draw:connector>
        <draw:connector draw:style-name="gr15" draw:text-style-name="P5" draw:layer="layout" svg:x1="7.945cm" svg:y1="13.219cm" svg:x2="7.945cm" svg:y2="13.969cm" svg:d="M7945 13219v750" svg:viewBox="0 0 1 751">
          <text:p/>
        </draw:connector>
        <draw:connector draw:style-name="gr15" draw:text-style-name="P5" draw:layer="layout" draw:type="line" svg:x1="7.945cm" svg:y1="13.219cm" svg:x2="7.945cm" svg:y2="13.969cm" svg:d="M7945 13219v750" svg:viewBox="0 0 1 751">
          <text:p/>
        </draw:connector>
        <draw:connector draw:style-name="gr15" draw:text-style-name="P5" draw:layer="layout" draw:type="line" svg:x1="4.445cm" svg:y1="12.844cm" svg:x2="5.613cm" svg:y2="12.843cm" draw:start-shape="id37" draw:start-glue-point="10" draw:end-shape="id38" draw:end-glue-point="6" svg:d="M4445 12844l1168-1" svg:viewBox="0 0 1169 2">
          <text:p/>
        </draw:connector>
        <draw:connector draw:style-name="gr15" draw:text-style-name="P5" draw:layer="layout" draw:type="line" svg:x1="4.445cm" svg:y1="12.844cm" svg:x2="5.613cm" svg:y2="12.843cm" draw:start-shape="id37" draw:start-glue-point="10" draw:end-shape="id38" draw:end-glue-point="6" svg:d="M4445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4.057cm" svg:y1="11.716cm" svg:x2="4.057cm" svg:y2="12.467cm" svg:d="M4057 11716v751" svg:viewBox="0 0 1 752">
          <text:p/>
        </draw:connector>
        <draw:connector draw:style-name="gr15" draw:text-style-name="P5" draw:layer="layout" draw:type="line" svg:x1="4.057cm" svg:y1="11.717cm" svg:x2="4.057cm" svg:y2="12.468cm" svg:d="M4057 11717v751" svg:viewBox="0 0 1 752">
          <text:p/>
        </draw:connector>
        <draw:connector draw:style-name="gr15" draw:text-style-name="P5" draw:layer="layout" draw:type="line" svg:x1="7.946cm" svg:y1="11.716cm" svg:x2="7.946cm" svg:y2="12.467cm" svg:d="M7946 11716v751" svg:viewBox="0 0 1 75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01cm" svg:y1="11.37cm" svg:x2="3.669cm" svg:y2="11.37cm" svg:d="M2501 11370h1168" svg:viewBox="0 0 1169 1">
          <text:p/>
        </draw:connector>
        <draw:connector draw:style-name="gr15" draw:text-style-name="P5" draw:layer="layout" draw:type="line" svg:x1="2.501cm" svg:y1="11.37cm" svg:x2="3.669cm" svg:y2="11.37cm" svg:d="M2501 11370h1168" svg:viewBox="0 0 1169 1">
          <text:p/>
        </draw:connector>
        <draw:custom-shape draw:style-name="gr16" draw:text-style-name="P6" draw:layer="layout" svg:width="0.776cm" svg:height="0.75cm" svg:x="3.669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xml:id="id39" draw:id="id39" draw:layer="layout" svg:width="0.776cm" svg:height="0.749cm" svg:x="3.669cm" svg:y="12.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3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40" draw:id="id40" draw:layer="layout" svg:width="0.777cm" svg:height="0.749cm" svg:x="5.613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3.668cm" svg:y="13.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5.612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8cm" svg:y="12.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76cm" svg:height="0.749cm" svg:x="7.557cm" svg:y="13.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4.057cm" svg:y1="13.218cm" svg:x2="4.057cm" svg:y2="13.969cm" svg:d="M4057 13218v751" svg:viewBox="0 0 1 752">
          <text:p/>
        </draw:connector>
        <draw:connector draw:style-name="gr15" draw:text-style-name="P5" draw:layer="layout" draw:type="line" svg:x1="4.057cm" svg:y1="13.218cm" svg:x2="4.057cm" svg:y2="13.969cm" svg:d="M4057 13218v751" svg:viewBox="0 0 1 752">
          <text:p/>
        </draw:connector>
        <draw:connector draw:style-name="gr15" draw:text-style-name="P5" draw:layer="layout" svg:x1="4.057cm" svg:y1="13.219cm" svg:x2="4.057cm" svg:y2="13.969cm" svg:d="M4057 13219v750" svg:viewBox="0 0 1 751">
          <text:p/>
        </draw:connector>
        <draw:connector draw:style-name="gr15" draw:text-style-name="P5" draw:layer="layout" draw:type="line" svg:x1="6.002cm" svg:y1="11.716cm" svg:x2="6.002cm" svg:y2="12.467cm" svg:d="M6002 11716v751" svg:viewBox="0 0 1 752">
          <text:p/>
        </draw:connector>
        <draw:connector draw:style-name="gr15" draw:text-style-name="P5" draw:layer="layout" svg:x1="6.001cm" svg:y1="13.218cm" svg:x2="6.001cm" svg:y2="13.969cm" svg:d="M6001 13218v751" svg:viewBox="0 0 1 752">
          <text:p/>
        </draw:connector>
        <draw:connector draw:style-name="gr15" draw:text-style-name="P5" draw:layer="layout" draw:type="line" svg:x1="6.001cm" svg:y1="13.218cm" svg:x2="6.001cm" svg:y2="13.969cm" svg:d="M6001 13218v751" svg:viewBox="0 0 1 752">
          <text:p/>
        </draw:connector>
        <draw:connector draw:style-name="gr15" draw:text-style-name="P5" draw:layer="layout" svg:x1="6.001cm" svg:y1="13.219cm" svg:x2="6.001cm" svg:y2="13.969cm" svg:d="M6001 13219v750" svg:viewBox="0 0 1 751">
          <text:p/>
        </draw:connector>
        <draw:connector draw:style-name="gr15" draw:text-style-name="P5" draw:layer="layout" draw:type="line" svg:x1="6.001cm" svg:y1="13.219cm" svg:x2="6.001cm" svg:y2="13.969cm" svg:d="M6001 13219v750" svg:viewBox="0 0 1 751">
          <text:p/>
        </draw:connector>
        <draw:connector draw:style-name="gr15" draw:text-style-name="P5" draw:layer="layout" svg:x1="7.945cm" svg:y1="13.218cm" svg:x2="7.945cm" svg:y2="13.969cm" svg:d="M7945 13218v751" svg:viewBox="0 0 1 752">
          <text:p/>
        </draw:connector>
        <draw:connector draw:style-name="gr15" draw:text-style-name="P5" draw:layer="layout" draw:type="line" svg:x1="7.945cm" svg:y1="13.218cm" svg:x2="7.945cm" svg:y2="13.969cm" svg:d="M7945 13218v751" svg:viewBox="0 0 1 752">
          <text:p/>
        </draw:connector>
        <draw:connector draw:style-name="gr15" draw:text-style-name="P5" draw:layer="layout" svg:x1="7.945cm" svg:y1="13.219cm" svg:x2="7.945cm" svg:y2="13.969cm" svg:d="M7945 13219v750" svg:viewBox="0 0 1 751">
          <text:p/>
        </draw:connector>
        <draw:connector draw:style-name="gr15" draw:text-style-name="P5" draw:layer="layout" draw:type="line" svg:x1="7.945cm" svg:y1="13.219cm" svg:x2="7.945cm" svg:y2="13.969cm" svg:d="M7945 13219v750" svg:viewBox="0 0 1 751">
          <text:p/>
        </draw:connector>
        <draw:connector draw:style-name="gr15" draw:text-style-name="P5" draw:layer="layout" draw:type="line" svg:x1="4.445cm" svg:y1="12.844cm" svg:x2="5.613cm" svg:y2="12.843cm" draw:start-shape="id39" draw:start-glue-point="10" draw:end-shape="id40" draw:end-glue-point="6" svg:d="M4445 12844l1168-1" svg:viewBox="0 0 1169 2">
          <text:p/>
        </draw:connector>
        <draw:connector draw:style-name="gr15" draw:text-style-name="P5" draw:layer="layout" draw:type="line" svg:x1="4.445cm" svg:y1="12.844cm" svg:x2="5.613cm" svg:y2="12.843cm" draw:start-shape="id39" draw:start-glue-point="10" draw:end-shape="id40" draw:end-glue-point="6" svg:d="M4445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6.39cm" svg:y1="12.844cm" svg:x2="7.558cm" svg:y2="12.843cm" svg:d="M6390 12844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4.446cm" svg:y1="11.37cm" svg:x2="5.614cm" svg:y2="11.369cm" svg:d="M4446 11370l1168-1" svg:viewBox="0 0 1169 2">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6.391cm" svg:y1="11.37cm" svg:x2="7.558cm" svg:y2="11.37cm" svg:d="M6391 11370h1167" svg:viewBox="0 0 1168 1">
          <text:p/>
        </draw:connector>
        <draw:connector draw:style-name="gr15" draw:text-style-name="P5" draw:layer="layout" draw:type="line" svg:x1="4.057cm" svg:y1="11.716cm" svg:x2="4.057cm" svg:y2="12.467cm" svg:d="M4057 11716v751" svg:viewBox="0 0 1 752">
          <text:p/>
        </draw:connector>
        <draw:connector draw:style-name="gr15" draw:text-style-name="P5" draw:layer="layout" draw:type="line" svg:x1="4.057cm" svg:y1="11.717cm" svg:x2="4.057cm" svg:y2="12.468cm" svg:d="M4057 11717v751" svg:viewBox="0 0 1 752">
          <text:p/>
        </draw:connector>
        <draw:connector draw:style-name="gr15" draw:text-style-name="P5" draw:layer="layout" draw:type="line" svg:x1="7.946cm" svg:y1="11.716cm" svg:x2="7.946cm" svg:y2="12.467cm" svg:d="M7946 11716v751" svg:viewBox="0 0 1 75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4cm" svg:y1="11.37cm" svg:x2="9.502cm" svg:y2="11.369cm" svg:d="M8334 11370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8.333cm" svg:y1="12.844cm" svg:x2="9.501cm" svg:y2="12.843cm" svg:d="M8333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cm" svg:y1="12.844cm" svg:x2="3.668cm" svg:y2="12.843cm" svg:d="M2500 12844l1168-1" svg:viewBox="0 0 1169 2">
          <text:p/>
        </draw:connector>
        <draw:connector draw:style-name="gr15" draw:text-style-name="P5" draw:layer="layout" draw:type="line" svg:x1="2.501cm" svg:y1="11.37cm" svg:x2="3.669cm" svg:y2="11.37cm" svg:d="M2501 11370h1168" svg:viewBox="0 0 1169 1">
          <text:p/>
        </draw:connector>
        <draw:connector draw:style-name="gr15" draw:text-style-name="P5" draw:layer="layout" draw:type="line" svg:x1="2.501cm" svg:y1="11.37cm" svg:x2="3.669cm" svg:y2="11.37cm" svg:d="M2501 11370h1168" svg:viewBox="0 0 1169 1">
          <text:p/>
        </draw:connector>
        <draw:connector draw:style-name="gr15" draw:text-style-name="P5" draw:layer="layout" draw:type="line" svg:x1="6.002cm" svg:y1="10.216cm" svg:x2="6.002cm" svg:y2="10.967cm" svg:d="M6002 10216v751" svg:viewBox="0 0 1 752">
          <text:p/>
        </draw:connector>
        <draw:connector draw:style-name="gr15" draw:text-style-name="P5" draw:layer="layout" draw:type="line" svg:x1="4.057cm" svg:y1="10.216cm" svg:x2="4.057cm" svg:y2="10.967cm" svg:d="M4057 10216v751" svg:viewBox="0 0 1 752">
          <text:p/>
        </draw:connector>
        <draw:connector draw:style-name="gr15" draw:text-style-name="P5" draw:layer="layout" draw:type="line" svg:x1="4.057cm" svg:y1="10.217cm" svg:x2="4.057cm" svg:y2="10.968cm" svg:d="M4057 10217v751" svg:viewBox="0 0 1 752">
          <text:p/>
        </draw:connector>
        <draw:connector draw:style-name="gr15" draw:text-style-name="P5" draw:layer="layout" draw:type="line" svg:x1="7.946cm" svg:y1="10.216cm" svg:x2="7.946cm" svg:y2="10.967cm" svg:d="M7946 10216v751" svg:viewBox="0 0 1 752">
          <text:p/>
        </draw:connector>
        <draw:connector draw:style-name="gr15" draw:text-style-name="P5" draw:layer="layout" draw:type="line" svg:x1="6.002cm" svg:y1="10.216cm" svg:x2="6.002cm" svg:y2="10.967cm" svg:d="M6002 10216v751" svg:viewBox="0 0 1 752">
          <text:p/>
        </draw:connector>
        <draw:connector draw:style-name="gr15" draw:text-style-name="P5" draw:layer="layout" draw:type="line" svg:x1="4.057cm" svg:y1="10.216cm" svg:x2="4.057cm" svg:y2="10.967cm" svg:d="M4057 10216v751" svg:viewBox="0 0 1 752">
          <text:p/>
        </draw:connector>
        <draw:connector draw:style-name="gr15" draw:text-style-name="P5" draw:layer="layout" draw:type="line" svg:x1="4.057cm" svg:y1="10.217cm" svg:x2="4.057cm" svg:y2="10.968cm" svg:d="M4057 10217v751" svg:viewBox="0 0 1 752">
          <text:p/>
        </draw:connector>
        <draw:connector draw:style-name="gr15" draw:text-style-name="P5" draw:layer="layout" draw:type="line" svg:x1="7.946cm" svg:y1="10.216cm" svg:x2="7.946cm" svg:y2="10.967cm" svg:d="M7946 10216v751" svg:viewBox="0 0 1 752">
          <text:p/>
        </draw:connector>
        <draw:connector draw:style-name="gr15" draw:text-style-name="P5" draw:layer="layout" draw:type="line" svg:x1="6.002cm" svg:y1="10.216cm" svg:x2="6.002cm" svg:y2="10.967cm" svg:d="M6002 10216v751" svg:viewBox="0 0 1 752">
          <text:p/>
        </draw:connector>
        <draw:connector draw:style-name="gr15" draw:text-style-name="P5" draw:layer="layout" draw:type="line" svg:x1="4.057cm" svg:y1="10.216cm" svg:x2="4.057cm" svg:y2="10.967cm" svg:d="M4057 10216v751" svg:viewBox="0 0 1 752">
          <text:p/>
        </draw:connector>
        <draw:connector draw:style-name="gr15" draw:text-style-name="P5" draw:layer="layout" draw:type="line" svg:x1="4.057cm" svg:y1="10.217cm" svg:x2="4.057cm" svg:y2="10.968cm" svg:d="M4057 10217v751" svg:viewBox="0 0 1 752">
          <text:p/>
        </draw:connector>
        <draw:connector draw:style-name="gr15" draw:text-style-name="P5" draw:layer="layout" draw:type="line" svg:x1="7.946cm" svg:y1="10.216cm" svg:x2="7.946cm" svg:y2="10.967cm" svg:d="M7946 10216v751" svg:viewBox="0 0 1 752">
          <text:p/>
        </draw:connector>
        <draw:connector draw:style-name="gr15" draw:text-style-name="P5" draw:layer="layout" draw:type="line" svg:x1="6.002cm" svg:y1="10.216cm" svg:x2="6.002cm" svg:y2="10.967cm" svg:d="M6002 10216v751" svg:viewBox="0 0 1 752">
          <text:p/>
        </draw:connector>
        <draw:connector draw:style-name="gr15" draw:text-style-name="P5" draw:layer="layout" draw:type="line" svg:x1="4.057cm" svg:y1="10.216cm" svg:x2="4.057cm" svg:y2="10.967cm" svg:d="M4057 10216v751" svg:viewBox="0 0 1 752">
          <text:p/>
        </draw:connector>
        <draw:connector draw:style-name="gr15" draw:text-style-name="P5" draw:layer="layout" draw:type="line" svg:x1="4.057cm" svg:y1="10.217cm" svg:x2="4.057cm" svg:y2="10.968cm" svg:d="M4057 10217v751" svg:viewBox="0 0 1 752">
          <text:p/>
        </draw:connector>
        <draw:connector draw:style-name="gr15" draw:text-style-name="P5" draw:layer="layout" draw:type="line" svg:x1="7.946cm" svg:y1="10.216cm" svg:x2="7.946cm" svg:y2="10.967cm" svg:d="M7946 10216v751" svg:viewBox="0 0 1 752">
          <text:p/>
        </draw:connector>
        <draw:connector draw:style-name="gr15" draw:text-style-name="P5" draw:layer="layout" draw:type="line" svg:x1="6.002cm" svg:y1="10.216cm" svg:x2="6.002cm" svg:y2="10.967cm" svg:d="M6002 10216v751" svg:viewBox="0 0 1 752">
          <text:p/>
        </draw:connector>
        <draw:connector draw:style-name="gr15" draw:text-style-name="P5" draw:layer="layout" draw:type="line" svg:x1="4.057cm" svg:y1="10.216cm" svg:x2="4.057cm" svg:y2="10.967cm" svg:d="M4057 10216v751" svg:viewBox="0 0 1 752">
          <text:p/>
        </draw:connector>
        <draw:connector draw:style-name="gr15" draw:text-style-name="P5" draw:layer="layout" draw:type="line" svg:x1="4.057cm" svg:y1="10.217cm" svg:x2="4.057cm" svg:y2="10.968cm" svg:d="M4057 10217v751" svg:viewBox="0 0 1 752">
          <text:p/>
        </draw:connector>
        <draw:connector draw:style-name="gr15" draw:text-style-name="P5" draw:layer="layout" draw:type="line" svg:x1="7.946cm" svg:y1="10.216cm" svg:x2="7.946cm" svg:y2="10.967cm" svg:d="M7946 10216v751" svg:viewBox="0 0 1 752">
          <text:p/>
        </draw:connector>
        <draw:connector draw:style-name="gr15" draw:text-style-name="P5" draw:layer="layout" draw:type="line" svg:x1="6.002cm" svg:y1="10.216cm" svg:x2="6.002cm" svg:y2="10.967cm" svg:d="M6002 10216v751" svg:viewBox="0 0 1 752">
          <text:p/>
        </draw:connector>
        <draw:connector draw:style-name="gr15" draw:text-style-name="P5" draw:layer="layout" draw:type="line" svg:x1="4.057cm" svg:y1="10.216cm" svg:x2="4.057cm" svg:y2="10.967cm" svg:d="M4057 10216v751" svg:viewBox="0 0 1 752">
          <text:p/>
        </draw:connector>
        <draw:connector draw:style-name="gr15" draw:text-style-name="P5" draw:layer="layout" draw:type="line" svg:x1="4.057cm" svg:y1="10.217cm" svg:x2="4.057cm" svg:y2="10.968cm" svg:d="M4057 10217v751" svg:viewBox="0 0 1 752">
          <text:p/>
        </draw:connector>
        <draw:connector draw:style-name="gr15" draw:text-style-name="P5" draw:layer="layout" draw:type="line" svg:x1="7.946cm" svg:y1="10.216cm" svg:x2="7.946cm" svg:y2="10.967cm" svg:d="M7946 10216v751" svg:viewBox="0 0 1 752">
          <text:p/>
        </draw:connector>
        <draw:connector draw:style-name="gr15" draw:text-style-name="P5" draw:layer="layout" draw:type="line" svg:x1="6.002cm" svg:y1="10.216cm" svg:x2="6.002cm" svg:y2="10.967cm" svg:d="M6002 10216v751" svg:viewBox="0 0 1 752">
          <text:p/>
        </draw:connector>
        <draw:connector draw:style-name="gr15" draw:text-style-name="P5" draw:layer="layout" draw:type="line" svg:x1="4.057cm" svg:y1="10.216cm" svg:x2="4.057cm" svg:y2="10.967cm" svg:d="M4057 10216v751" svg:viewBox="0 0 1 752">
          <text:p/>
        </draw:connector>
        <draw:connector draw:style-name="gr15" draw:text-style-name="P5" draw:layer="layout" draw:type="line" svg:x1="4.057cm" svg:y1="10.217cm" svg:x2="4.057cm" svg:y2="10.968cm" svg:d="M4057 10217v751" svg:viewBox="0 0 1 752">
          <text:p/>
        </draw:connector>
        <draw:connector draw:style-name="gr15" draw:text-style-name="P5" draw:layer="layout" draw:type="line" svg:x1="7.946cm" svg:y1="10.216cm" svg:x2="7.946cm" svg:y2="10.967cm" svg:d="M7946 10216v751" svg:viewBox="0 0 1 752">
          <text:p/>
        </draw:connector>
        <draw:connector draw:style-name="gr15" draw:text-style-name="P5" draw:layer="layout" draw:type="line" svg:x1="6.002cm" svg:y1="10.216cm" svg:x2="6.002cm" svg:y2="10.967cm" svg:d="M6002 10216v751" svg:viewBox="0 0 1 752">
          <text:p/>
        </draw:connector>
        <draw:connector draw:style-name="gr15" draw:text-style-name="P5" draw:layer="layout" draw:type="line" svg:x1="4.057cm" svg:y1="10.216cm" svg:x2="4.057cm" svg:y2="10.967cm" svg:d="M4057 10216v751" svg:viewBox="0 0 1 752">
          <text:p/>
        </draw:connector>
        <draw:connector draw:style-name="gr15" draw:text-style-name="P5" draw:layer="layout" draw:type="line" svg:x1="4.057cm" svg:y1="10.217cm" svg:x2="4.057cm" svg:y2="10.968cm" svg:d="M4057 10217v751" svg:viewBox="0 0 1 752">
          <text:p/>
        </draw:connector>
        <draw:connector draw:style-name="gr15" draw:text-style-name="P5" draw:layer="layout" draw:type="line" svg:x1="7.946cm" svg:y1="10.216cm" svg:x2="7.946cm" svg:y2="10.967cm" svg:d="M7946 10216v751" svg:viewBox="0 0 1 752">
          <text:p/>
        </draw:connector>
        <draw:custom-shape draw:style-name="gr13" draw:text-style-name="P6" xml:id="id41" draw:id="id41"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42" draw:id="id42"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43" draw:id="id43"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9cm" svg:y1="4.466cm" svg:x2="13.119cm" svg:y2="5.217cm" draw:start-shape="id41" draw:start-glue-point="8" draw:end-shape="id42" draw:end-glue-point="4" svg:d="M13119 4466v751" svg:viewBox="0 0 1 752">
          <text:p/>
        </draw:connector>
        <draw:connector draw:style-name="gr14" draw:text-style-name="P5" draw:layer="layout" draw:type="line" svg:x1="13.119cm" svg:y1="4.466cm" svg:x2="13.119cm" svg:y2="5.217cm" draw:start-shape="id41" draw:start-glue-point="8" draw:end-shape="id42" draw:end-glue-point="4" svg:d="M13119 4466v751" svg:viewBox="0 0 1 752">
          <text:p/>
        </draw:connector>
        <draw:connector draw:style-name="gr14" draw:text-style-name="P5" draw:layer="layout" svg:x1="15.063cm" svg:y1="4.466cm" svg:x2="15.063cm" svg:y2="5.217cm" svg:d="M15063 4466v751" svg:viewBox="0 0 1 752">
          <text:p/>
        </draw:connector>
        <draw:connector draw:style-name="gr14" draw:text-style-name="P5" draw:layer="layout" draw:type="line" svg:x1="15.063cm" svg:y1="4.466cm" svg:x2="15.063cm" svg:y2="5.217cm" svg:d="M15063 4466v751" svg:viewBox="0 0 1 752">
          <text:p/>
        </draw:connector>
        <draw:connector draw:style-name="gr14" draw:text-style-name="P5" draw:layer="layout" svg:x1="17.008cm" svg:y1="4.466cm" svg:x2="17.008cm" svg:y2="5.217cm" svg:d="M17008 4466v751" svg:viewBox="0 0 1 752">
          <text:p/>
        </draw:connector>
        <draw:connector draw:style-name="gr14" draw:text-style-name="P5" draw:layer="layout" draw:type="line" svg:x1="17.008cm" svg:y1="4.466cm" svg:x2="17.008cm" svg:y2="5.217cm" svg:d="M17008 4466v751" svg:viewBox="0 0 1 752">
          <text:p/>
        </draw:connector>
        <draw:connector draw:style-name="gr15" draw:text-style-name="P5" draw:layer="layout" svg:x1="13.118cm" svg:y1="5.966cm" svg:x2="13.118cm" svg:y2="6.717cm" svg:d="M13118 5966v751" svg:viewBox="0 0 1 752">
          <text:p/>
        </draw:connector>
        <draw:connector draw:style-name="gr15" draw:text-style-name="P5" draw:layer="layout" draw:type="line" svg:x1="13.118cm" svg:y1="5.966cm" svg:x2="13.118cm" svg:y2="6.717cm" svg:d="M13118 5966v751" svg:viewBox="0 0 1 752">
          <text:p/>
        </draw:connector>
        <draw:connector draw:style-name="gr15" draw:text-style-name="P5" draw:layer="layout" svg:x1="13.118cm" svg:y1="5.967cm" svg:x2="13.118cm" svg:y2="6.717cm" svg:d="M13118 5967v750" svg:viewBox="0 0 1 751">
          <text:p/>
        </draw:connector>
        <draw:connector draw:style-name="gr15" draw:text-style-name="P5" draw:layer="layout" draw:type="line" svg:x1="15.063cm" svg:y1="7.466cm" svg:x2="15.063cm" svg:y2="8.217cm" svg:d="M15063 7466v751" svg:viewBox="0 0 1 752">
          <text:p/>
        </draw:connector>
        <draw:connector draw:style-name="gr15" draw:text-style-name="P5" draw:layer="layout" svg:x1="15.063cm" svg:y1="5.966cm" svg:x2="15.063cm" svg:y2="6.717cm" svg:d="M15063 5966v751" svg:viewBox="0 0 1 752">
          <text:p/>
        </draw:connector>
        <draw:connector draw:style-name="gr15" draw:text-style-name="P5" draw:layer="layout" draw:type="line" svg:x1="15.063cm" svg:y1="5.966cm" svg:x2="15.063cm" svg:y2="6.717cm" svg:d="M15063 5966v751" svg:viewBox="0 0 1 752">
          <text:p/>
        </draw:connector>
        <draw:connector draw:style-name="gr15" draw:text-style-name="P5" draw:layer="layout" svg:x1="15.063cm" svg:y1="5.967cm" svg:x2="15.063cm" svg:y2="6.717cm" svg:d="M15063 5967v750" svg:viewBox="0 0 1 751">
          <text:p/>
        </draw:connector>
        <draw:connector draw:style-name="gr15" draw:text-style-name="P5" draw:layer="layout" draw:type="line" svg:x1="15.063cm" svg:y1="5.967cm" svg:x2="15.063cm" svg:y2="6.717cm" svg:d="M15063 5967v750" svg:viewBox="0 0 1 751">
          <text:p/>
        </draw:connector>
        <draw:connector draw:style-name="gr15" draw:text-style-name="P5" draw:layer="layout" svg:x1="17.008cm" svg:y1="5.966cm" svg:x2="17.008cm" svg:y2="6.717cm" svg:d="M17008 5966v751" svg:viewBox="0 0 1 752">
          <text:p/>
        </draw:connector>
        <draw:connector draw:style-name="gr15" draw:text-style-name="P5" draw:layer="layout" draw:type="line" svg:x1="17.008cm" svg:y1="5.966cm" svg:x2="17.008cm" svg:y2="6.717cm" svg:d="M17008 5966v751" svg:viewBox="0 0 1 752">
          <text:p/>
        </draw:connector>
        <draw:connector draw:style-name="gr15" draw:text-style-name="P5" draw:layer="layout" svg:x1="17.008cm" svg:y1="5.967cm" svg:x2="17.008cm" svg:y2="6.717cm" svg:d="M17008 5967v750" svg:viewBox="0 0 1 751">
          <text:p/>
        </draw:connector>
        <draw:connector draw:style-name="gr15" draw:text-style-name="P5" draw:layer="layout" draw:type="line" svg:x1="17.008cm" svg:y1="5.967cm" svg:x2="17.008cm" svg:y2="6.717cm" svg:d="M17008 5967v750" svg:viewBox="0 0 1 751">
          <text:p/>
        </draw:connector>
        <draw:connector draw:style-name="gr15" draw:text-style-name="P5" draw:layer="layout" draw:type="line" svg:x1="13.507cm" svg:y1="5.592cm" svg:x2="14.675cm" svg:y2="5.591cm" draw:start-shape="id42" draw:start-glue-point="10" draw:end-shape="id43" draw:end-glue-point="6" svg:d="M13507 5592l1168-1" svg:viewBox="0 0 1169 2">
          <text:p/>
        </draw:connector>
        <draw:connector draw:style-name="gr15" draw:text-style-name="P5" draw:layer="layout" draw:type="line" svg:x1="13.507cm" svg:y1="5.592cm" svg:x2="14.675cm" svg:y2="5.591cm" draw:start-shape="id42" draw:start-glue-point="10" draw:end-shape="id43" draw:end-glue-point="6" svg:d="M13507 5592l1168-1" svg:viewBox="0 0 1169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3.118cm" svg:y1="7.466cm" svg:x2="13.118cm" svg:y2="8.217cm" svg:d="M13118 7466v751" svg:viewBox="0 0 1 752">
          <text:p/>
        </draw:connector>
        <draw:connector draw:style-name="gr15" draw:text-style-name="P5" draw:layer="layout" draw:type="line" svg:x1="13.118cm" svg:y1="7.467cm" svg:x2="13.118cm" svg:y2="8.217cm" svg:d="M13118 7467v750" svg:viewBox="0 0 1 751">
          <text:p/>
        </draw:connector>
        <draw:connector draw:style-name="gr15" draw:text-style-name="P5" draw:layer="layout" draw:type="line" svg:x1="17.008cm" svg:y1="7.466cm" svg:x2="17.008cm" svg:y2="8.217cm" svg:d="M17008 7466v751" svg:viewBox="0 0 1 75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7.092cm" svg:x2="12.73cm" svg:y2="7.091cm" svg:d="M11562 7092l1168-1" svg:viewBox="0 0 1169 2">
          <text:p/>
        </draw:connector>
        <draw:connector draw:style-name="gr15" draw:text-style-name="P5" draw:layer="layout" draw:type="line" svg:x1="11.562cm" svg:y1="7.092cm" svg:x2="12.73cm" svg:y2="7.091cm" svg:d="M11562 7092l1168-1" svg:viewBox="0 0 1169 2">
          <text:p/>
        </draw:connector>
        <draw:custom-shape draw:style-name="gr13" draw:text-style-name="P6" xml:id="id44" draw:id="id44"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45" draw:id="id45"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46" draw:id="id46"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9cm" svg:y1="4.466cm" svg:x2="13.119cm" svg:y2="5.217cm" draw:start-shape="id44" draw:start-glue-point="8" draw:end-shape="id45" draw:end-glue-point="4" svg:d="M13119 4466v751" svg:viewBox="0 0 1 752">
          <text:p/>
        </draw:connector>
        <draw:connector draw:style-name="gr14" draw:text-style-name="P5" draw:layer="layout" draw:type="line" svg:x1="13.119cm" svg:y1="4.466cm" svg:x2="13.119cm" svg:y2="5.217cm" draw:start-shape="id44" draw:start-glue-point="8" draw:end-shape="id45" draw:end-glue-point="4" svg:d="M13119 4466v751" svg:viewBox="0 0 1 752">
          <text:p/>
        </draw:connector>
        <draw:connector draw:style-name="gr14" draw:text-style-name="P5" draw:layer="layout" svg:x1="15.063cm" svg:y1="4.466cm" svg:x2="15.063cm" svg:y2="5.217cm" svg:d="M15063 4466v751" svg:viewBox="0 0 1 752">
          <text:p/>
        </draw:connector>
        <draw:connector draw:style-name="gr14" draw:text-style-name="P5" draw:layer="layout" draw:type="line" svg:x1="15.063cm" svg:y1="4.466cm" svg:x2="15.063cm" svg:y2="5.217cm" svg:d="M15063 4466v751" svg:viewBox="0 0 1 752">
          <text:p/>
        </draw:connector>
        <draw:connector draw:style-name="gr14" draw:text-style-name="P5" draw:layer="layout" svg:x1="17.008cm" svg:y1="4.466cm" svg:x2="17.008cm" svg:y2="5.217cm" svg:d="M17008 4466v751" svg:viewBox="0 0 1 752">
          <text:p/>
        </draw:connector>
        <draw:connector draw:style-name="gr14" draw:text-style-name="P5" draw:layer="layout" draw:type="line" svg:x1="17.008cm" svg:y1="4.466cm" svg:x2="17.008cm" svg:y2="5.217cm" svg:d="M17008 4466v751" svg:viewBox="0 0 1 752">
          <text:p/>
        </draw:connector>
        <draw:connector draw:style-name="gr15" draw:text-style-name="P5" draw:layer="layout" svg:x1="13.118cm" svg:y1="5.966cm" svg:x2="13.118cm" svg:y2="6.717cm" svg:d="M13118 5966v751" svg:viewBox="0 0 1 752">
          <text:p/>
        </draw:connector>
        <draw:connector draw:style-name="gr15" draw:text-style-name="P5" draw:layer="layout" draw:type="line" svg:x1="13.118cm" svg:y1="5.966cm" svg:x2="13.118cm" svg:y2="6.717cm" svg:d="M13118 5966v751" svg:viewBox="0 0 1 752">
          <text:p/>
        </draw:connector>
        <draw:connector draw:style-name="gr15" draw:text-style-name="P5" draw:layer="layout" svg:x1="13.118cm" svg:y1="5.967cm" svg:x2="13.118cm" svg:y2="6.717cm" svg:d="M13118 5967v750" svg:viewBox="0 0 1 751">
          <text:p/>
        </draw:connector>
        <draw:connector draw:style-name="gr15" draw:text-style-name="P5" draw:layer="layout" draw:type="line" svg:x1="15.063cm" svg:y1="7.466cm" svg:x2="15.063cm" svg:y2="8.217cm" svg:d="M15063 7466v751" svg:viewBox="0 0 1 752">
          <text:p/>
        </draw:connector>
        <draw:connector draw:style-name="gr15" draw:text-style-name="P5" draw:layer="layout" svg:x1="15.063cm" svg:y1="5.966cm" svg:x2="15.063cm" svg:y2="6.717cm" svg:d="M15063 5966v751" svg:viewBox="0 0 1 752">
          <text:p/>
        </draw:connector>
        <draw:connector draw:style-name="gr15" draw:text-style-name="P5" draw:layer="layout" draw:type="line" svg:x1="15.063cm" svg:y1="5.966cm" svg:x2="15.063cm" svg:y2="6.717cm" svg:d="M15063 5966v751" svg:viewBox="0 0 1 752">
          <text:p/>
        </draw:connector>
        <draw:connector draw:style-name="gr15" draw:text-style-name="P5" draw:layer="layout" svg:x1="15.063cm" svg:y1="5.967cm" svg:x2="15.063cm" svg:y2="6.717cm" svg:d="M15063 5967v750" svg:viewBox="0 0 1 751">
          <text:p/>
        </draw:connector>
        <draw:connector draw:style-name="gr15" draw:text-style-name="P5" draw:layer="layout" draw:type="line" svg:x1="15.063cm" svg:y1="5.967cm" svg:x2="15.063cm" svg:y2="6.717cm" svg:d="M15063 5967v750" svg:viewBox="0 0 1 751">
          <text:p/>
        </draw:connector>
        <draw:connector draw:style-name="gr15" draw:text-style-name="P5" draw:layer="layout" svg:x1="17.008cm" svg:y1="5.966cm" svg:x2="17.008cm" svg:y2="6.717cm" svg:d="M17008 5966v751" svg:viewBox="0 0 1 752">
          <text:p/>
        </draw:connector>
        <draw:connector draw:style-name="gr15" draw:text-style-name="P5" draw:layer="layout" draw:type="line" svg:x1="17.008cm" svg:y1="5.966cm" svg:x2="17.008cm" svg:y2="6.717cm" svg:d="M17008 5966v751" svg:viewBox="0 0 1 752">
          <text:p/>
        </draw:connector>
        <draw:connector draw:style-name="gr15" draw:text-style-name="P5" draw:layer="layout" svg:x1="17.008cm" svg:y1="5.967cm" svg:x2="17.008cm" svg:y2="6.717cm" svg:d="M17008 5967v750" svg:viewBox="0 0 1 751">
          <text:p/>
        </draw:connector>
        <draw:connector draw:style-name="gr15" draw:text-style-name="P5" draw:layer="layout" draw:type="line" svg:x1="17.008cm" svg:y1="5.967cm" svg:x2="17.008cm" svg:y2="6.717cm" svg:d="M17008 5967v750" svg:viewBox="0 0 1 751">
          <text:p/>
        </draw:connector>
        <draw:connector draw:style-name="gr15" draw:text-style-name="P5" draw:layer="layout" draw:type="line" svg:x1="13.507cm" svg:y1="5.592cm" svg:x2="14.675cm" svg:y2="5.591cm" draw:start-shape="id45" draw:start-glue-point="10" draw:end-shape="id46" draw:end-glue-point="6" svg:d="M13507 5592l1168-1" svg:viewBox="0 0 1169 2">
          <text:p/>
        </draw:connector>
        <draw:connector draw:style-name="gr15" draw:text-style-name="P5" draw:layer="layout" draw:type="line" svg:x1="13.507cm" svg:y1="5.592cm" svg:x2="14.675cm" svg:y2="5.591cm" draw:start-shape="id45" draw:start-glue-point="10" draw:end-shape="id46" draw:end-glue-point="6" svg:d="M13507 5592l1168-1" svg:viewBox="0 0 1169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3.118cm" svg:y1="7.466cm" svg:x2="13.118cm" svg:y2="8.217cm" svg:d="M13118 7466v751" svg:viewBox="0 0 1 752">
          <text:p/>
        </draw:connector>
        <draw:connector draw:style-name="gr15" draw:text-style-name="P5" draw:layer="layout" draw:type="line" svg:x1="13.118cm" svg:y1="7.467cm" svg:x2="13.118cm" svg:y2="8.217cm" svg:d="M13118 7467v750" svg:viewBox="0 0 1 751">
          <text:p/>
        </draw:connector>
        <draw:connector draw:style-name="gr15" draw:text-style-name="P5" draw:layer="layout" draw:type="line" svg:x1="17.008cm" svg:y1="7.466cm" svg:x2="17.008cm" svg:y2="8.217cm" svg:d="M17008 7466v751" svg:viewBox="0 0 1 75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7.092cm" svg:x2="12.73cm" svg:y2="7.091cm" svg:d="M11562 7092l1168-1" svg:viewBox="0 0 1169 2">
          <text:p/>
        </draw:connector>
        <draw:connector draw:style-name="gr15" draw:text-style-name="P5" draw:layer="layout" draw:type="line" svg:x1="11.562cm" svg:y1="7.092cm" svg:x2="12.73cm" svg:y2="7.091cm" svg:d="M11562 7092l1168-1" svg:viewBox="0 0 1169 2">
          <text:p/>
        </draw:connector>
        <draw:custom-shape draw:style-name="gr13" draw:text-style-name="P6" xml:id="id47" draw:id="id47"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48" draw:id="id48"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49" draw:id="id49"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9cm" svg:y1="4.466cm" svg:x2="13.119cm" svg:y2="5.217cm" draw:start-shape="id47" draw:start-glue-point="8" draw:end-shape="id48" draw:end-glue-point="4" svg:d="M13119 4466v751" svg:viewBox="0 0 1 752">
          <text:p/>
        </draw:connector>
        <draw:connector draw:style-name="gr14" draw:text-style-name="P5" draw:layer="layout" draw:type="line" svg:x1="13.119cm" svg:y1="4.466cm" svg:x2="13.119cm" svg:y2="5.217cm" draw:start-shape="id47" draw:start-glue-point="8" draw:end-shape="id48" draw:end-glue-point="4" svg:d="M13119 4466v751" svg:viewBox="0 0 1 752">
          <text:p/>
        </draw:connector>
        <draw:connector draw:style-name="gr14" draw:text-style-name="P5" draw:layer="layout" svg:x1="15.063cm" svg:y1="4.466cm" svg:x2="15.063cm" svg:y2="5.217cm" svg:d="M15063 4466v751" svg:viewBox="0 0 1 752">
          <text:p/>
        </draw:connector>
        <draw:connector draw:style-name="gr14" draw:text-style-name="P5" draw:layer="layout" draw:type="line" svg:x1="15.063cm" svg:y1="4.466cm" svg:x2="15.063cm" svg:y2="5.217cm" svg:d="M15063 4466v751" svg:viewBox="0 0 1 752">
          <text:p/>
        </draw:connector>
        <draw:connector draw:style-name="gr14" draw:text-style-name="P5" draw:layer="layout" svg:x1="17.008cm" svg:y1="4.466cm" svg:x2="17.008cm" svg:y2="5.217cm" svg:d="M17008 4466v751" svg:viewBox="0 0 1 752">
          <text:p/>
        </draw:connector>
        <draw:connector draw:style-name="gr14" draw:text-style-name="P5" draw:layer="layout" draw:type="line" svg:x1="17.008cm" svg:y1="4.466cm" svg:x2="17.008cm" svg:y2="5.217cm" svg:d="M17008 4466v751" svg:viewBox="0 0 1 752">
          <text:p/>
        </draw:connector>
        <draw:connector draw:style-name="gr15" draw:text-style-name="P5" draw:layer="layout" svg:x1="13.118cm" svg:y1="5.966cm" svg:x2="13.118cm" svg:y2="6.717cm" svg:d="M13118 5966v751" svg:viewBox="0 0 1 752">
          <text:p/>
        </draw:connector>
        <draw:connector draw:style-name="gr15" draw:text-style-name="P5" draw:layer="layout" draw:type="line" svg:x1="13.118cm" svg:y1="5.966cm" svg:x2="13.118cm" svg:y2="6.717cm" svg:d="M13118 5966v751" svg:viewBox="0 0 1 752">
          <text:p/>
        </draw:connector>
        <draw:connector draw:style-name="gr15" draw:text-style-name="P5" draw:layer="layout" svg:x1="13.118cm" svg:y1="5.967cm" svg:x2="13.118cm" svg:y2="6.717cm" svg:d="M13118 5967v750" svg:viewBox="0 0 1 751">
          <text:p/>
        </draw:connector>
        <draw:connector draw:style-name="gr15" draw:text-style-name="P5" draw:layer="layout" draw:type="line" svg:x1="15.063cm" svg:y1="7.466cm" svg:x2="15.063cm" svg:y2="8.217cm" svg:d="M15063 7466v751" svg:viewBox="0 0 1 752">
          <text:p/>
        </draw:connector>
        <draw:connector draw:style-name="gr15" draw:text-style-name="P5" draw:layer="layout" svg:x1="15.063cm" svg:y1="5.966cm" svg:x2="15.063cm" svg:y2="6.717cm" svg:d="M15063 5966v751" svg:viewBox="0 0 1 752">
          <text:p/>
        </draw:connector>
        <draw:connector draw:style-name="gr15" draw:text-style-name="P5" draw:layer="layout" draw:type="line" svg:x1="15.063cm" svg:y1="5.966cm" svg:x2="15.063cm" svg:y2="6.717cm" svg:d="M15063 5966v751" svg:viewBox="0 0 1 752">
          <text:p/>
        </draw:connector>
        <draw:connector draw:style-name="gr15" draw:text-style-name="P5" draw:layer="layout" svg:x1="15.063cm" svg:y1="5.967cm" svg:x2="15.063cm" svg:y2="6.717cm" svg:d="M15063 5967v750" svg:viewBox="0 0 1 751">
          <text:p/>
        </draw:connector>
        <draw:connector draw:style-name="gr15" draw:text-style-name="P5" draw:layer="layout" draw:type="line" svg:x1="15.063cm" svg:y1="5.967cm" svg:x2="15.063cm" svg:y2="6.717cm" svg:d="M15063 5967v750" svg:viewBox="0 0 1 751">
          <text:p/>
        </draw:connector>
        <draw:connector draw:style-name="gr15" draw:text-style-name="P5" draw:layer="layout" svg:x1="17.008cm" svg:y1="5.966cm" svg:x2="17.008cm" svg:y2="6.717cm" svg:d="M17008 5966v751" svg:viewBox="0 0 1 752">
          <text:p/>
        </draw:connector>
        <draw:connector draw:style-name="gr15" draw:text-style-name="P5" draw:layer="layout" draw:type="line" svg:x1="17.008cm" svg:y1="5.966cm" svg:x2="17.008cm" svg:y2="6.717cm" svg:d="M17008 5966v751" svg:viewBox="0 0 1 752">
          <text:p/>
        </draw:connector>
        <draw:connector draw:style-name="gr15" draw:text-style-name="P5" draw:layer="layout" svg:x1="17.008cm" svg:y1="5.967cm" svg:x2="17.008cm" svg:y2="6.717cm" svg:d="M17008 5967v750" svg:viewBox="0 0 1 751">
          <text:p/>
        </draw:connector>
        <draw:connector draw:style-name="gr15" draw:text-style-name="P5" draw:layer="layout" draw:type="line" svg:x1="17.008cm" svg:y1="5.967cm" svg:x2="17.008cm" svg:y2="6.717cm" svg:d="M17008 5967v750" svg:viewBox="0 0 1 751">
          <text:p/>
        </draw:connector>
        <draw:connector draw:style-name="gr15" draw:text-style-name="P5" draw:layer="layout" draw:type="line" svg:x1="13.507cm" svg:y1="5.592cm" svg:x2="14.675cm" svg:y2="5.591cm" draw:start-shape="id48" draw:start-glue-point="10" draw:end-shape="id49" draw:end-glue-point="6" svg:d="M13507 5592l1168-1" svg:viewBox="0 0 1169 2">
          <text:p/>
        </draw:connector>
        <draw:connector draw:style-name="gr15" draw:text-style-name="P5" draw:layer="layout" draw:type="line" svg:x1="13.507cm" svg:y1="5.592cm" svg:x2="14.675cm" svg:y2="5.591cm" draw:start-shape="id48" draw:start-glue-point="10" draw:end-shape="id49" draw:end-glue-point="6" svg:d="M13507 5592l1168-1" svg:viewBox="0 0 1169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3.118cm" svg:y1="7.466cm" svg:x2="13.118cm" svg:y2="8.217cm" svg:d="M13118 7466v751" svg:viewBox="0 0 1 752">
          <text:p/>
        </draw:connector>
        <draw:connector draw:style-name="gr15" draw:text-style-name="P5" draw:layer="layout" draw:type="line" svg:x1="13.118cm" svg:y1="7.467cm" svg:x2="13.118cm" svg:y2="8.217cm" svg:d="M13118 7467v750" svg:viewBox="0 0 1 751">
          <text:p/>
        </draw:connector>
        <draw:connector draw:style-name="gr15" draw:text-style-name="P5" draw:layer="layout" draw:type="line" svg:x1="17.008cm" svg:y1="7.466cm" svg:x2="17.008cm" svg:y2="8.217cm" svg:d="M17008 7466v751" svg:viewBox="0 0 1 75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7.092cm" svg:x2="12.73cm" svg:y2="7.091cm" svg:d="M11562 7092l1168-1" svg:viewBox="0 0 1169 2">
          <text:p/>
        </draw:connector>
        <draw:connector draw:style-name="gr15" draw:text-style-name="P5" draw:layer="layout" draw:type="line" svg:x1="11.562cm" svg:y1="7.092cm" svg:x2="12.73cm" svg:y2="7.091cm" svg:d="M11562 7092l1168-1" svg:viewBox="0 0 1169 2">
          <text:p/>
        </draw:connector>
        <draw:custom-shape draw:style-name="gr13" draw:text-style-name="P6" xml:id="id50" draw:id="id50"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51" draw:id="id51"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52" draw:id="id52"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9cm" svg:y1="4.466cm" svg:x2="13.119cm" svg:y2="5.217cm" draw:start-shape="id50" draw:start-glue-point="8" draw:end-shape="id51" draw:end-glue-point="4" svg:d="M13119 4466v751" svg:viewBox="0 0 1 752">
          <text:p/>
        </draw:connector>
        <draw:connector draw:style-name="gr14" draw:text-style-name="P5" draw:layer="layout" draw:type="line" svg:x1="13.119cm" svg:y1="4.466cm" svg:x2="13.119cm" svg:y2="5.217cm" draw:start-shape="id50" draw:start-glue-point="8" draw:end-shape="id51" draw:end-glue-point="4" svg:d="M13119 4466v751" svg:viewBox="0 0 1 752">
          <text:p/>
        </draw:connector>
        <draw:connector draw:style-name="gr14" draw:text-style-name="P5" draw:layer="layout" svg:x1="15.063cm" svg:y1="4.466cm" svg:x2="15.063cm" svg:y2="5.217cm" svg:d="M15063 4466v751" svg:viewBox="0 0 1 752">
          <text:p/>
        </draw:connector>
        <draw:connector draw:style-name="gr14" draw:text-style-name="P5" draw:layer="layout" draw:type="line" svg:x1="15.063cm" svg:y1="4.466cm" svg:x2="15.063cm" svg:y2="5.217cm" svg:d="M15063 4466v751" svg:viewBox="0 0 1 752">
          <text:p/>
        </draw:connector>
        <draw:connector draw:style-name="gr14" draw:text-style-name="P5" draw:layer="layout" svg:x1="17.008cm" svg:y1="4.466cm" svg:x2="17.008cm" svg:y2="5.217cm" svg:d="M17008 4466v751" svg:viewBox="0 0 1 752">
          <text:p/>
        </draw:connector>
        <draw:connector draw:style-name="gr14" draw:text-style-name="P5" draw:layer="layout" draw:type="line" svg:x1="17.008cm" svg:y1="4.466cm" svg:x2="17.008cm" svg:y2="5.217cm" svg:d="M17008 4466v751" svg:viewBox="0 0 1 752">
          <text:p/>
        </draw:connector>
        <draw:connector draw:style-name="gr15" draw:text-style-name="P5" draw:layer="layout" svg:x1="13.118cm" svg:y1="5.966cm" svg:x2="13.118cm" svg:y2="6.717cm" svg:d="M13118 5966v751" svg:viewBox="0 0 1 752">
          <text:p/>
        </draw:connector>
        <draw:connector draw:style-name="gr15" draw:text-style-name="P5" draw:layer="layout" draw:type="line" svg:x1="13.118cm" svg:y1="5.966cm" svg:x2="13.118cm" svg:y2="6.717cm" svg:d="M13118 5966v751" svg:viewBox="0 0 1 752">
          <text:p/>
        </draw:connector>
        <draw:connector draw:style-name="gr15" draw:text-style-name="P5" draw:layer="layout" svg:x1="13.118cm" svg:y1="5.967cm" svg:x2="13.118cm" svg:y2="6.717cm" svg:d="M13118 5967v750" svg:viewBox="0 0 1 751">
          <text:p/>
        </draw:connector>
        <draw:connector draw:style-name="gr15" draw:text-style-name="P5" draw:layer="layout" draw:type="line" svg:x1="15.063cm" svg:y1="7.466cm" svg:x2="15.063cm" svg:y2="8.217cm" svg:d="M15063 7466v751" svg:viewBox="0 0 1 752">
          <text:p/>
        </draw:connector>
        <draw:connector draw:style-name="gr15" draw:text-style-name="P5" draw:layer="layout" svg:x1="15.063cm" svg:y1="5.966cm" svg:x2="15.063cm" svg:y2="6.717cm" svg:d="M15063 5966v751" svg:viewBox="0 0 1 752">
          <text:p/>
        </draw:connector>
        <draw:connector draw:style-name="gr15" draw:text-style-name="P5" draw:layer="layout" draw:type="line" svg:x1="15.063cm" svg:y1="5.966cm" svg:x2="15.063cm" svg:y2="6.717cm" svg:d="M15063 5966v751" svg:viewBox="0 0 1 752">
          <text:p/>
        </draw:connector>
        <draw:connector draw:style-name="gr15" draw:text-style-name="P5" draw:layer="layout" svg:x1="15.063cm" svg:y1="5.967cm" svg:x2="15.063cm" svg:y2="6.717cm" svg:d="M15063 5967v750" svg:viewBox="0 0 1 751">
          <text:p/>
        </draw:connector>
        <draw:connector draw:style-name="gr15" draw:text-style-name="P5" draw:layer="layout" draw:type="line" svg:x1="15.063cm" svg:y1="5.967cm" svg:x2="15.063cm" svg:y2="6.717cm" svg:d="M15063 5967v750" svg:viewBox="0 0 1 751">
          <text:p/>
        </draw:connector>
        <draw:connector draw:style-name="gr15" draw:text-style-name="P5" draw:layer="layout" svg:x1="17.008cm" svg:y1="5.966cm" svg:x2="17.008cm" svg:y2="6.717cm" svg:d="M17008 5966v751" svg:viewBox="0 0 1 752">
          <text:p/>
        </draw:connector>
        <draw:connector draw:style-name="gr15" draw:text-style-name="P5" draw:layer="layout" draw:type="line" svg:x1="17.008cm" svg:y1="5.966cm" svg:x2="17.008cm" svg:y2="6.717cm" svg:d="M17008 5966v751" svg:viewBox="0 0 1 752">
          <text:p/>
        </draw:connector>
        <draw:connector draw:style-name="gr15" draw:text-style-name="P5" draw:layer="layout" svg:x1="17.008cm" svg:y1="5.967cm" svg:x2="17.008cm" svg:y2="6.717cm" svg:d="M17008 5967v750" svg:viewBox="0 0 1 751">
          <text:p/>
        </draw:connector>
        <draw:connector draw:style-name="gr15" draw:text-style-name="P5" draw:layer="layout" draw:type="line" svg:x1="17.008cm" svg:y1="5.967cm" svg:x2="17.008cm" svg:y2="6.717cm" svg:d="M17008 5967v750" svg:viewBox="0 0 1 751">
          <text:p/>
        </draw:connector>
        <draw:connector draw:style-name="gr15" draw:text-style-name="P5" draw:layer="layout" draw:type="line" svg:x1="13.507cm" svg:y1="5.592cm" svg:x2="14.675cm" svg:y2="5.591cm" draw:start-shape="id51" draw:start-glue-point="10" draw:end-shape="id52" draw:end-glue-point="6" svg:d="M13507 5592l1168-1" svg:viewBox="0 0 1169 2">
          <text:p/>
        </draw:connector>
        <draw:connector draw:style-name="gr15" draw:text-style-name="P5" draw:layer="layout" draw:type="line" svg:x1="13.507cm" svg:y1="5.592cm" svg:x2="14.675cm" svg:y2="5.591cm" draw:start-shape="id51" draw:start-glue-point="10" draw:end-shape="id52" draw:end-glue-point="6" svg:d="M13507 5592l1168-1" svg:viewBox="0 0 1169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3.118cm" svg:y1="7.466cm" svg:x2="13.118cm" svg:y2="8.217cm" svg:d="M13118 7466v751" svg:viewBox="0 0 1 752">
          <text:p/>
        </draw:connector>
        <draw:connector draw:style-name="gr15" draw:text-style-name="P5" draw:layer="layout" draw:type="line" svg:x1="13.118cm" svg:y1="7.467cm" svg:x2="13.118cm" svg:y2="8.217cm" svg:d="M13118 7467v750" svg:viewBox="0 0 1 751">
          <text:p/>
        </draw:connector>
        <draw:connector draw:style-name="gr15" draw:text-style-name="P5" draw:layer="layout" draw:type="line" svg:x1="17.008cm" svg:y1="7.466cm" svg:x2="17.008cm" svg:y2="8.217cm" svg:d="M17008 7466v751" svg:viewBox="0 0 1 75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7.092cm" svg:x2="12.73cm" svg:y2="7.091cm" svg:d="M11562 7092l1168-1" svg:viewBox="0 0 1169 2">
          <text:p/>
        </draw:connector>
        <draw:connector draw:style-name="gr15" draw:text-style-name="P5" draw:layer="layout" draw:type="line" svg:x1="11.562cm" svg:y1="7.092cm" svg:x2="12.73cm" svg:y2="7.091cm" svg:d="M11562 7092l1168-1" svg:viewBox="0 0 1169 2">
          <text:p/>
        </draw:connector>
        <draw:custom-shape draw:style-name="gr13" draw:text-style-name="P6" xml:id="id53" draw:id="id53"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54" draw:id="id54"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55" draw:id="id55"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9cm" svg:y1="4.466cm" svg:x2="13.119cm" svg:y2="5.217cm" draw:start-shape="id53" draw:start-glue-point="8" draw:end-shape="id54" draw:end-glue-point="4" svg:d="M13119 4466v751" svg:viewBox="0 0 1 752">
          <text:p/>
        </draw:connector>
        <draw:connector draw:style-name="gr14" draw:text-style-name="P5" draw:layer="layout" draw:type="line" svg:x1="13.119cm" svg:y1="4.466cm" svg:x2="13.119cm" svg:y2="5.217cm" draw:start-shape="id53" draw:start-glue-point="8" draw:end-shape="id54" draw:end-glue-point="4" svg:d="M13119 4466v751" svg:viewBox="0 0 1 752">
          <text:p/>
        </draw:connector>
        <draw:connector draw:style-name="gr14" draw:text-style-name="P5" draw:layer="layout" svg:x1="15.063cm" svg:y1="4.466cm" svg:x2="15.063cm" svg:y2="5.217cm" svg:d="M15063 4466v751" svg:viewBox="0 0 1 752">
          <text:p/>
        </draw:connector>
        <draw:connector draw:style-name="gr14" draw:text-style-name="P5" draw:layer="layout" draw:type="line" svg:x1="15.063cm" svg:y1="4.466cm" svg:x2="15.063cm" svg:y2="5.217cm" svg:d="M15063 4466v751" svg:viewBox="0 0 1 752">
          <text:p/>
        </draw:connector>
        <draw:connector draw:style-name="gr14" draw:text-style-name="P5" draw:layer="layout" svg:x1="17.008cm" svg:y1="4.466cm" svg:x2="17.008cm" svg:y2="5.217cm" svg:d="M17008 4466v751" svg:viewBox="0 0 1 752">
          <text:p/>
        </draw:connector>
        <draw:connector draw:style-name="gr14" draw:text-style-name="P5" draw:layer="layout" draw:type="line" svg:x1="17.008cm" svg:y1="4.466cm" svg:x2="17.008cm" svg:y2="5.217cm" svg:d="M17008 4466v751" svg:viewBox="0 0 1 752">
          <text:p/>
        </draw:connector>
        <draw:connector draw:style-name="gr15" draw:text-style-name="P5" draw:layer="layout" svg:x1="13.118cm" svg:y1="5.966cm" svg:x2="13.118cm" svg:y2="6.717cm" svg:d="M13118 5966v751" svg:viewBox="0 0 1 752">
          <text:p/>
        </draw:connector>
        <draw:connector draw:style-name="gr15" draw:text-style-name="P5" draw:layer="layout" draw:type="line" svg:x1="13.118cm" svg:y1="5.966cm" svg:x2="13.118cm" svg:y2="6.717cm" svg:d="M13118 5966v751" svg:viewBox="0 0 1 752">
          <text:p/>
        </draw:connector>
        <draw:connector draw:style-name="gr15" draw:text-style-name="P5" draw:layer="layout" svg:x1="13.118cm" svg:y1="5.967cm" svg:x2="13.118cm" svg:y2="6.717cm" svg:d="M13118 5967v750" svg:viewBox="0 0 1 751">
          <text:p/>
        </draw:connector>
        <draw:connector draw:style-name="gr15" draw:text-style-name="P5" draw:layer="layout" draw:type="line" svg:x1="15.063cm" svg:y1="7.466cm" svg:x2="15.063cm" svg:y2="8.217cm" svg:d="M15063 7466v751" svg:viewBox="0 0 1 752">
          <text:p/>
        </draw:connector>
        <draw:connector draw:style-name="gr15" draw:text-style-name="P5" draw:layer="layout" svg:x1="15.063cm" svg:y1="5.966cm" svg:x2="15.063cm" svg:y2="6.717cm" svg:d="M15063 5966v751" svg:viewBox="0 0 1 752">
          <text:p/>
        </draw:connector>
        <draw:connector draw:style-name="gr15" draw:text-style-name="P5" draw:layer="layout" draw:type="line" svg:x1="15.063cm" svg:y1="5.966cm" svg:x2="15.063cm" svg:y2="6.717cm" svg:d="M15063 5966v751" svg:viewBox="0 0 1 752">
          <text:p/>
        </draw:connector>
        <draw:connector draw:style-name="gr15" draw:text-style-name="P5" draw:layer="layout" svg:x1="15.063cm" svg:y1="5.967cm" svg:x2="15.063cm" svg:y2="6.717cm" svg:d="M15063 5967v750" svg:viewBox="0 0 1 751">
          <text:p/>
        </draw:connector>
        <draw:connector draw:style-name="gr15" draw:text-style-name="P5" draw:layer="layout" draw:type="line" svg:x1="15.063cm" svg:y1="5.967cm" svg:x2="15.063cm" svg:y2="6.717cm" svg:d="M15063 5967v750" svg:viewBox="0 0 1 751">
          <text:p/>
        </draw:connector>
        <draw:connector draw:style-name="gr15" draw:text-style-name="P5" draw:layer="layout" svg:x1="17.008cm" svg:y1="5.966cm" svg:x2="17.008cm" svg:y2="6.717cm" svg:d="M17008 5966v751" svg:viewBox="0 0 1 752">
          <text:p/>
        </draw:connector>
        <draw:connector draw:style-name="gr15" draw:text-style-name="P5" draw:layer="layout" draw:type="line" svg:x1="17.008cm" svg:y1="5.966cm" svg:x2="17.008cm" svg:y2="6.717cm" svg:d="M17008 5966v751" svg:viewBox="0 0 1 752">
          <text:p/>
        </draw:connector>
        <draw:connector draw:style-name="gr15" draw:text-style-name="P5" draw:layer="layout" svg:x1="17.008cm" svg:y1="5.967cm" svg:x2="17.008cm" svg:y2="6.717cm" svg:d="M17008 5967v750" svg:viewBox="0 0 1 751">
          <text:p/>
        </draw:connector>
        <draw:connector draw:style-name="gr15" draw:text-style-name="P5" draw:layer="layout" draw:type="line" svg:x1="17.008cm" svg:y1="5.967cm" svg:x2="17.008cm" svg:y2="6.717cm" svg:d="M17008 5967v750" svg:viewBox="0 0 1 751">
          <text:p/>
        </draw:connector>
        <draw:connector draw:style-name="gr15" draw:text-style-name="P5" draw:layer="layout" draw:type="line" svg:x1="13.507cm" svg:y1="5.592cm" svg:x2="14.675cm" svg:y2="5.591cm" draw:start-shape="id54" draw:start-glue-point="10" draw:end-shape="id55" draw:end-glue-point="6" svg:d="M13507 5592l1168-1" svg:viewBox="0 0 1169 2">
          <text:p/>
        </draw:connector>
        <draw:connector draw:style-name="gr15" draw:text-style-name="P5" draw:layer="layout" draw:type="line" svg:x1="13.507cm" svg:y1="5.592cm" svg:x2="14.675cm" svg:y2="5.591cm" draw:start-shape="id54" draw:start-glue-point="10" draw:end-shape="id55" draw:end-glue-point="6" svg:d="M13507 5592l1168-1" svg:viewBox="0 0 1169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3.118cm" svg:y1="7.466cm" svg:x2="13.118cm" svg:y2="8.217cm" svg:d="M13118 7466v751" svg:viewBox="0 0 1 752">
          <text:p/>
        </draw:connector>
        <draw:connector draw:style-name="gr15" draw:text-style-name="P5" draw:layer="layout" draw:type="line" svg:x1="13.118cm" svg:y1="7.467cm" svg:x2="13.118cm" svg:y2="8.217cm" svg:d="M13118 7467v750" svg:viewBox="0 0 1 751">
          <text:p/>
        </draw:connector>
        <draw:connector draw:style-name="gr15" draw:text-style-name="P5" draw:layer="layout" draw:type="line" svg:x1="17.008cm" svg:y1="7.466cm" svg:x2="17.008cm" svg:y2="8.217cm" svg:d="M17008 7466v751" svg:viewBox="0 0 1 75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7.092cm" svg:x2="12.73cm" svg:y2="7.091cm" svg:d="M11562 7092l1168-1" svg:viewBox="0 0 1169 2">
          <text:p/>
        </draw:connector>
        <draw:connector draw:style-name="gr15" draw:text-style-name="P5" draw:layer="layout" draw:type="line" svg:x1="11.562cm" svg:y1="7.092cm" svg:x2="12.73cm" svg:y2="7.091cm" svg:d="M11562 7092l1168-1" svg:viewBox="0 0 1169 2">
          <text:p/>
        </draw:connector>
        <draw:custom-shape draw:style-name="gr13" draw:text-style-name="P6" xml:id="id56" draw:id="id56"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57" draw:id="id57"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58" draw:id="id58"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9cm" svg:y1="4.466cm" svg:x2="13.119cm" svg:y2="5.217cm" draw:start-shape="id56" draw:start-glue-point="8" draw:end-shape="id57" draw:end-glue-point="4" svg:d="M13119 4466v751" svg:viewBox="0 0 1 752">
          <text:p/>
        </draw:connector>
        <draw:connector draw:style-name="gr14" draw:text-style-name="P5" draw:layer="layout" draw:type="line" svg:x1="13.119cm" svg:y1="4.466cm" svg:x2="13.119cm" svg:y2="5.217cm" draw:start-shape="id56" draw:start-glue-point="8" draw:end-shape="id57" draw:end-glue-point="4" svg:d="M13119 4466v751" svg:viewBox="0 0 1 752">
          <text:p/>
        </draw:connector>
        <draw:connector draw:style-name="gr14" draw:text-style-name="P5" draw:layer="layout" svg:x1="15.063cm" svg:y1="4.466cm" svg:x2="15.063cm" svg:y2="5.217cm" svg:d="M15063 4466v751" svg:viewBox="0 0 1 752">
          <text:p/>
        </draw:connector>
        <draw:connector draw:style-name="gr14" draw:text-style-name="P5" draw:layer="layout" draw:type="line" svg:x1="15.063cm" svg:y1="4.466cm" svg:x2="15.063cm" svg:y2="5.217cm" svg:d="M15063 4466v751" svg:viewBox="0 0 1 752">
          <text:p/>
        </draw:connector>
        <draw:connector draw:style-name="gr14" draw:text-style-name="P5" draw:layer="layout" svg:x1="17.008cm" svg:y1="4.466cm" svg:x2="17.008cm" svg:y2="5.217cm" svg:d="M17008 4466v751" svg:viewBox="0 0 1 752">
          <text:p/>
        </draw:connector>
        <draw:connector draw:style-name="gr14" draw:text-style-name="P5" draw:layer="layout" draw:type="line" svg:x1="17.008cm" svg:y1="4.466cm" svg:x2="17.008cm" svg:y2="5.217cm" svg:d="M17008 4466v751" svg:viewBox="0 0 1 752">
          <text:p/>
        </draw:connector>
        <draw:connector draw:style-name="gr15" draw:text-style-name="P5" draw:layer="layout" svg:x1="13.118cm" svg:y1="5.966cm" svg:x2="13.118cm" svg:y2="6.717cm" svg:d="M13118 5966v751" svg:viewBox="0 0 1 752">
          <text:p/>
        </draw:connector>
        <draw:connector draw:style-name="gr15" draw:text-style-name="P5" draw:layer="layout" draw:type="line" svg:x1="13.118cm" svg:y1="5.966cm" svg:x2="13.118cm" svg:y2="6.717cm" svg:d="M13118 5966v751" svg:viewBox="0 0 1 752">
          <text:p/>
        </draw:connector>
        <draw:connector draw:style-name="gr15" draw:text-style-name="P5" draw:layer="layout" svg:x1="13.118cm" svg:y1="5.967cm" svg:x2="13.118cm" svg:y2="6.717cm" svg:d="M13118 5967v750" svg:viewBox="0 0 1 751">
          <text:p/>
        </draw:connector>
        <draw:connector draw:style-name="gr15" draw:text-style-name="P5" draw:layer="layout" draw:type="line" svg:x1="15.063cm" svg:y1="7.466cm" svg:x2="15.063cm" svg:y2="8.217cm" svg:d="M15063 7466v751" svg:viewBox="0 0 1 752">
          <text:p/>
        </draw:connector>
        <draw:connector draw:style-name="gr15" draw:text-style-name="P5" draw:layer="layout" svg:x1="15.063cm" svg:y1="5.966cm" svg:x2="15.063cm" svg:y2="6.717cm" svg:d="M15063 5966v751" svg:viewBox="0 0 1 752">
          <text:p/>
        </draw:connector>
        <draw:connector draw:style-name="gr15" draw:text-style-name="P5" draw:layer="layout" draw:type="line" svg:x1="15.063cm" svg:y1="5.966cm" svg:x2="15.063cm" svg:y2="6.717cm" svg:d="M15063 5966v751" svg:viewBox="0 0 1 752">
          <text:p/>
        </draw:connector>
        <draw:connector draw:style-name="gr15" draw:text-style-name="P5" draw:layer="layout" svg:x1="15.063cm" svg:y1="5.967cm" svg:x2="15.063cm" svg:y2="6.717cm" svg:d="M15063 5967v750" svg:viewBox="0 0 1 751">
          <text:p/>
        </draw:connector>
        <draw:connector draw:style-name="gr15" draw:text-style-name="P5" draw:layer="layout" draw:type="line" svg:x1="15.063cm" svg:y1="5.967cm" svg:x2="15.063cm" svg:y2="6.717cm" svg:d="M15063 5967v750" svg:viewBox="0 0 1 751">
          <text:p/>
        </draw:connector>
        <draw:connector draw:style-name="gr15" draw:text-style-name="P5" draw:layer="layout" svg:x1="17.008cm" svg:y1="5.966cm" svg:x2="17.008cm" svg:y2="6.717cm" svg:d="M17008 5966v751" svg:viewBox="0 0 1 752">
          <text:p/>
        </draw:connector>
        <draw:connector draw:style-name="gr15" draw:text-style-name="P5" draw:layer="layout" draw:type="line" svg:x1="17.008cm" svg:y1="5.966cm" svg:x2="17.008cm" svg:y2="6.717cm" svg:d="M17008 5966v751" svg:viewBox="0 0 1 752">
          <text:p/>
        </draw:connector>
        <draw:connector draw:style-name="gr15" draw:text-style-name="P5" draw:layer="layout" svg:x1="17.008cm" svg:y1="5.967cm" svg:x2="17.008cm" svg:y2="6.717cm" svg:d="M17008 5967v750" svg:viewBox="0 0 1 751">
          <text:p/>
        </draw:connector>
        <draw:connector draw:style-name="gr15" draw:text-style-name="P5" draw:layer="layout" draw:type="line" svg:x1="17.008cm" svg:y1="5.967cm" svg:x2="17.008cm" svg:y2="6.717cm" svg:d="M17008 5967v750" svg:viewBox="0 0 1 751">
          <text:p/>
        </draw:connector>
        <draw:connector draw:style-name="gr15" draw:text-style-name="P5" draw:layer="layout" draw:type="line" svg:x1="13.507cm" svg:y1="5.592cm" svg:x2="14.675cm" svg:y2="5.591cm" draw:start-shape="id57" draw:start-glue-point="10" draw:end-shape="id58" draw:end-glue-point="6" svg:d="M13507 5592l1168-1" svg:viewBox="0 0 1169 2">
          <text:p/>
        </draw:connector>
        <draw:connector draw:style-name="gr15" draw:text-style-name="P5" draw:layer="layout" draw:type="line" svg:x1="13.507cm" svg:y1="5.592cm" svg:x2="14.675cm" svg:y2="5.591cm" draw:start-shape="id57" draw:start-glue-point="10" draw:end-shape="id58" draw:end-glue-point="6" svg:d="M13507 5592l1168-1" svg:viewBox="0 0 1169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3.118cm" svg:y1="7.466cm" svg:x2="13.118cm" svg:y2="8.217cm" svg:d="M13118 7466v751" svg:viewBox="0 0 1 752">
          <text:p/>
        </draw:connector>
        <draw:connector draw:style-name="gr15" draw:text-style-name="P5" draw:layer="layout" draw:type="line" svg:x1="13.118cm" svg:y1="7.467cm" svg:x2="13.118cm" svg:y2="8.217cm" svg:d="M13118 7467v750" svg:viewBox="0 0 1 751">
          <text:p/>
        </draw:connector>
        <draw:connector draw:style-name="gr15" draw:text-style-name="P5" draw:layer="layout" draw:type="line" svg:x1="17.008cm" svg:y1="7.466cm" svg:x2="17.008cm" svg:y2="8.217cm" svg:d="M17008 7466v751" svg:viewBox="0 0 1 75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7.092cm" svg:x2="12.73cm" svg:y2="7.091cm" svg:d="M11562 7092l1168-1" svg:viewBox="0 0 1169 2">
          <text:p/>
        </draw:connector>
        <draw:connector draw:style-name="gr15" draw:text-style-name="P5" draw:layer="layout" draw:type="line" svg:x1="11.562cm" svg:y1="7.092cm" svg:x2="12.73cm" svg:y2="7.091cm" svg:d="M11562 7092l1168-1" svg:viewBox="0 0 1169 2">
          <text:p/>
        </draw:connector>
        <draw:custom-shape draw:style-name="gr13" draw:text-style-name="P6" xml:id="id59" draw:id="id59"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0" draw:id="id60"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1" draw:id="id61"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9cm" svg:y1="4.466cm" svg:x2="13.119cm" svg:y2="5.217cm" draw:start-shape="id59" draw:start-glue-point="8" draw:end-shape="id60" draw:end-glue-point="4" svg:d="M13119 4466v751" svg:viewBox="0 0 1 752">
          <text:p/>
        </draw:connector>
        <draw:connector draw:style-name="gr14" draw:text-style-name="P5" draw:layer="layout" draw:type="line" svg:x1="13.119cm" svg:y1="4.466cm" svg:x2="13.119cm" svg:y2="5.217cm" draw:start-shape="id59" draw:start-glue-point="8" draw:end-shape="id60" draw:end-glue-point="4" svg:d="M13119 4466v751" svg:viewBox="0 0 1 752">
          <text:p/>
        </draw:connector>
        <draw:connector draw:style-name="gr14" draw:text-style-name="P5" draw:layer="layout" svg:x1="15.063cm" svg:y1="4.466cm" svg:x2="15.063cm" svg:y2="5.217cm" svg:d="M15063 4466v751" svg:viewBox="0 0 1 752">
          <text:p/>
        </draw:connector>
        <draw:connector draw:style-name="gr14" draw:text-style-name="P5" draw:layer="layout" draw:type="line" svg:x1="15.063cm" svg:y1="4.466cm" svg:x2="15.063cm" svg:y2="5.217cm" svg:d="M15063 4466v751" svg:viewBox="0 0 1 752">
          <text:p/>
        </draw:connector>
        <draw:connector draw:style-name="gr14" draw:text-style-name="P5" draw:layer="layout" svg:x1="17.008cm" svg:y1="4.466cm" svg:x2="17.008cm" svg:y2="5.217cm" svg:d="M17008 4466v751" svg:viewBox="0 0 1 752">
          <text:p/>
        </draw:connector>
        <draw:connector draw:style-name="gr14" draw:text-style-name="P5" draw:layer="layout" draw:type="line" svg:x1="17.008cm" svg:y1="4.466cm" svg:x2="17.008cm" svg:y2="5.217cm" svg:d="M17008 4466v751" svg:viewBox="0 0 1 752">
          <text:p/>
        </draw:connector>
        <draw:connector draw:style-name="gr15" draw:text-style-name="P5" draw:layer="layout" svg:x1="13.118cm" svg:y1="5.966cm" svg:x2="13.118cm" svg:y2="6.717cm" svg:d="M13118 5966v751" svg:viewBox="0 0 1 752">
          <text:p/>
        </draw:connector>
        <draw:connector draw:style-name="gr15" draw:text-style-name="P5" draw:layer="layout" draw:type="line" svg:x1="13.118cm" svg:y1="5.966cm" svg:x2="13.118cm" svg:y2="6.717cm" svg:d="M13118 5966v751" svg:viewBox="0 0 1 752">
          <text:p/>
        </draw:connector>
        <draw:connector draw:style-name="gr15" draw:text-style-name="P5" draw:layer="layout" svg:x1="13.118cm" svg:y1="5.967cm" svg:x2="13.118cm" svg:y2="6.717cm" svg:d="M13118 5967v750" svg:viewBox="0 0 1 751">
          <text:p/>
        </draw:connector>
        <draw:connector draw:style-name="gr15" draw:text-style-name="P5" draw:layer="layout" draw:type="line" svg:x1="15.063cm" svg:y1="7.466cm" svg:x2="15.063cm" svg:y2="8.217cm" svg:d="M15063 7466v751" svg:viewBox="0 0 1 752">
          <text:p/>
        </draw:connector>
        <draw:connector draw:style-name="gr15" draw:text-style-name="P5" draw:layer="layout" svg:x1="15.063cm" svg:y1="5.966cm" svg:x2="15.063cm" svg:y2="6.717cm" svg:d="M15063 5966v751" svg:viewBox="0 0 1 752">
          <text:p/>
        </draw:connector>
        <draw:connector draw:style-name="gr15" draw:text-style-name="P5" draw:layer="layout" draw:type="line" svg:x1="15.063cm" svg:y1="5.966cm" svg:x2="15.063cm" svg:y2="6.717cm" svg:d="M15063 5966v751" svg:viewBox="0 0 1 752">
          <text:p/>
        </draw:connector>
        <draw:connector draw:style-name="gr15" draw:text-style-name="P5" draw:layer="layout" svg:x1="15.063cm" svg:y1="5.967cm" svg:x2="15.063cm" svg:y2="6.717cm" svg:d="M15063 5967v750" svg:viewBox="0 0 1 751">
          <text:p/>
        </draw:connector>
        <draw:connector draw:style-name="gr15" draw:text-style-name="P5" draw:layer="layout" draw:type="line" svg:x1="15.063cm" svg:y1="5.967cm" svg:x2="15.063cm" svg:y2="6.717cm" svg:d="M15063 5967v750" svg:viewBox="0 0 1 751">
          <text:p/>
        </draw:connector>
        <draw:connector draw:style-name="gr15" draw:text-style-name="P5" draw:layer="layout" svg:x1="17.008cm" svg:y1="5.966cm" svg:x2="17.008cm" svg:y2="6.717cm" svg:d="M17008 5966v751" svg:viewBox="0 0 1 752">
          <text:p/>
        </draw:connector>
        <draw:connector draw:style-name="gr15" draw:text-style-name="P5" draw:layer="layout" draw:type="line" svg:x1="17.008cm" svg:y1="5.966cm" svg:x2="17.008cm" svg:y2="6.717cm" svg:d="M17008 5966v751" svg:viewBox="0 0 1 752">
          <text:p/>
        </draw:connector>
        <draw:connector draw:style-name="gr15" draw:text-style-name="P5" draw:layer="layout" svg:x1="17.008cm" svg:y1="5.967cm" svg:x2="17.008cm" svg:y2="6.717cm" svg:d="M17008 5967v750" svg:viewBox="0 0 1 751">
          <text:p/>
        </draw:connector>
        <draw:connector draw:style-name="gr15" draw:text-style-name="P5" draw:layer="layout" draw:type="line" svg:x1="17.008cm" svg:y1="5.967cm" svg:x2="17.008cm" svg:y2="6.717cm" svg:d="M17008 5967v750" svg:viewBox="0 0 1 751">
          <text:p/>
        </draw:connector>
        <draw:connector draw:style-name="gr15" draw:text-style-name="P5" draw:layer="layout" draw:type="line" svg:x1="13.507cm" svg:y1="5.592cm" svg:x2="14.675cm" svg:y2="5.591cm" draw:start-shape="id60" draw:start-glue-point="10" draw:end-shape="id61" draw:end-glue-point="6" svg:d="M13507 5592l1168-1" svg:viewBox="0 0 1169 2">
          <text:p/>
        </draw:connector>
        <draw:connector draw:style-name="gr15" draw:text-style-name="P5" draw:layer="layout" draw:type="line" svg:x1="13.507cm" svg:y1="5.592cm" svg:x2="14.675cm" svg:y2="5.591cm" draw:start-shape="id60" draw:start-glue-point="10" draw:end-shape="id61" draw:end-glue-point="6" svg:d="M13507 5592l1168-1" svg:viewBox="0 0 1169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3.118cm" svg:y1="7.466cm" svg:x2="13.118cm" svg:y2="8.217cm" svg:d="M13118 7466v751" svg:viewBox="0 0 1 752">
          <text:p/>
        </draw:connector>
        <draw:connector draw:style-name="gr15" draw:text-style-name="P5" draw:layer="layout" draw:type="line" svg:x1="13.118cm" svg:y1="7.467cm" svg:x2="13.118cm" svg:y2="8.217cm" svg:d="M13118 7467v750" svg:viewBox="0 0 1 751">
          <text:p/>
        </draw:connector>
        <draw:connector draw:style-name="gr15" draw:text-style-name="P5" draw:layer="layout" draw:type="line" svg:x1="17.008cm" svg:y1="7.466cm" svg:x2="17.008cm" svg:y2="8.217cm" svg:d="M17008 7466v751" svg:viewBox="0 0 1 75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7.092cm" svg:x2="12.73cm" svg:y2="7.091cm" svg:d="M11562 7092l1168-1" svg:viewBox="0 0 1169 2">
          <text:p/>
        </draw:connector>
        <draw:connector draw:style-name="gr15" draw:text-style-name="P5" draw:layer="layout" draw:type="line" svg:x1="11.562cm" svg:y1="7.092cm" svg:x2="12.73cm" svg:y2="7.091cm" svg:d="M11562 7092l1168-1" svg:viewBox="0 0 1169 2">
          <text:p/>
        </draw:connector>
        <draw:custom-shape draw:style-name="gr13" draw:text-style-name="P6" xml:id="id62" draw:id="id62" draw:layer="layout" svg:width="0.777cm" svg:height="0.749cm" svg:x="12.73cm" svg:y="3.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3" draw:id="id63" draw:layer="layout" svg:width="0.777cm" svg:height="0.749cm" svg:x="12.73cm" svg:y="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5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4" draw:id="id64" draw:layer="layout" svg:width="0.777cm" svg:height="0.749cm" svg:x="14.675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3cm" svg:y="6.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3.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9cm" svg:y="6.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svg:x1="13.119cm" svg:y1="4.466cm" svg:x2="13.119cm" svg:y2="5.217cm" draw:start-shape="id62" draw:start-glue-point="8" draw:end-shape="id63" draw:end-glue-point="4" svg:d="M13119 4466v751" svg:viewBox="0 0 1 752">
          <text:p/>
        </draw:connector>
        <draw:connector draw:style-name="gr14" draw:text-style-name="P5" draw:layer="layout" draw:type="line" svg:x1="13.119cm" svg:y1="4.466cm" svg:x2="13.119cm" svg:y2="5.217cm" draw:start-shape="id62" draw:start-glue-point="8" draw:end-shape="id63" draw:end-glue-point="4" svg:d="M13119 4466v751" svg:viewBox="0 0 1 752">
          <text:p/>
        </draw:connector>
        <draw:connector draw:style-name="gr14" draw:text-style-name="P5" draw:layer="layout" svg:x1="15.063cm" svg:y1="4.466cm" svg:x2="15.063cm" svg:y2="5.217cm" svg:d="M15063 4466v751" svg:viewBox="0 0 1 752">
          <text:p/>
        </draw:connector>
        <draw:connector draw:style-name="gr14" draw:text-style-name="P5" draw:layer="layout" draw:type="line" svg:x1="15.063cm" svg:y1="4.466cm" svg:x2="15.063cm" svg:y2="5.217cm" svg:d="M15063 4466v751" svg:viewBox="0 0 1 752">
          <text:p/>
        </draw:connector>
        <draw:connector draw:style-name="gr14" draw:text-style-name="P5" draw:layer="layout" svg:x1="17.008cm" svg:y1="4.466cm" svg:x2="17.008cm" svg:y2="5.217cm" svg:d="M17008 4466v751" svg:viewBox="0 0 1 752">
          <text:p/>
        </draw:connector>
        <draw:connector draw:style-name="gr14" draw:text-style-name="P5" draw:layer="layout" draw:type="line" svg:x1="17.008cm" svg:y1="4.466cm" svg:x2="17.008cm" svg:y2="5.217cm" svg:d="M17008 4466v751" svg:viewBox="0 0 1 752">
          <text:p/>
        </draw:connector>
        <draw:connector draw:style-name="gr15" draw:text-style-name="P5" draw:layer="layout" svg:x1="13.118cm" svg:y1="5.966cm" svg:x2="13.118cm" svg:y2="6.717cm" svg:d="M13118 5966v751" svg:viewBox="0 0 1 752">
          <text:p/>
        </draw:connector>
        <draw:connector draw:style-name="gr15" draw:text-style-name="P5" draw:layer="layout" draw:type="line" svg:x1="13.118cm" svg:y1="5.966cm" svg:x2="13.118cm" svg:y2="6.717cm" svg:d="M13118 5966v751" svg:viewBox="0 0 1 752">
          <text:p/>
        </draw:connector>
        <draw:connector draw:style-name="gr15" draw:text-style-name="P5" draw:layer="layout" svg:x1="13.118cm" svg:y1="5.967cm" svg:x2="13.118cm" svg:y2="6.717cm" svg:d="M13118 5967v750" svg:viewBox="0 0 1 751">
          <text:p/>
        </draw:connector>
        <draw:connector draw:style-name="gr15" draw:text-style-name="P5" draw:layer="layout" draw:type="line" svg:x1="15.063cm" svg:y1="7.466cm" svg:x2="15.063cm" svg:y2="8.217cm" svg:d="M15063 7466v751" svg:viewBox="0 0 1 752">
          <text:p/>
        </draw:connector>
        <draw:connector draw:style-name="gr15" draw:text-style-name="P5" draw:layer="layout" svg:x1="15.063cm" svg:y1="5.966cm" svg:x2="15.063cm" svg:y2="6.717cm" svg:d="M15063 5966v751" svg:viewBox="0 0 1 752">
          <text:p/>
        </draw:connector>
        <draw:connector draw:style-name="gr15" draw:text-style-name="P5" draw:layer="layout" draw:type="line" svg:x1="15.063cm" svg:y1="5.966cm" svg:x2="15.063cm" svg:y2="6.717cm" svg:d="M15063 5966v751" svg:viewBox="0 0 1 752">
          <text:p/>
        </draw:connector>
        <draw:connector draw:style-name="gr15" draw:text-style-name="P5" draw:layer="layout" svg:x1="15.063cm" svg:y1="5.967cm" svg:x2="15.063cm" svg:y2="6.717cm" svg:d="M15063 5967v750" svg:viewBox="0 0 1 751">
          <text:p/>
        </draw:connector>
        <draw:connector draw:style-name="gr15" draw:text-style-name="P5" draw:layer="layout" draw:type="line" svg:x1="15.063cm" svg:y1="5.967cm" svg:x2="15.063cm" svg:y2="6.717cm" svg:d="M15063 5967v750" svg:viewBox="0 0 1 751">
          <text:p/>
        </draw:connector>
        <draw:connector draw:style-name="gr15" draw:text-style-name="P5" draw:layer="layout" svg:x1="17.008cm" svg:y1="5.966cm" svg:x2="17.008cm" svg:y2="6.717cm" svg:d="M17008 5966v751" svg:viewBox="0 0 1 752">
          <text:p/>
        </draw:connector>
        <draw:connector draw:style-name="gr15" draw:text-style-name="P5" draw:layer="layout" draw:type="line" svg:x1="17.008cm" svg:y1="5.966cm" svg:x2="17.008cm" svg:y2="6.717cm" svg:d="M17008 5966v751" svg:viewBox="0 0 1 752">
          <text:p/>
        </draw:connector>
        <draw:connector draw:style-name="gr15" draw:text-style-name="P5" draw:layer="layout" svg:x1="17.008cm" svg:y1="5.967cm" svg:x2="17.008cm" svg:y2="6.717cm" svg:d="M17008 5967v750" svg:viewBox="0 0 1 751">
          <text:p/>
        </draw:connector>
        <draw:connector draw:style-name="gr15" draw:text-style-name="P5" draw:layer="layout" draw:type="line" svg:x1="17.008cm" svg:y1="5.967cm" svg:x2="17.008cm" svg:y2="6.717cm" svg:d="M17008 5967v750" svg:viewBox="0 0 1 751">
          <text:p/>
        </draw:connector>
        <draw:connector draw:style-name="gr15" draw:text-style-name="P5" draw:layer="layout" draw:type="line" svg:x1="13.507cm" svg:y1="5.592cm" svg:x2="14.675cm" svg:y2="5.591cm" draw:start-shape="id63" draw:start-glue-point="10" draw:end-shape="id64" draw:end-glue-point="6" svg:d="M13507 5592l1168-1" svg:viewBox="0 0 1169 2">
          <text:p/>
        </draw:connector>
        <draw:connector draw:style-name="gr15" draw:text-style-name="P5" draw:layer="layout" draw:type="line" svg:x1="13.507cm" svg:y1="5.592cm" svg:x2="14.675cm" svg:y2="5.591cm" draw:start-shape="id63" draw:start-glue-point="10" draw:end-shape="id64" draw:end-glue-point="6" svg:d="M13507 5592l1168-1" svg:viewBox="0 0 1169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5.452cm" svg:y1="5.592cm" svg:x2="16.619cm" svg:y2="5.591cm" svg:d="M15452 5592l1167-1" svg:viewBox="0 0 1168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3.507cm" svg:y1="7.092cm" svg:x2="14.675cm" svg:y2="7.091cm" svg:d="M13507 7092l1168-1" svg:viewBox="0 0 1169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5.452cm" svg:y1="7.091cm" svg:x2="16.619cm" svg:y2="7.09cm" svg:d="M15452 7091l1167-1" svg:viewBox="0 0 1168 2">
          <text:p/>
        </draw:connector>
        <draw:connector draw:style-name="gr15" draw:text-style-name="P5" draw:layer="layout" draw:type="line" svg:x1="13.118cm" svg:y1="7.466cm" svg:x2="13.118cm" svg:y2="8.217cm" svg:d="M13118 7466v751" svg:viewBox="0 0 1 752">
          <text:p/>
        </draw:connector>
        <draw:connector draw:style-name="gr15" draw:text-style-name="P5" draw:layer="layout" draw:type="line" svg:x1="13.119cm" svg:y1="7.467cm" svg:x2="13.119cm" svg:y2="8.218cm" svg:d="M13119 7467v751" svg:viewBox="0 0 1 752">
          <text:p/>
        </draw:connector>
        <draw:connector draw:style-name="gr15" draw:text-style-name="P5" draw:layer="layout" draw:type="line" svg:x1="17.008cm" svg:y1="7.466cm" svg:x2="17.008cm" svg:y2="8.217cm" svg:d="M17008 7466v751" svg:viewBox="0 0 1 75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7.092cm" svg:x2="18.564cm" svg:y2="7.091cm" svg:d="M17396 7092l1168-1" svg:viewBox="0 0 1169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7.396cm" svg:y1="5.592cm" svg:x2="18.563cm" svg:y2="5.591cm" svg:d="M17396 5592l1167-1" svg:viewBox="0 0 1168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5.592cm" svg:x2="12.73cm" svg:y2="5.591cm" svg:d="M11562 5592l1168-1" svg:viewBox="0 0 1169 2">
          <text:p/>
        </draw:connector>
        <draw:connector draw:style-name="gr15" draw:text-style-name="P5" draw:layer="layout" draw:type="line" svg:x1="11.562cm" svg:y1="7.092cm" svg:x2="12.73cm" svg:y2="7.091cm" svg:d="M11562 7092l1168-1" svg:viewBox="0 0 1169 2">
          <text:p/>
        </draw:connector>
        <draw:connector draw:style-name="gr15" draw:text-style-name="P5" draw:layer="layout" draw:type="line" svg:x1="11.562cm" svg:y1="7.092cm" svg:x2="12.73cm" svg:y2="7.091cm" svg:d="M11562 7092l1168-1" svg:viewBox="0 0 1169 2">
          <text:p/>
        </draw:connector>
        <draw:custom-shape draw:style-name="gr18"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5" draw:id="id65"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6" draw:id="id66"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13.118cm" svg:y1="13.22cm" svg:x2="13.118cm" svg:y2="13.971cm" svg:d="M13118 13220v751" svg:viewBox="0 0 1 752">
          <text:p/>
        </draw:connector>
        <draw:connector draw:style-name="gr15" draw:text-style-name="P5" draw:layer="layout" draw:type="line" svg:x1="13.118cm" svg:y1="13.22cm" svg:x2="13.118cm" svg:y2="13.971cm" svg:d="M13118 13220v751" svg:viewBox="0 0 1 752">
          <text:p/>
        </draw:connector>
        <draw:connector draw:style-name="gr15" draw:text-style-name="P5" draw:layer="layout" svg:x1="13.118cm" svg:y1="13.221cm" svg:x2="13.118cm" svg:y2="13.971cm" svg:d="M13118 13221v750" svg:viewBox="0 0 1 751">
          <text:p/>
        </draw:connector>
        <draw:connector draw:style-name="gr15" draw:text-style-name="P5" draw:layer="layout" draw:type="line" svg:x1="15.063cm" svg:y1="11.718cm" svg:x2="15.063cm" svg:y2="12.469cm" svg:d="M15063 11718v751" svg:viewBox="0 0 1 752">
          <text:p/>
        </draw:connector>
        <draw:connector draw:style-name="gr15" draw:text-style-name="P5" draw:layer="layout" svg:x1="15.062cm" svg:y1="13.22cm" svg:x2="15.062cm" svg:y2="13.971cm" svg:d="M15062 13220v751" svg:viewBox="0 0 1 752">
          <text:p/>
        </draw:connector>
        <draw:connector draw:style-name="gr15" draw:text-style-name="P5" draw:layer="layout" draw:type="line" svg:x1="15.062cm" svg:y1="13.22cm" svg:x2="15.062cm" svg:y2="13.971cm" svg:d="M15062 13220v751" svg:viewBox="0 0 1 752">
          <text:p/>
        </draw:connector>
        <draw:connector draw:style-name="gr15" draw:text-style-name="P5" draw:layer="layout" svg:x1="15.062cm" svg:y1="13.221cm" svg:x2="15.062cm" svg:y2="13.971cm" svg:d="M15062 13221v750" svg:viewBox="0 0 1 751">
          <text:p/>
        </draw:connector>
        <draw:connector draw:style-name="gr15" draw:text-style-name="P5" draw:layer="layout" draw:type="line" svg:x1="15.062cm" svg:y1="13.221cm" svg:x2="15.062cm" svg:y2="13.971cm" svg:d="M15062 13221v750" svg:viewBox="0 0 1 751">
          <text:p/>
        </draw:connector>
        <draw:connector draw:style-name="gr15" draw:text-style-name="P5" draw:layer="layout" svg:x1="17.006cm" svg:y1="13.22cm" svg:x2="17.006cm" svg:y2="13.971cm" svg:d="M17006 13220v751" svg:viewBox="0 0 1 752">
          <text:p/>
        </draw:connector>
        <draw:connector draw:style-name="gr15" draw:text-style-name="P5" draw:layer="layout" draw:type="line" svg:x1="17.006cm" svg:y1="13.22cm" svg:x2="17.006cm" svg:y2="13.971cm" svg:d="M17006 13220v751" svg:viewBox="0 0 1 752">
          <text:p/>
        </draw:connector>
        <draw:connector draw:style-name="gr15" draw:text-style-name="P5" draw:layer="layout" svg:x1="17.006cm" svg:y1="13.221cm" svg:x2="17.006cm" svg:y2="13.971cm" svg:d="M17006 13221v750" svg:viewBox="0 0 1 751">
          <text:p/>
        </draw:connector>
        <draw:connector draw:style-name="gr15" draw:text-style-name="P5" draw:layer="layout" draw:type="line" svg:x1="17.006cm" svg:y1="13.221cm" svg:x2="17.006cm" svg:y2="13.971cm" svg:d="M17006 13221v750" svg:viewBox="0 0 1 751">
          <text:p/>
        </draw:connector>
        <draw:connector draw:style-name="gr15" draw:text-style-name="P5" draw:layer="layout" draw:type="line" svg:x1="13.507cm" svg:y1="12.846cm" svg:x2="14.674cm" svg:y2="12.845cm" draw:start-shape="id65" draw:start-glue-point="10" draw:end-shape="id66" draw:end-glue-point="6" svg:d="M13507 12846l1167-1" svg:viewBox="0 0 1168 2">
          <text:p/>
        </draw:connector>
        <draw:connector draw:style-name="gr15" draw:text-style-name="P5" draw:layer="layout" draw:type="line" svg:x1="13.507cm" svg:y1="12.846cm" svg:x2="14.674cm" svg:y2="12.845cm" draw:start-shape="id65" draw:start-glue-point="10" draw:end-shape="id66" draw:end-glue-point="6" svg:d="M13507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3.118cm" svg:y1="11.718cm" svg:x2="13.118cm" svg:y2="12.469cm" svg:d="M13118 11718v751" svg:viewBox="0 0 1 752">
          <text:p/>
        </draw:connector>
        <draw:connector draw:style-name="gr15" draw:text-style-name="P5" draw:layer="layout" draw:type="line" svg:x1="13.118cm" svg:y1="11.719cm" svg:x2="13.118cm" svg:y2="12.47cm" svg:d="M13118 11719v751" svg:viewBox="0 0 1 752">
          <text:p/>
        </draw:connector>
        <draw:connector draw:style-name="gr15" draw:text-style-name="P5" draw:layer="layout" draw:type="line" svg:x1="17.007cm" svg:y1="11.718cm" svg:x2="17.007cm" svg:y2="12.469cm" svg:d="M17007 11718v751" svg:viewBox="0 0 1 75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3cm" svg:y1="11.372cm" svg:x2="12.73cm" svg:y2="11.372cm" svg:d="M11563 11372h1167" svg:viewBox="0 0 1168 1">
          <text:p/>
        </draw:connector>
        <draw:connector draw:style-name="gr15" draw:text-style-name="P5" draw:layer="layout" draw:type="line" svg:x1="11.563cm" svg:y1="11.372cm" svg:x2="12.73cm" svg:y2="11.372cm" svg:d="M11563 11372h1167" svg:viewBox="0 0 1168 1">
          <text:p/>
        </draw:connector>
        <draw:custom-shape draw:style-name="gr18"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7" draw:id="id67"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8" draw:id="id68"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13.118cm" svg:y1="13.22cm" svg:x2="13.118cm" svg:y2="13.971cm" svg:d="M13118 13220v751" svg:viewBox="0 0 1 752">
          <text:p/>
        </draw:connector>
        <draw:connector draw:style-name="gr15" draw:text-style-name="P5" draw:layer="layout" draw:type="line" svg:x1="13.118cm" svg:y1="13.22cm" svg:x2="13.118cm" svg:y2="13.971cm" svg:d="M13118 13220v751" svg:viewBox="0 0 1 752">
          <text:p/>
        </draw:connector>
        <draw:connector draw:style-name="gr15" draw:text-style-name="P5" draw:layer="layout" svg:x1="13.118cm" svg:y1="13.221cm" svg:x2="13.118cm" svg:y2="13.971cm" svg:d="M13118 13221v750" svg:viewBox="0 0 1 751">
          <text:p/>
        </draw:connector>
        <draw:connector draw:style-name="gr15" draw:text-style-name="P5" draw:layer="layout" draw:type="line" svg:x1="15.063cm" svg:y1="11.718cm" svg:x2="15.063cm" svg:y2="12.469cm" svg:d="M15063 11718v751" svg:viewBox="0 0 1 752">
          <text:p/>
        </draw:connector>
        <draw:connector draw:style-name="gr15" draw:text-style-name="P5" draw:layer="layout" svg:x1="15.062cm" svg:y1="13.22cm" svg:x2="15.062cm" svg:y2="13.971cm" svg:d="M15062 13220v751" svg:viewBox="0 0 1 752">
          <text:p/>
        </draw:connector>
        <draw:connector draw:style-name="gr15" draw:text-style-name="P5" draw:layer="layout" draw:type="line" svg:x1="15.062cm" svg:y1="13.22cm" svg:x2="15.062cm" svg:y2="13.971cm" svg:d="M15062 13220v751" svg:viewBox="0 0 1 752">
          <text:p/>
        </draw:connector>
        <draw:connector draw:style-name="gr15" draw:text-style-name="P5" draw:layer="layout" svg:x1="15.062cm" svg:y1="13.221cm" svg:x2="15.062cm" svg:y2="13.971cm" svg:d="M15062 13221v750" svg:viewBox="0 0 1 751">
          <text:p/>
        </draw:connector>
        <draw:connector draw:style-name="gr15" draw:text-style-name="P5" draw:layer="layout" draw:type="line" svg:x1="15.062cm" svg:y1="13.221cm" svg:x2="15.062cm" svg:y2="13.971cm" svg:d="M15062 13221v750" svg:viewBox="0 0 1 751">
          <text:p/>
        </draw:connector>
        <draw:connector draw:style-name="gr15" draw:text-style-name="P5" draw:layer="layout" svg:x1="17.006cm" svg:y1="13.22cm" svg:x2="17.006cm" svg:y2="13.971cm" svg:d="M17006 13220v751" svg:viewBox="0 0 1 752">
          <text:p/>
        </draw:connector>
        <draw:connector draw:style-name="gr15" draw:text-style-name="P5" draw:layer="layout" draw:type="line" svg:x1="17.006cm" svg:y1="13.22cm" svg:x2="17.006cm" svg:y2="13.971cm" svg:d="M17006 13220v751" svg:viewBox="0 0 1 752">
          <text:p/>
        </draw:connector>
        <draw:connector draw:style-name="gr15" draw:text-style-name="P5" draw:layer="layout" svg:x1="17.006cm" svg:y1="13.221cm" svg:x2="17.006cm" svg:y2="13.971cm" svg:d="M17006 13221v750" svg:viewBox="0 0 1 751">
          <text:p/>
        </draw:connector>
        <draw:connector draw:style-name="gr15" draw:text-style-name="P5" draw:layer="layout" draw:type="line" svg:x1="17.006cm" svg:y1="13.221cm" svg:x2="17.006cm" svg:y2="13.971cm" svg:d="M17006 13221v750" svg:viewBox="0 0 1 751">
          <text:p/>
        </draw:connector>
        <draw:connector draw:style-name="gr15" draw:text-style-name="P5" draw:layer="layout" draw:type="line" svg:x1="13.507cm" svg:y1="12.846cm" svg:x2="14.674cm" svg:y2="12.845cm" draw:start-shape="id67" draw:start-glue-point="10" draw:end-shape="id68" draw:end-glue-point="6" svg:d="M13507 12846l1167-1" svg:viewBox="0 0 1168 2">
          <text:p/>
        </draw:connector>
        <draw:connector draw:style-name="gr15" draw:text-style-name="P5" draw:layer="layout" draw:type="line" svg:x1="13.507cm" svg:y1="12.846cm" svg:x2="14.674cm" svg:y2="12.845cm" draw:start-shape="id67" draw:start-glue-point="10" draw:end-shape="id68" draw:end-glue-point="6" svg:d="M13507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3.118cm" svg:y1="11.718cm" svg:x2="13.118cm" svg:y2="12.469cm" svg:d="M13118 11718v751" svg:viewBox="0 0 1 752">
          <text:p/>
        </draw:connector>
        <draw:connector draw:style-name="gr15" draw:text-style-name="P5" draw:layer="layout" draw:type="line" svg:x1="13.118cm" svg:y1="11.719cm" svg:x2="13.118cm" svg:y2="12.47cm" svg:d="M13118 11719v751" svg:viewBox="0 0 1 752">
          <text:p/>
        </draw:connector>
        <draw:connector draw:style-name="gr15" draw:text-style-name="P5" draw:layer="layout" draw:type="line" svg:x1="17.007cm" svg:y1="11.718cm" svg:x2="17.007cm" svg:y2="12.469cm" svg:d="M17007 11718v751" svg:viewBox="0 0 1 75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3cm" svg:y1="11.372cm" svg:x2="12.73cm" svg:y2="11.372cm" svg:d="M11563 11372h1167" svg:viewBox="0 0 1168 1">
          <text:p/>
        </draw:connector>
        <draw:connector draw:style-name="gr15" draw:text-style-name="P5" draw:layer="layout" draw:type="line" svg:x1="11.563cm" svg:y1="11.372cm" svg:x2="12.73cm" svg:y2="11.372cm" svg:d="M11563 11372h1167" svg:viewBox="0 0 1168 1">
          <text:p/>
        </draw:connector>
        <draw:custom-shape draw:style-name="gr18"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69" draw:id="id69"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0" draw:id="id70"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13.118cm" svg:y1="13.22cm" svg:x2="13.118cm" svg:y2="13.971cm" svg:d="M13118 13220v751" svg:viewBox="0 0 1 752">
          <text:p/>
        </draw:connector>
        <draw:connector draw:style-name="gr15" draw:text-style-name="P5" draw:layer="layout" draw:type="line" svg:x1="13.118cm" svg:y1="13.22cm" svg:x2="13.118cm" svg:y2="13.971cm" svg:d="M13118 13220v751" svg:viewBox="0 0 1 752">
          <text:p/>
        </draw:connector>
        <draw:connector draw:style-name="gr15" draw:text-style-name="P5" draw:layer="layout" svg:x1="13.118cm" svg:y1="13.221cm" svg:x2="13.118cm" svg:y2="13.971cm" svg:d="M13118 13221v750" svg:viewBox="0 0 1 751">
          <text:p/>
        </draw:connector>
        <draw:connector draw:style-name="gr15" draw:text-style-name="P5" draw:layer="layout" draw:type="line" svg:x1="15.063cm" svg:y1="11.718cm" svg:x2="15.063cm" svg:y2="12.469cm" svg:d="M15063 11718v751" svg:viewBox="0 0 1 752">
          <text:p/>
        </draw:connector>
        <draw:connector draw:style-name="gr15" draw:text-style-name="P5" draw:layer="layout" svg:x1="15.062cm" svg:y1="13.22cm" svg:x2="15.062cm" svg:y2="13.971cm" svg:d="M15062 13220v751" svg:viewBox="0 0 1 752">
          <text:p/>
        </draw:connector>
        <draw:connector draw:style-name="gr15" draw:text-style-name="P5" draw:layer="layout" draw:type="line" svg:x1="15.062cm" svg:y1="13.22cm" svg:x2="15.062cm" svg:y2="13.971cm" svg:d="M15062 13220v751" svg:viewBox="0 0 1 752">
          <text:p/>
        </draw:connector>
        <draw:connector draw:style-name="gr15" draw:text-style-name="P5" draw:layer="layout" svg:x1="15.062cm" svg:y1="13.221cm" svg:x2="15.062cm" svg:y2="13.971cm" svg:d="M15062 13221v750" svg:viewBox="0 0 1 751">
          <text:p/>
        </draw:connector>
        <draw:connector draw:style-name="gr15" draw:text-style-name="P5" draw:layer="layout" draw:type="line" svg:x1="15.062cm" svg:y1="13.221cm" svg:x2="15.062cm" svg:y2="13.971cm" svg:d="M15062 13221v750" svg:viewBox="0 0 1 751">
          <text:p/>
        </draw:connector>
        <draw:connector draw:style-name="gr15" draw:text-style-name="P5" draw:layer="layout" svg:x1="17.006cm" svg:y1="13.22cm" svg:x2="17.006cm" svg:y2="13.971cm" svg:d="M17006 13220v751" svg:viewBox="0 0 1 752">
          <text:p/>
        </draw:connector>
        <draw:connector draw:style-name="gr15" draw:text-style-name="P5" draw:layer="layout" draw:type="line" svg:x1="17.006cm" svg:y1="13.22cm" svg:x2="17.006cm" svg:y2="13.971cm" svg:d="M17006 13220v751" svg:viewBox="0 0 1 752">
          <text:p/>
        </draw:connector>
        <draw:connector draw:style-name="gr15" draw:text-style-name="P5" draw:layer="layout" svg:x1="17.006cm" svg:y1="13.221cm" svg:x2="17.006cm" svg:y2="13.971cm" svg:d="M17006 13221v750" svg:viewBox="0 0 1 751">
          <text:p/>
        </draw:connector>
        <draw:connector draw:style-name="gr15" draw:text-style-name="P5" draw:layer="layout" draw:type="line" svg:x1="17.006cm" svg:y1="13.221cm" svg:x2="17.006cm" svg:y2="13.971cm" svg:d="M17006 13221v750" svg:viewBox="0 0 1 751">
          <text:p/>
        </draw:connector>
        <draw:connector draw:style-name="gr15" draw:text-style-name="P5" draw:layer="layout" draw:type="line" svg:x1="13.507cm" svg:y1="12.846cm" svg:x2="14.674cm" svg:y2="12.845cm" draw:start-shape="id69" draw:start-glue-point="10" draw:end-shape="id70" draw:end-glue-point="6" svg:d="M13507 12846l1167-1" svg:viewBox="0 0 1168 2">
          <text:p/>
        </draw:connector>
        <draw:connector draw:style-name="gr15" draw:text-style-name="P5" draw:layer="layout" draw:type="line" svg:x1="13.507cm" svg:y1="12.846cm" svg:x2="14.674cm" svg:y2="12.845cm" draw:start-shape="id69" draw:start-glue-point="10" draw:end-shape="id70" draw:end-glue-point="6" svg:d="M13507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3.118cm" svg:y1="11.718cm" svg:x2="13.118cm" svg:y2="12.469cm" svg:d="M13118 11718v751" svg:viewBox="0 0 1 752">
          <text:p/>
        </draw:connector>
        <draw:connector draw:style-name="gr15" draw:text-style-name="P5" draw:layer="layout" draw:type="line" svg:x1="13.118cm" svg:y1="11.719cm" svg:x2="13.118cm" svg:y2="12.47cm" svg:d="M13118 11719v751" svg:viewBox="0 0 1 752">
          <text:p/>
        </draw:connector>
        <draw:connector draw:style-name="gr15" draw:text-style-name="P5" draw:layer="layout" draw:type="line" svg:x1="17.007cm" svg:y1="11.718cm" svg:x2="17.007cm" svg:y2="12.469cm" svg:d="M17007 11718v751" svg:viewBox="0 0 1 75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3cm" svg:y1="11.372cm" svg:x2="12.73cm" svg:y2="11.372cm" svg:d="M11563 11372h1167" svg:viewBox="0 0 1168 1">
          <text:p/>
        </draw:connector>
        <draw:connector draw:style-name="gr15" draw:text-style-name="P5" draw:layer="layout" draw:type="line" svg:x1="11.563cm" svg:y1="11.372cm" svg:x2="12.73cm" svg:y2="11.372cm" svg:d="M11563 11372h1167" svg:viewBox="0 0 1168 1">
          <text:p/>
        </draw:connector>
        <draw:custom-shape draw:style-name="gr18"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1" draw:id="id71"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2" draw:id="id72"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13.118cm" svg:y1="13.22cm" svg:x2="13.118cm" svg:y2="13.971cm" svg:d="M13118 13220v751" svg:viewBox="0 0 1 752">
          <text:p/>
        </draw:connector>
        <draw:connector draw:style-name="gr15" draw:text-style-name="P5" draw:layer="layout" draw:type="line" svg:x1="13.118cm" svg:y1="13.22cm" svg:x2="13.118cm" svg:y2="13.971cm" svg:d="M13118 13220v751" svg:viewBox="0 0 1 752">
          <text:p/>
        </draw:connector>
        <draw:connector draw:style-name="gr15" draw:text-style-name="P5" draw:layer="layout" svg:x1="13.118cm" svg:y1="13.221cm" svg:x2="13.118cm" svg:y2="13.971cm" svg:d="M13118 13221v750" svg:viewBox="0 0 1 751">
          <text:p/>
        </draw:connector>
        <draw:connector draw:style-name="gr15" draw:text-style-name="P5" draw:layer="layout" draw:type="line" svg:x1="15.063cm" svg:y1="11.718cm" svg:x2="15.063cm" svg:y2="12.469cm" svg:d="M15063 11718v751" svg:viewBox="0 0 1 752">
          <text:p/>
        </draw:connector>
        <draw:connector draw:style-name="gr15" draw:text-style-name="P5" draw:layer="layout" svg:x1="15.062cm" svg:y1="13.22cm" svg:x2="15.062cm" svg:y2="13.971cm" svg:d="M15062 13220v751" svg:viewBox="0 0 1 752">
          <text:p/>
        </draw:connector>
        <draw:connector draw:style-name="gr15" draw:text-style-name="P5" draw:layer="layout" draw:type="line" svg:x1="15.062cm" svg:y1="13.22cm" svg:x2="15.062cm" svg:y2="13.971cm" svg:d="M15062 13220v751" svg:viewBox="0 0 1 752">
          <text:p/>
        </draw:connector>
        <draw:connector draw:style-name="gr15" draw:text-style-name="P5" draw:layer="layout" svg:x1="15.062cm" svg:y1="13.221cm" svg:x2="15.062cm" svg:y2="13.971cm" svg:d="M15062 13221v750" svg:viewBox="0 0 1 751">
          <text:p/>
        </draw:connector>
        <draw:connector draw:style-name="gr15" draw:text-style-name="P5" draw:layer="layout" draw:type="line" svg:x1="15.062cm" svg:y1="13.221cm" svg:x2="15.062cm" svg:y2="13.971cm" svg:d="M15062 13221v750" svg:viewBox="0 0 1 751">
          <text:p/>
        </draw:connector>
        <draw:connector draw:style-name="gr15" draw:text-style-name="P5" draw:layer="layout" svg:x1="17.006cm" svg:y1="13.22cm" svg:x2="17.006cm" svg:y2="13.971cm" svg:d="M17006 13220v751" svg:viewBox="0 0 1 752">
          <text:p/>
        </draw:connector>
        <draw:connector draw:style-name="gr15" draw:text-style-name="P5" draw:layer="layout" draw:type="line" svg:x1="17.006cm" svg:y1="13.22cm" svg:x2="17.006cm" svg:y2="13.971cm" svg:d="M17006 13220v751" svg:viewBox="0 0 1 752">
          <text:p/>
        </draw:connector>
        <draw:connector draw:style-name="gr15" draw:text-style-name="P5" draw:layer="layout" svg:x1="17.006cm" svg:y1="13.221cm" svg:x2="17.006cm" svg:y2="13.971cm" svg:d="M17006 13221v750" svg:viewBox="0 0 1 751">
          <text:p/>
        </draw:connector>
        <draw:connector draw:style-name="gr15" draw:text-style-name="P5" draw:layer="layout" draw:type="line" svg:x1="17.006cm" svg:y1="13.221cm" svg:x2="17.006cm" svg:y2="13.971cm" svg:d="M17006 13221v750" svg:viewBox="0 0 1 751">
          <text:p/>
        </draw:connector>
        <draw:connector draw:style-name="gr15" draw:text-style-name="P5" draw:layer="layout" draw:type="line" svg:x1="13.507cm" svg:y1="12.846cm" svg:x2="14.674cm" svg:y2="12.845cm" draw:start-shape="id71" draw:start-glue-point="10" draw:end-shape="id72" draw:end-glue-point="6" svg:d="M13507 12846l1167-1" svg:viewBox="0 0 1168 2">
          <text:p/>
        </draw:connector>
        <draw:connector draw:style-name="gr15" draw:text-style-name="P5" draw:layer="layout" draw:type="line" svg:x1="13.507cm" svg:y1="12.846cm" svg:x2="14.674cm" svg:y2="12.845cm" draw:start-shape="id71" draw:start-glue-point="10" draw:end-shape="id72" draw:end-glue-point="6" svg:d="M13507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3.118cm" svg:y1="11.718cm" svg:x2="13.118cm" svg:y2="12.469cm" svg:d="M13118 11718v751" svg:viewBox="0 0 1 752">
          <text:p/>
        </draw:connector>
        <draw:connector draw:style-name="gr15" draw:text-style-name="P5" draw:layer="layout" draw:type="line" svg:x1="13.118cm" svg:y1="11.719cm" svg:x2="13.118cm" svg:y2="12.47cm" svg:d="M13118 11719v751" svg:viewBox="0 0 1 752">
          <text:p/>
        </draw:connector>
        <draw:connector draw:style-name="gr15" draw:text-style-name="P5" draw:layer="layout" draw:type="line" svg:x1="17.007cm" svg:y1="11.718cm" svg:x2="17.007cm" svg:y2="12.469cm" svg:d="M17007 11718v751" svg:viewBox="0 0 1 75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3cm" svg:y1="11.372cm" svg:x2="12.73cm" svg:y2="11.372cm" svg:d="M11563 11372h1167" svg:viewBox="0 0 1168 1">
          <text:p/>
        </draw:connector>
        <draw:connector draw:style-name="gr15" draw:text-style-name="P5" draw:layer="layout" draw:type="line" svg:x1="11.563cm" svg:y1="11.372cm" svg:x2="12.73cm" svg:y2="11.372cm" svg:d="M11563 11372h1167" svg:viewBox="0 0 1168 1">
          <text:p/>
        </draw:connector>
        <draw:custom-shape draw:style-name="gr18"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3" draw:id="id73"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4" draw:id="id74"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13.118cm" svg:y1="13.22cm" svg:x2="13.118cm" svg:y2="13.971cm" svg:d="M13118 13220v751" svg:viewBox="0 0 1 752">
          <text:p/>
        </draw:connector>
        <draw:connector draw:style-name="gr15" draw:text-style-name="P5" draw:layer="layout" draw:type="line" svg:x1="13.118cm" svg:y1="13.22cm" svg:x2="13.118cm" svg:y2="13.971cm" svg:d="M13118 13220v751" svg:viewBox="0 0 1 752">
          <text:p/>
        </draw:connector>
        <draw:connector draw:style-name="gr15" draw:text-style-name="P5" draw:layer="layout" svg:x1="13.118cm" svg:y1="13.221cm" svg:x2="13.118cm" svg:y2="13.971cm" svg:d="M13118 13221v750" svg:viewBox="0 0 1 751">
          <text:p/>
        </draw:connector>
        <draw:connector draw:style-name="gr15" draw:text-style-name="P5" draw:layer="layout" draw:type="line" svg:x1="15.063cm" svg:y1="11.718cm" svg:x2="15.063cm" svg:y2="12.469cm" svg:d="M15063 11718v751" svg:viewBox="0 0 1 752">
          <text:p/>
        </draw:connector>
        <draw:connector draw:style-name="gr15" draw:text-style-name="P5" draw:layer="layout" svg:x1="15.062cm" svg:y1="13.22cm" svg:x2="15.062cm" svg:y2="13.971cm" svg:d="M15062 13220v751" svg:viewBox="0 0 1 752">
          <text:p/>
        </draw:connector>
        <draw:connector draw:style-name="gr15" draw:text-style-name="P5" draw:layer="layout" draw:type="line" svg:x1="15.062cm" svg:y1="13.22cm" svg:x2="15.062cm" svg:y2="13.971cm" svg:d="M15062 13220v751" svg:viewBox="0 0 1 752">
          <text:p/>
        </draw:connector>
        <draw:connector draw:style-name="gr15" draw:text-style-name="P5" draw:layer="layout" svg:x1="15.062cm" svg:y1="13.221cm" svg:x2="15.062cm" svg:y2="13.971cm" svg:d="M15062 13221v750" svg:viewBox="0 0 1 751">
          <text:p/>
        </draw:connector>
        <draw:connector draw:style-name="gr15" draw:text-style-name="P5" draw:layer="layout" draw:type="line" svg:x1="15.062cm" svg:y1="13.221cm" svg:x2="15.062cm" svg:y2="13.971cm" svg:d="M15062 13221v750" svg:viewBox="0 0 1 751">
          <text:p/>
        </draw:connector>
        <draw:connector draw:style-name="gr15" draw:text-style-name="P5" draw:layer="layout" svg:x1="17.006cm" svg:y1="13.22cm" svg:x2="17.006cm" svg:y2="13.971cm" svg:d="M17006 13220v751" svg:viewBox="0 0 1 752">
          <text:p/>
        </draw:connector>
        <draw:connector draw:style-name="gr15" draw:text-style-name="P5" draw:layer="layout" draw:type="line" svg:x1="17.006cm" svg:y1="13.22cm" svg:x2="17.006cm" svg:y2="13.971cm" svg:d="M17006 13220v751" svg:viewBox="0 0 1 752">
          <text:p/>
        </draw:connector>
        <draw:connector draw:style-name="gr15" draw:text-style-name="P5" draw:layer="layout" svg:x1="17.006cm" svg:y1="13.221cm" svg:x2="17.006cm" svg:y2="13.971cm" svg:d="M17006 13221v750" svg:viewBox="0 0 1 751">
          <text:p/>
        </draw:connector>
        <draw:connector draw:style-name="gr15" draw:text-style-name="P5" draw:layer="layout" draw:type="line" svg:x1="17.006cm" svg:y1="13.221cm" svg:x2="17.006cm" svg:y2="13.971cm" svg:d="M17006 13221v750" svg:viewBox="0 0 1 751">
          <text:p/>
        </draw:connector>
        <draw:connector draw:style-name="gr15" draw:text-style-name="P5" draw:layer="layout" draw:type="line" svg:x1="13.507cm" svg:y1="12.846cm" svg:x2="14.674cm" svg:y2="12.845cm" draw:start-shape="id73" draw:start-glue-point="10" draw:end-shape="id74" draw:end-glue-point="6" svg:d="M13507 12846l1167-1" svg:viewBox="0 0 1168 2">
          <text:p/>
        </draw:connector>
        <draw:connector draw:style-name="gr15" draw:text-style-name="P5" draw:layer="layout" draw:type="line" svg:x1="13.507cm" svg:y1="12.846cm" svg:x2="14.674cm" svg:y2="12.845cm" draw:start-shape="id73" draw:start-glue-point="10" draw:end-shape="id74" draw:end-glue-point="6" svg:d="M13507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3.118cm" svg:y1="11.718cm" svg:x2="13.118cm" svg:y2="12.469cm" svg:d="M13118 11718v751" svg:viewBox="0 0 1 752">
          <text:p/>
        </draw:connector>
        <draw:connector draw:style-name="gr15" draw:text-style-name="P5" draw:layer="layout" draw:type="line" svg:x1="13.118cm" svg:y1="11.719cm" svg:x2="13.118cm" svg:y2="12.47cm" svg:d="M13118 11719v751" svg:viewBox="0 0 1 752">
          <text:p/>
        </draw:connector>
        <draw:connector draw:style-name="gr15" draw:text-style-name="P5" draw:layer="layout" draw:type="line" svg:x1="17.007cm" svg:y1="11.718cm" svg:x2="17.007cm" svg:y2="12.469cm" svg:d="M17007 11718v751" svg:viewBox="0 0 1 75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3cm" svg:y1="11.372cm" svg:x2="12.73cm" svg:y2="11.372cm" svg:d="M11563 11372h1167" svg:viewBox="0 0 1168 1">
          <text:p/>
        </draw:connector>
        <draw:connector draw:style-name="gr15" draw:text-style-name="P5" draw:layer="layout" draw:type="line" svg:x1="11.563cm" svg:y1="11.372cm" svg:x2="12.73cm" svg:y2="11.372cm" svg:d="M11563 11372h1167" svg:viewBox="0 0 1168 1">
          <text:p/>
        </draw:connector>
        <draw:custom-shape draw:style-name="gr18"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5" draw:id="id75"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6" draw:id="id76"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13.118cm" svg:y1="13.22cm" svg:x2="13.118cm" svg:y2="13.971cm" svg:d="M13118 13220v751" svg:viewBox="0 0 1 752">
          <text:p/>
        </draw:connector>
        <draw:connector draw:style-name="gr15" draw:text-style-name="P5" draw:layer="layout" draw:type="line" svg:x1="13.118cm" svg:y1="13.22cm" svg:x2="13.118cm" svg:y2="13.971cm" svg:d="M13118 13220v751" svg:viewBox="0 0 1 752">
          <text:p/>
        </draw:connector>
        <draw:connector draw:style-name="gr15" draw:text-style-name="P5" draw:layer="layout" svg:x1="13.118cm" svg:y1="13.221cm" svg:x2="13.118cm" svg:y2="13.971cm" svg:d="M13118 13221v750" svg:viewBox="0 0 1 751">
          <text:p/>
        </draw:connector>
        <draw:connector draw:style-name="gr15" draw:text-style-name="P5" draw:layer="layout" draw:type="line" svg:x1="15.063cm" svg:y1="11.718cm" svg:x2="15.063cm" svg:y2="12.469cm" svg:d="M15063 11718v751" svg:viewBox="0 0 1 752">
          <text:p/>
        </draw:connector>
        <draw:connector draw:style-name="gr15" draw:text-style-name="P5" draw:layer="layout" svg:x1="15.062cm" svg:y1="13.22cm" svg:x2="15.062cm" svg:y2="13.971cm" svg:d="M15062 13220v751" svg:viewBox="0 0 1 752">
          <text:p/>
        </draw:connector>
        <draw:connector draw:style-name="gr15" draw:text-style-name="P5" draw:layer="layout" draw:type="line" svg:x1="15.062cm" svg:y1="13.22cm" svg:x2="15.062cm" svg:y2="13.971cm" svg:d="M15062 13220v751" svg:viewBox="0 0 1 752">
          <text:p/>
        </draw:connector>
        <draw:connector draw:style-name="gr15" draw:text-style-name="P5" draw:layer="layout" svg:x1="15.062cm" svg:y1="13.221cm" svg:x2="15.062cm" svg:y2="13.971cm" svg:d="M15062 13221v750" svg:viewBox="0 0 1 751">
          <text:p/>
        </draw:connector>
        <draw:connector draw:style-name="gr15" draw:text-style-name="P5" draw:layer="layout" draw:type="line" svg:x1="15.062cm" svg:y1="13.221cm" svg:x2="15.062cm" svg:y2="13.971cm" svg:d="M15062 13221v750" svg:viewBox="0 0 1 751">
          <text:p/>
        </draw:connector>
        <draw:connector draw:style-name="gr15" draw:text-style-name="P5" draw:layer="layout" svg:x1="17.006cm" svg:y1="13.22cm" svg:x2="17.006cm" svg:y2="13.971cm" svg:d="M17006 13220v751" svg:viewBox="0 0 1 752">
          <text:p/>
        </draw:connector>
        <draw:connector draw:style-name="gr15" draw:text-style-name="P5" draw:layer="layout" draw:type="line" svg:x1="17.006cm" svg:y1="13.22cm" svg:x2="17.006cm" svg:y2="13.971cm" svg:d="M17006 13220v751" svg:viewBox="0 0 1 752">
          <text:p/>
        </draw:connector>
        <draw:connector draw:style-name="gr15" draw:text-style-name="P5" draw:layer="layout" svg:x1="17.006cm" svg:y1="13.221cm" svg:x2="17.006cm" svg:y2="13.971cm" svg:d="M17006 13221v750" svg:viewBox="0 0 1 751">
          <text:p/>
        </draw:connector>
        <draw:connector draw:style-name="gr15" draw:text-style-name="P5" draw:layer="layout" draw:type="line" svg:x1="17.006cm" svg:y1="13.221cm" svg:x2="17.006cm" svg:y2="13.971cm" svg:d="M17006 13221v750" svg:viewBox="0 0 1 751">
          <text:p/>
        </draw:connector>
        <draw:connector draw:style-name="gr15" draw:text-style-name="P5" draw:layer="layout" draw:type="line" svg:x1="13.507cm" svg:y1="12.846cm" svg:x2="14.674cm" svg:y2="12.845cm" draw:start-shape="id75" draw:start-glue-point="10" draw:end-shape="id76" draw:end-glue-point="6" svg:d="M13507 12846l1167-1" svg:viewBox="0 0 1168 2">
          <text:p/>
        </draw:connector>
        <draw:connector draw:style-name="gr15" draw:text-style-name="P5" draw:layer="layout" draw:type="line" svg:x1="13.507cm" svg:y1="12.846cm" svg:x2="14.674cm" svg:y2="12.845cm" draw:start-shape="id75" draw:start-glue-point="10" draw:end-shape="id76" draw:end-glue-point="6" svg:d="M13507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3.118cm" svg:y1="11.718cm" svg:x2="13.118cm" svg:y2="12.469cm" svg:d="M13118 11718v751" svg:viewBox="0 0 1 752">
          <text:p/>
        </draw:connector>
        <draw:connector draw:style-name="gr15" draw:text-style-name="P5" draw:layer="layout" draw:type="line" svg:x1="13.118cm" svg:y1="11.719cm" svg:x2="13.118cm" svg:y2="12.47cm" svg:d="M13118 11719v751" svg:viewBox="0 0 1 752">
          <text:p/>
        </draw:connector>
        <draw:connector draw:style-name="gr15" draw:text-style-name="P5" draw:layer="layout" draw:type="line" svg:x1="17.007cm" svg:y1="11.718cm" svg:x2="17.007cm" svg:y2="12.469cm" svg:d="M17007 11718v751" svg:viewBox="0 0 1 75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3cm" svg:y1="11.372cm" svg:x2="12.73cm" svg:y2="11.372cm" svg:d="M11563 11372h1167" svg:viewBox="0 0 1168 1">
          <text:p/>
        </draw:connector>
        <draw:connector draw:style-name="gr15" draw:text-style-name="P5" draw:layer="layout" draw:type="line" svg:x1="11.563cm" svg:y1="11.372cm" svg:x2="12.73cm" svg:y2="11.372cm" svg:d="M11563 11372h1167" svg:viewBox="0 0 1168 1">
          <text:p/>
        </draw:connector>
        <draw:custom-shape draw:style-name="gr18"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7" draw:id="id77"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8" draw:id="id78"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13.118cm" svg:y1="13.22cm" svg:x2="13.118cm" svg:y2="13.971cm" svg:d="M13118 13220v751" svg:viewBox="0 0 1 752">
          <text:p/>
        </draw:connector>
        <draw:connector draw:style-name="gr15" draw:text-style-name="P5" draw:layer="layout" draw:type="line" svg:x1="13.118cm" svg:y1="13.22cm" svg:x2="13.118cm" svg:y2="13.971cm" svg:d="M13118 13220v751" svg:viewBox="0 0 1 752">
          <text:p/>
        </draw:connector>
        <draw:connector draw:style-name="gr15" draw:text-style-name="P5" draw:layer="layout" svg:x1="13.118cm" svg:y1="13.221cm" svg:x2="13.118cm" svg:y2="13.971cm" svg:d="M13118 13221v750" svg:viewBox="0 0 1 751">
          <text:p/>
        </draw:connector>
        <draw:connector draw:style-name="gr15" draw:text-style-name="P5" draw:layer="layout" draw:type="line" svg:x1="15.063cm" svg:y1="11.718cm" svg:x2="15.063cm" svg:y2="12.469cm" svg:d="M15063 11718v751" svg:viewBox="0 0 1 752">
          <text:p/>
        </draw:connector>
        <draw:connector draw:style-name="gr15" draw:text-style-name="P5" draw:layer="layout" svg:x1="15.062cm" svg:y1="13.22cm" svg:x2="15.062cm" svg:y2="13.971cm" svg:d="M15062 13220v751" svg:viewBox="0 0 1 752">
          <text:p/>
        </draw:connector>
        <draw:connector draw:style-name="gr15" draw:text-style-name="P5" draw:layer="layout" draw:type="line" svg:x1="15.062cm" svg:y1="13.22cm" svg:x2="15.062cm" svg:y2="13.971cm" svg:d="M15062 13220v751" svg:viewBox="0 0 1 752">
          <text:p/>
        </draw:connector>
        <draw:connector draw:style-name="gr15" draw:text-style-name="P5" draw:layer="layout" svg:x1="15.062cm" svg:y1="13.221cm" svg:x2="15.062cm" svg:y2="13.971cm" svg:d="M15062 13221v750" svg:viewBox="0 0 1 751">
          <text:p/>
        </draw:connector>
        <draw:connector draw:style-name="gr15" draw:text-style-name="P5" draw:layer="layout" draw:type="line" svg:x1="15.062cm" svg:y1="13.221cm" svg:x2="15.062cm" svg:y2="13.971cm" svg:d="M15062 13221v750" svg:viewBox="0 0 1 751">
          <text:p/>
        </draw:connector>
        <draw:connector draw:style-name="gr15" draw:text-style-name="P5" draw:layer="layout" svg:x1="17.006cm" svg:y1="13.22cm" svg:x2="17.006cm" svg:y2="13.971cm" svg:d="M17006 13220v751" svg:viewBox="0 0 1 752">
          <text:p/>
        </draw:connector>
        <draw:connector draw:style-name="gr15" draw:text-style-name="P5" draw:layer="layout" draw:type="line" svg:x1="17.006cm" svg:y1="13.22cm" svg:x2="17.006cm" svg:y2="13.971cm" svg:d="M17006 13220v751" svg:viewBox="0 0 1 752">
          <text:p/>
        </draw:connector>
        <draw:connector draw:style-name="gr15" draw:text-style-name="P5" draw:layer="layout" svg:x1="17.006cm" svg:y1="13.221cm" svg:x2="17.006cm" svg:y2="13.971cm" svg:d="M17006 13221v750" svg:viewBox="0 0 1 751">
          <text:p/>
        </draw:connector>
        <draw:connector draw:style-name="gr15" draw:text-style-name="P5" draw:layer="layout" draw:type="line" svg:x1="17.006cm" svg:y1="13.221cm" svg:x2="17.006cm" svg:y2="13.971cm" svg:d="M17006 13221v750" svg:viewBox="0 0 1 751">
          <text:p/>
        </draw:connector>
        <draw:connector draw:style-name="gr15" draw:text-style-name="P5" draw:layer="layout" draw:type="line" svg:x1="13.507cm" svg:y1="12.846cm" svg:x2="14.674cm" svg:y2="12.845cm" draw:start-shape="id77" draw:start-glue-point="10" draw:end-shape="id78" draw:end-glue-point="6" svg:d="M13507 12846l1167-1" svg:viewBox="0 0 1168 2">
          <text:p/>
        </draw:connector>
        <draw:connector draw:style-name="gr15" draw:text-style-name="P5" draw:layer="layout" draw:type="line" svg:x1="13.507cm" svg:y1="12.846cm" svg:x2="14.674cm" svg:y2="12.845cm" draw:start-shape="id77" draw:start-glue-point="10" draw:end-shape="id78" draw:end-glue-point="6" svg:d="M13507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3.118cm" svg:y1="11.718cm" svg:x2="13.118cm" svg:y2="12.469cm" svg:d="M13118 11718v751" svg:viewBox="0 0 1 752">
          <text:p/>
        </draw:connector>
        <draw:connector draw:style-name="gr15" draw:text-style-name="P5" draw:layer="layout" draw:type="line" svg:x1="13.118cm" svg:y1="11.719cm" svg:x2="13.118cm" svg:y2="12.47cm" svg:d="M13118 11719v751" svg:viewBox="0 0 1 752">
          <text:p/>
        </draw:connector>
        <draw:connector draw:style-name="gr15" draw:text-style-name="P5" draw:layer="layout" draw:type="line" svg:x1="17.007cm" svg:y1="11.718cm" svg:x2="17.007cm" svg:y2="12.469cm" svg:d="M17007 11718v751" svg:viewBox="0 0 1 75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3cm" svg:y1="11.372cm" svg:x2="12.73cm" svg:y2="11.372cm" svg:d="M11563 11372h1167" svg:viewBox="0 0 1168 1">
          <text:p/>
        </draw:connector>
        <draw:connector draw:style-name="gr15" draw:text-style-name="P5" draw:layer="layout" draw:type="line" svg:x1="11.563cm" svg:y1="11.372cm" svg:x2="12.73cm" svg:y2="11.372cm" svg:d="M11563 11372h1167" svg:viewBox="0 0 1168 1">
          <text:p/>
        </draw:connector>
        <draw:custom-shape draw:style-name="gr18" draw:text-style-name="P6" draw:layer="layout" svg:width="0.777cm" svg:height="0.75cm" svg:x="12.73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79" draw:id="id79" draw:layer="layout" svg:width="0.777cm" svg:height="0.749cm" svg:x="12.73cm" svg:y="12.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4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80" draw:id="id80" draw:layer="layout" svg:width="0.777cm" svg:height="0.749cm" svg:x="14.674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0" draw:layer="layout" svg:width="4.5cm" svg:height="1.25cm" svg:x="8.333cm" svg:y="14.5cm">
          <text:p text:style-name="P6">Longitudes</text:p>
          <draw:enhanced-geometry svg:viewBox="0 0 21600 21600" draw:type="rectangle" draw:enhanced-path="M 0 0 L 21600 0 21600 21600 0 21600 0 0 Z N"/>
        </draw:custom-shape>
        <draw:custom-shape draw:style-name="gr13" draw:text-style-name="P6" draw:layer="layout" svg:width="0.777cm" svg:height="0.749cm" svg:x="12.729cm" svg:y="13.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4.673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8cm" svg:y="1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77cm" svg:height="0.749cm" svg:x="16.617cm" svg:y="1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svg:x1="13.118cm" svg:y1="13.22cm" svg:x2="13.118cm" svg:y2="13.971cm" svg:d="M13118 13220v751" svg:viewBox="0 0 1 752">
          <text:p/>
        </draw:connector>
        <draw:connector draw:style-name="gr15" draw:text-style-name="P5" draw:layer="layout" draw:type="line" svg:x1="13.118cm" svg:y1="13.22cm" svg:x2="13.118cm" svg:y2="13.971cm" svg:d="M13118 13220v751" svg:viewBox="0 0 1 752">
          <text:p/>
        </draw:connector>
        <draw:connector draw:style-name="gr15" draw:text-style-name="P5" draw:layer="layout" svg:x1="13.118cm" svg:y1="13.221cm" svg:x2="13.118cm" svg:y2="13.971cm" svg:d="M13118 13221v750" svg:viewBox="0 0 1 751">
          <text:p/>
        </draw:connector>
        <draw:connector draw:style-name="gr15" draw:text-style-name="P5" draw:layer="layout" draw:type="line" svg:x1="15.063cm" svg:y1="11.718cm" svg:x2="15.063cm" svg:y2="12.469cm" svg:d="M15063 11718v751" svg:viewBox="0 0 1 752">
          <text:p/>
        </draw:connector>
        <draw:connector draw:style-name="gr15" draw:text-style-name="P5" draw:layer="layout" svg:x1="15.062cm" svg:y1="13.22cm" svg:x2="15.062cm" svg:y2="13.971cm" svg:d="M15062 13220v751" svg:viewBox="0 0 1 752">
          <text:p/>
        </draw:connector>
        <draw:connector draw:style-name="gr15" draw:text-style-name="P5" draw:layer="layout" draw:type="line" svg:x1="15.062cm" svg:y1="13.22cm" svg:x2="15.062cm" svg:y2="13.971cm" svg:d="M15062 13220v751" svg:viewBox="0 0 1 752">
          <text:p/>
        </draw:connector>
        <draw:connector draw:style-name="gr15" draw:text-style-name="P5" draw:layer="layout" svg:x1="15.062cm" svg:y1="13.221cm" svg:x2="15.062cm" svg:y2="13.971cm" svg:d="M15062 13221v750" svg:viewBox="0 0 1 751">
          <text:p/>
        </draw:connector>
        <draw:connector draw:style-name="gr15" draw:text-style-name="P5" draw:layer="layout" draw:type="line" svg:x1="15.062cm" svg:y1="13.221cm" svg:x2="15.062cm" svg:y2="13.971cm" svg:d="M15062 13221v750" svg:viewBox="0 0 1 751">
          <text:p/>
        </draw:connector>
        <draw:connector draw:style-name="gr15" draw:text-style-name="P5" draw:layer="layout" svg:x1="17.006cm" svg:y1="13.22cm" svg:x2="17.006cm" svg:y2="13.971cm" svg:d="M17006 13220v751" svg:viewBox="0 0 1 752">
          <text:p/>
        </draw:connector>
        <draw:connector draw:style-name="gr15" draw:text-style-name="P5" draw:layer="layout" draw:type="line" svg:x1="17.006cm" svg:y1="13.22cm" svg:x2="17.006cm" svg:y2="13.971cm" svg:d="M17006 13220v751" svg:viewBox="0 0 1 752">
          <text:p/>
        </draw:connector>
        <draw:connector draw:style-name="gr15" draw:text-style-name="P5" draw:layer="layout" svg:x1="17.006cm" svg:y1="13.221cm" svg:x2="17.006cm" svg:y2="13.971cm" svg:d="M17006 13221v750" svg:viewBox="0 0 1 751">
          <text:p/>
        </draw:connector>
        <draw:connector draw:style-name="gr15" draw:text-style-name="P5" draw:layer="layout" draw:type="line" svg:x1="17.006cm" svg:y1="13.221cm" svg:x2="17.006cm" svg:y2="13.971cm" svg:d="M17006 13221v750" svg:viewBox="0 0 1 751">
          <text:p/>
        </draw:connector>
        <draw:connector draw:style-name="gr15" draw:text-style-name="P5" draw:layer="layout" draw:type="line" svg:x1="13.507cm" svg:y1="12.846cm" svg:x2="14.674cm" svg:y2="12.845cm" draw:start-shape="id79" draw:start-glue-point="10" draw:end-shape="id80" draw:end-glue-point="6" svg:d="M13507 12846l1167-1" svg:viewBox="0 0 1168 2">
          <text:p/>
        </draw:connector>
        <draw:connector draw:style-name="gr15" draw:text-style-name="P5" draw:layer="layout" draw:type="line" svg:x1="13.507cm" svg:y1="12.846cm" svg:x2="14.674cm" svg:y2="12.845cm" draw:start-shape="id79" draw:start-glue-point="10" draw:end-shape="id80" draw:end-glue-point="6" svg:d="M13507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5.451cm" svg:y1="12.846cm" svg:x2="16.618cm" svg:y2="12.845cm" svg:d="M15451 12846l1167-1" svg:viewBox="0 0 1168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3.507cm" svg:y1="11.372cm" svg:x2="14.675cm" svg:y2="11.371cm" svg:d="M13507 11372l1168-1" svg:viewBox="0 0 1169 2">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5.452cm" svg:y1="11.372cm" svg:x2="16.618cm" svg:y2="11.372cm" svg:d="M15452 11372h1166" svg:viewBox="0 0 1167 1">
          <text:p/>
        </draw:connector>
        <draw:connector draw:style-name="gr15" draw:text-style-name="P5" draw:layer="layout" draw:type="line" svg:x1="13.118cm" svg:y1="11.718cm" svg:x2="13.118cm" svg:y2="12.469cm" svg:d="M13118 11718v751" svg:viewBox="0 0 1 752">
          <text:p/>
        </draw:connector>
        <draw:connector draw:style-name="gr15" draw:text-style-name="P5" draw:layer="layout" draw:type="line" svg:x1="13.118cm" svg:y1="11.719cm" svg:x2="13.118cm" svg:y2="12.47cm" svg:d="M13118 11719v751" svg:viewBox="0 0 1 752">
          <text:p/>
        </draw:connector>
        <draw:connector draw:style-name="gr15" draw:text-style-name="P5" draw:layer="layout" draw:type="line" svg:x1="17.007cm" svg:y1="11.718cm" svg:x2="17.007cm" svg:y2="12.469cm" svg:d="M17007 11718v751" svg:viewBox="0 0 1 75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5cm" svg:y1="11.372cm" svg:x2="18.562cm" svg:y2="11.371cm" svg:d="M17395 11372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7.394cm" svg:y1="12.846cm" svg:x2="18.561cm" svg:y2="12.845cm" svg:d="M17394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2cm" svg:y1="12.846cm" svg:x2="12.729cm" svg:y2="12.845cm" svg:d="M11562 12846l1167-1" svg:viewBox="0 0 1168 2">
          <text:p/>
        </draw:connector>
        <draw:connector draw:style-name="gr15" draw:text-style-name="P5" draw:layer="layout" draw:type="line" svg:x1="11.563cm" svg:y1="11.372cm" svg:x2="12.73cm" svg:y2="11.372cm" svg:d="M11563 11372h1167" svg:viewBox="0 0 1168 1">
          <text:p/>
        </draw:connector>
        <draw:connector draw:style-name="gr15" draw:text-style-name="P5" draw:layer="layout" draw:type="line" svg:x1="11.563cm" svg:y1="11.372cm" svg:x2="12.73cm" svg:y2="11.372cm" svg:d="M11563 11372h1167" svg:viewBox="0 0 1168 1">
          <text:p/>
        </draw:connector>
        <draw:connector draw:style-name="gr15" draw:text-style-name="P5" draw:layer="layout" draw:type="line" svg:x1="15.063cm" svg:y1="10.218cm" svg:x2="15.063cm" svg:y2="10.969cm" svg:d="M15063 10218v751" svg:viewBox="0 0 1 752">
          <text:p/>
        </draw:connector>
        <draw:connector draw:style-name="gr15" draw:text-style-name="P5" draw:layer="layout" draw:type="line" svg:x1="13.118cm" svg:y1="10.218cm" svg:x2="13.118cm" svg:y2="10.969cm" svg:d="M13118 10218v751" svg:viewBox="0 0 1 752">
          <text:p/>
        </draw:connector>
        <draw:connector draw:style-name="gr15" draw:text-style-name="P5" draw:layer="layout" draw:type="line" svg:x1="13.118cm" svg:y1="10.219cm" svg:x2="13.118cm" svg:y2="10.97cm" svg:d="M13118 10219v751" svg:viewBox="0 0 1 752">
          <text:p/>
        </draw:connector>
        <draw:connector draw:style-name="gr15" draw:text-style-name="P5" draw:layer="layout" draw:type="line" svg:x1="17.007cm" svg:y1="10.218cm" svg:x2="17.007cm" svg:y2="10.969cm" svg:d="M17007 10218v751" svg:viewBox="0 0 1 752">
          <text:p/>
        </draw:connector>
        <draw:connector draw:style-name="gr15" draw:text-style-name="P5" draw:layer="layout" draw:type="line" svg:x1="15.063cm" svg:y1="10.218cm" svg:x2="15.063cm" svg:y2="10.969cm" svg:d="M15063 10218v751" svg:viewBox="0 0 1 752">
          <text:p/>
        </draw:connector>
        <draw:connector draw:style-name="gr15" draw:text-style-name="P5" draw:layer="layout" draw:type="line" svg:x1="13.118cm" svg:y1="10.218cm" svg:x2="13.118cm" svg:y2="10.969cm" svg:d="M13118 10218v751" svg:viewBox="0 0 1 752">
          <text:p/>
        </draw:connector>
        <draw:connector draw:style-name="gr15" draw:text-style-name="P5" draw:layer="layout" draw:type="line" svg:x1="13.118cm" svg:y1="10.219cm" svg:x2="13.118cm" svg:y2="10.97cm" svg:d="M13118 10219v751" svg:viewBox="0 0 1 752">
          <text:p/>
        </draw:connector>
        <draw:connector draw:style-name="gr15" draw:text-style-name="P5" draw:layer="layout" draw:type="line" svg:x1="17.007cm" svg:y1="10.218cm" svg:x2="17.007cm" svg:y2="10.969cm" svg:d="M17007 10218v751" svg:viewBox="0 0 1 752">
          <text:p/>
        </draw:connector>
        <draw:connector draw:style-name="gr15" draw:text-style-name="P5" draw:layer="layout" draw:type="line" svg:x1="15.063cm" svg:y1="10.218cm" svg:x2="15.063cm" svg:y2="10.969cm" svg:d="M15063 10218v751" svg:viewBox="0 0 1 752">
          <text:p/>
        </draw:connector>
        <draw:connector draw:style-name="gr15" draw:text-style-name="P5" draw:layer="layout" draw:type="line" svg:x1="13.118cm" svg:y1="10.218cm" svg:x2="13.118cm" svg:y2="10.969cm" svg:d="M13118 10218v751" svg:viewBox="0 0 1 752">
          <text:p/>
        </draw:connector>
        <draw:connector draw:style-name="gr15" draw:text-style-name="P5" draw:layer="layout" draw:type="line" svg:x1="13.118cm" svg:y1="10.219cm" svg:x2="13.118cm" svg:y2="10.97cm" svg:d="M13118 10219v751" svg:viewBox="0 0 1 752">
          <text:p/>
        </draw:connector>
        <draw:connector draw:style-name="gr15" draw:text-style-name="P5" draw:layer="layout" draw:type="line" svg:x1="17.007cm" svg:y1="10.218cm" svg:x2="17.007cm" svg:y2="10.969cm" svg:d="M17007 10218v751" svg:viewBox="0 0 1 752">
          <text:p/>
        </draw:connector>
        <draw:connector draw:style-name="gr15" draw:text-style-name="P5" draw:layer="layout" draw:type="line" svg:x1="15.063cm" svg:y1="10.218cm" svg:x2="15.063cm" svg:y2="10.969cm" svg:d="M15063 10218v751" svg:viewBox="0 0 1 752">
          <text:p/>
        </draw:connector>
        <draw:connector draw:style-name="gr15" draw:text-style-name="P5" draw:layer="layout" draw:type="line" svg:x1="13.118cm" svg:y1="10.218cm" svg:x2="13.118cm" svg:y2="10.969cm" svg:d="M13118 10218v751" svg:viewBox="0 0 1 752">
          <text:p/>
        </draw:connector>
        <draw:connector draw:style-name="gr15" draw:text-style-name="P5" draw:layer="layout" draw:type="line" svg:x1="13.118cm" svg:y1="10.219cm" svg:x2="13.118cm" svg:y2="10.97cm" svg:d="M13118 10219v751" svg:viewBox="0 0 1 752">
          <text:p/>
        </draw:connector>
        <draw:connector draw:style-name="gr15" draw:text-style-name="P5" draw:layer="layout" draw:type="line" svg:x1="17.007cm" svg:y1="10.218cm" svg:x2="17.007cm" svg:y2="10.969cm" svg:d="M17007 10218v751" svg:viewBox="0 0 1 752">
          <text:p/>
        </draw:connector>
        <draw:connector draw:style-name="gr15" draw:text-style-name="P5" draw:layer="layout" draw:type="line" svg:x1="15.063cm" svg:y1="10.218cm" svg:x2="15.063cm" svg:y2="10.969cm" svg:d="M15063 10218v751" svg:viewBox="0 0 1 752">
          <text:p/>
        </draw:connector>
        <draw:connector draw:style-name="gr15" draw:text-style-name="P5" draw:layer="layout" draw:type="line" svg:x1="13.118cm" svg:y1="10.218cm" svg:x2="13.118cm" svg:y2="10.969cm" svg:d="M13118 10218v751" svg:viewBox="0 0 1 752">
          <text:p/>
        </draw:connector>
        <draw:connector draw:style-name="gr15" draw:text-style-name="P5" draw:layer="layout" draw:type="line" svg:x1="13.118cm" svg:y1="10.219cm" svg:x2="13.118cm" svg:y2="10.97cm" svg:d="M13118 10219v751" svg:viewBox="0 0 1 752">
          <text:p/>
        </draw:connector>
        <draw:connector draw:style-name="gr15" draw:text-style-name="P5" draw:layer="layout" draw:type="line" svg:x1="17.007cm" svg:y1="10.218cm" svg:x2="17.007cm" svg:y2="10.969cm" svg:d="M17007 10218v751" svg:viewBox="0 0 1 752">
          <text:p/>
        </draw:connector>
        <draw:connector draw:style-name="gr15" draw:text-style-name="P5" draw:layer="layout" draw:type="line" svg:x1="15.063cm" svg:y1="10.218cm" svg:x2="15.063cm" svg:y2="10.969cm" svg:d="M15063 10218v751" svg:viewBox="0 0 1 752">
          <text:p/>
        </draw:connector>
        <draw:connector draw:style-name="gr15" draw:text-style-name="P5" draw:layer="layout" draw:type="line" svg:x1="13.118cm" svg:y1="10.218cm" svg:x2="13.118cm" svg:y2="10.969cm" svg:d="M13118 10218v751" svg:viewBox="0 0 1 752">
          <text:p/>
        </draw:connector>
        <draw:connector draw:style-name="gr15" draw:text-style-name="P5" draw:layer="layout" draw:type="line" svg:x1="13.118cm" svg:y1="10.219cm" svg:x2="13.118cm" svg:y2="10.97cm" svg:d="M13118 10219v751" svg:viewBox="0 0 1 752">
          <text:p/>
        </draw:connector>
        <draw:connector draw:style-name="gr15" draw:text-style-name="P5" draw:layer="layout" draw:type="line" svg:x1="17.007cm" svg:y1="10.218cm" svg:x2="17.007cm" svg:y2="10.969cm" svg:d="M17007 10218v751" svg:viewBox="0 0 1 752">
          <text:p/>
        </draw:connector>
        <draw:connector draw:style-name="gr15" draw:text-style-name="P5" draw:layer="layout" draw:type="line" svg:x1="15.063cm" svg:y1="10.218cm" svg:x2="15.063cm" svg:y2="10.969cm" svg:d="M15063 10218v751" svg:viewBox="0 0 1 752">
          <text:p/>
        </draw:connector>
        <draw:connector draw:style-name="gr15" draw:text-style-name="P5" draw:layer="layout" draw:type="line" svg:x1="13.118cm" svg:y1="10.218cm" svg:x2="13.118cm" svg:y2="10.969cm" svg:d="M13118 10218v751" svg:viewBox="0 0 1 752">
          <text:p/>
        </draw:connector>
        <draw:connector draw:style-name="gr15" draw:text-style-name="P5" draw:layer="layout" draw:type="line" svg:x1="13.118cm" svg:y1="10.219cm" svg:x2="13.118cm" svg:y2="10.97cm" svg:d="M13118 10219v751" svg:viewBox="0 0 1 752">
          <text:p/>
        </draw:connector>
        <draw:connector draw:style-name="gr15" draw:text-style-name="P5" draw:layer="layout" draw:type="line" svg:x1="17.007cm" svg:y1="10.218cm" svg:x2="17.007cm" svg:y2="10.969cm" svg:d="M17007 10218v751" svg:viewBox="0 0 1 752">
          <text:p/>
        </draw:connector>
        <draw:connector draw:style-name="gr15" draw:text-style-name="P5" draw:layer="layout" draw:type="line" svg:x1="15.063cm" svg:y1="10.218cm" svg:x2="15.063cm" svg:y2="10.969cm" svg:d="M15063 10218v751" svg:viewBox="0 0 1 752">
          <text:p/>
        </draw:connector>
        <draw:connector draw:style-name="gr15" draw:text-style-name="P5" draw:layer="layout" draw:type="line" svg:x1="13.118cm" svg:y1="10.218cm" svg:x2="13.118cm" svg:y2="10.969cm" svg:d="M13118 10218v751" svg:viewBox="0 0 1 752">
          <text:p/>
        </draw:connector>
        <draw:connector draw:style-name="gr15" draw:text-style-name="P5" draw:layer="layout" draw:type="line" svg:x1="13.118cm" svg:y1="10.219cm" svg:x2="13.118cm" svg:y2="10.97cm" svg:d="M13118 10219v751" svg:viewBox="0 0 1 752">
          <text:p/>
        </draw:connector>
        <draw:connector draw:style-name="gr15" draw:text-style-name="P5" draw:layer="layout" draw:type="line" svg:x1="17.007cm" svg:y1="10.218cm" svg:x2="17.007cm" svg:y2="10.969cm" svg:d="M17007 10218v751" svg:viewBox="0 0 1 752">
          <text:p/>
        </draw:connector>
        <draw:line draw:style-name="gr20" draw:text-style-name="P5" draw:layer="layout" svg:x1="6.002cm" svg:y1="8.716cm" svg:x2="6.002cm" svg:y2="9.216cm">
          <text:p/>
        </draw:line>
        <draw:line draw:style-name="gr21" draw:text-style-name="P5" draw:layer="layout" svg:x1="10.002cm" svg:y1="6.216cm" svg:x2="11.502cm" svg:y2="6.216cm">
          <text:p/>
        </draw:line>
        <draw:line draw:style-name="gr21" draw:text-style-name="P5" draw:layer="layout" svg:x1="10.002cm" svg:y1="12.216cm" svg:x2="11.502cm" svg:y2="12.216cm">
          <text:p/>
        </draw:line>
        <draw:line draw:style-name="gr21" draw:text-style-name="P5" draw:layer="layout" svg:x1="6.002cm" svg:y1="8.716cm" svg:x2="6.002cm" svg:y2="9.716cm">
          <text:p/>
        </draw:line>
        <draw:line draw:style-name="gr21" draw:text-style-name="P5" draw:layer="layout" svg:x1="15.062cm" svg:y1="8.716cm" svg:x2="15.062cm" svg:y2="9.716cm">
          <text:p/>
        </draw:line>
        <draw:custom-shape draw:style-name="gr19" draw:text-style-name="P10" draw:layer="layout" svg:width="4.5cm" svg:height="1.25cm" draw:transform="rotate (1.5707963267949) translate (0.75cm 11.5cm)">
          <text:p text:style-name="P6">Latitudes</text:p>
          <draw:enhanced-geometry svg:viewBox="0 0 21600 21600" draw:mirror-horizontal="false" draw:mirror-vertical="false" draw:type="rectangle" draw:enhanced-path="M 0 0 L 21600 0 21600 21600 0 21600 0 0 Z N"/>
        </draw:custom-shape>
        <draw:custom-shape draw:style-name="gr22" draw:text-style-name="P11" draw:layer="layout" svg:width="0.999cm" svg:height="0.999cm" svg:x="1cm" svg:y="14cm">
          <text:p text:style-name="P6">-90</text:p>
          <draw:enhanced-geometry svg:viewBox="0 0 21600 21600" draw:type="rectangle" draw:enhanced-path="M 0 0 L 21600 0 21600 21600 0 21600 0 0 Z N"/>
        </draw:custom-shape>
        <draw:custom-shape draw:style-name="gr22" draw:text-style-name="P11" draw:layer="layout" svg:width="0.999cm" svg:height="0.999cm" svg:x="1cm" svg:y="3.501cm">
          <text:p text:style-name="P6">+90</text:p>
          <draw:enhanced-geometry svg:viewBox="0 0 21600 21600" draw:type="rectangle" draw:enhanced-path="M 0 0 L 21600 0 21600 21600 0 21600 0 0 Z N"/>
        </draw:custom-shape>
        <draw:custom-shape draw:style-name="gr22" draw:text-style-name="P11" draw:layer="layout" svg:width="0.999cm" svg:height="0.999cm" svg:x="3.394cm" svg:y="14.751cm">
          <text:p text:style-name="P6">0</text:p>
          <draw:enhanced-geometry svg:viewBox="0 0 21600 21600" draw:type="rectangle" draw:enhanced-path="M 0 0 L 21600 0 21600 21600 0 21600 0 0 Z N"/>
        </draw:custom-shape>
        <draw:custom-shape draw:style-name="gr23" draw:text-style-name="P11" draw:layer="layout" svg:width="2cm" svg:height="0.999cm" svg:x="15.954cm" svg:y="14.751cm">
          <text:p text:style-name="P6">360</text:p>
          <draw:enhanced-geometry svg:viewBox="0 0 21600 21600" draw:type="rectangle" draw:enhanced-path="M 0 0 L 21600 0 21600 21600 0 21600 0 0 Z N"/>
        </draw:custom-shape>
        <draw:frame presentation:style-name="pr18" draw:layer="layout" svg:width="8cm" svg:height="10cm" svg:x="19cm" svg:y="4cm" presentation:class="outline" presentation:user-transformed="true">
          <draw:text-box>
            <text:list text:style-name="L4">
              <text:list-item>
                <text:p>Nodes : grille de points lat-lon</text:p>
              </text:list-item>
              <text:list-item>
                <text:p>Edges : connectent les nodes. </text:p>
              </text:list-item>
              <text:list-item>
                <text:p>/!\ pôles</text:p>
              </text:list-item>
            </text:list>
          </draw:text-box>
        </draw:frame>
        <anim:par presentation:node-type="timing-root">
          <anim:par smil:begin="id9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13" draw:text-style-name="P2" draw:layer="layout" svg:width="17cm" svg:height="14cm" svg:x="2cm" svg:y="13cm" presentation:class="notes" presentation:placeholder="true">
            <draw:text-box/>
          </draw:frame>
        </presentation:notes>
      </draw:page>
      <draw:page draw:name="page8" draw:style-name="dp1" draw:master-page-name="White_2f_Blue_20_Chart" presentation:presentation-page-layout-name="AL3T1" xml:id="id91" draw:id="id91">
        <office:forms form:automatic-focus="false" form:apply-design-mode="false"/>
        <draw:frame presentation:style-name="pr11" draw:layer="layout" svg:width="9.8cm" svg:height="2cm" svg:x="0cm" svg:y="0.8cm" presentation:class="title" presentation:user-transformed="true">
          <draw:text-box>
            <text:p>Features</text:p>
          </draw:text-box>
        </draw:frame>
        <draw:custom-shape draw:style-name="gr24" draw:text-style-name="P6" draw:layer="layout" svg:width="1.5cm" svg:height="1.5cm" svg:x="7cm" svg:y="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8" draw:text-style-name="P12" draw:layer="layout" svg:width="12cm" svg:height="10cm" svg:x="1.5cm" svg:y="4.5cm" presentation:class="outline" presentation:user-transformed="true">
          <draw:text-box>
            <text:list text:style-name="L4">
              <text:list-item>
                <text:p><text:span text:style-name="T4">500 hPa geopotentiel</text:span></text:p>
              </text:list-item>
              <text:list-item>
                <text:p><text:span text:style-name="T4">500 hPa U, V composantes du vent</text:span></text:p>
              </text:list-item>
              <text:list-item>
                <text:p><text:span text:style-name="T5">sin(lat)</text:span></text:p>
              </text:list-item>
              <text:list-item>
                <text:p><text:span text:style-name="T5">cos(lon), sin(lon)</text:span></text:p>
              </text:list-item>
            </text:list>
          </draw:text-box>
        </draw:frame>
        <draw:connector draw:style-name="gr25" draw:text-style-name="P5" draw:layer="layout" draw:type="line" svg:x1="19.699cm" svg:y1="3.8cm" svg:x2="22.1cm" svg:y2="3.817cm" svg:d="M19699 3800l2401 17" svg:viewBox="0 0 2402 18">
          <text:p/>
        </draw:connector>
        <draw:frame presentation:style-name="pr18" draw:text-style-name="P13" draw:layer="layout" svg:width="10.5cm" svg:height="10cm" svg:x="15cm" svg:y="4.5cm" presentation:class="outline" presentation:user-transformed="true">
          <draw:text-box>
            <text:list text:style-name="L4">
              <text:list-item>
                <text:p><text:span text:style-name="T6">Edge length</text:span></text:p>
              </text:list-item>
              <text:list-item>
                <text:p><text:span text:style-name="T6">X, Y coordonnées relatives du nœud source / nœud destination (sorte de </text:span><text:span text:style-name="T6">codage positionnel)</text:span></text:p>
              </text:list-item>
            </text:list>
          </draw:text-box>
        </draw:frame>
        <draw:frame presentation:style-name="pr18" draw:layer="layout" svg:width="12cm" svg:height="2cm" svg:x="8.5cm" svg:y="13cm" presentation:class="outline" presentation:user-transformed="true">
          <draw:text-box>
            <text:p>Configuration barotrope</text:p>
          </draw:text-box>
        </draw:frame>
        <anim:par presentation:node-type="timing-root">
          <anim:par smil:begin="id9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13" draw:text-style-name="P2" draw:layer="layout" svg:width="17cm" svg:height="14cm" svg:x="2cm" svg:y="13cm" presentation:class="notes" presentation:placeholder="true">
            <draw:text-box/>
          </draw:frame>
        </presentation:notes>
      </draw:page>
      <draw:page draw:name="page9" draw:style-name="dp1" draw:master-page-name="White_2f_Blue_20_Chart" presentation:presentation-page-layout-name="AL3T1" xml:id="id92" draw:id="id92">
        <office:forms form:automatic-focus="false" form:apply-design-mode="false"/>
        <draw:frame presentation:style-name="pr11" draw:layer="layout" svg:width="9.8cm" svg:height="2cm" svg:x="0cm" svg:y="0.8cm" presentation:class="title" presentation:user-transformed="true">
          <draw:text-box>
            <text:p>Maj du graphe</text:p>
          </draw:text-box>
        </draw:frame>
        <draw:frame presentation:style-name="pr18" draw:layer="layout" svg:width="5.166cm" svg:height="2cm" svg:x="0.5cm" svg:y="4cm" presentation:class="outline" presentation:user-transformed="true">
          <draw:text-box>
            <text:p>Encoder</text:p>
          </draw:text-box>
        </draw:frame>
        <draw:connector draw:style-name="gr25" draw:text-style-name="P5" draw:layer="layout" draw:type="line" svg:x1="19.751cm" svg:y1="3.5cm" svg:x2="22.152cm" svg:y2="3.517cm" svg:d="M19751 3500l2401 17" svg:viewBox="0 0 2402 18">
          <text:p/>
        </draw:connector>
        <draw:custom-shape draw:style-name="gr24" draw:text-style-name="P6" draw:layer="layout" svg:width="1.5cm" svg:height="1.5cm" svg:x="11.619cm" svg:y="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8" draw:layer="layout" svg:width="5.166cm" svg:height="2cm" svg:x="0.5cm" svg:y="7cm" presentation:class="outline" presentation:user-transformed="true">
          <draw:text-box>
            <text:p>Processor</text:p>
          </draw:text-box>
        </draw:frame>
        <draw:frame presentation:style-name="pr18" draw:layer="layout" svg:width="5.166cm" svg:height="2cm" svg:x="0.5cm" svg:y="13.2cm" presentation:class="outline" presentation:user-transformed="true">
          <draw:text-box>
            <text:p>Decoder</text:p>
          </draw:text-box>
        </draw:frame>
        <draw:frame draw:style-name="gr11" draw:text-style-name="P6" draw:layer="layout" svg:width="6.585cm" svg:height="0.943cm" svg:x="9.415cm" svg:y="5cm">
          <draw:object xlink:href="./Object 2" xlink:type="simple" xlink:show="embed" xlink:actuate="onLoad">
            <loext:p/>
          </draw:object>
          <draw:image xlink:href="./ObjectReplacements/Object 2" xlink:type="simple" xlink:show="embed" xlink:actuate="onLoad"/>
        </draw:frame>
        <draw:frame draw:style-name="gr11" draw:text-style-name="P6" draw:layer="layout" svg:width="5.141cm" svg:height="0.943cm" svg:x="10.919cm" svg:y="13.6cm">
          <draw:object xlink:href="./Object 6" xlink:type="simple" xlink:show="embed" xlink:actuate="onLoad">
            <loext:p/>
          </draw:object>
          <draw:image xlink:href="./ObjectReplacements/Object 6" xlink:type="simple" xlink:show="embed" xlink:actuate="onLoad"/>
        </draw:frame>
        <draw:frame draw:style-name="gr11" draw:text-style-name="P6" draw:layer="layout" svg:width="6.693cm" svg:height="1.003cm" svg:x="19.3cm" svg:y="13.6cm">
          <draw:object xlink:href="./Object 7" xlink:type="simple" xlink:show="embed" xlink:actuate="onLoad">
            <loext:p/>
          </draw:object>
          <draw:image xlink:href="./ObjectReplacements/Object 7" xlink:type="simple" xlink:show="embed" xlink:actuate="onLoad"/>
        </draw:frame>
        <draw:frame draw:style-name="gr11" draw:text-style-name="P6" draw:layer="layout" svg:width="8.496cm" svg:height="1.105cm" svg:x="18.004cm" svg:y="7cm">
          <draw:object xlink:href="./Object 8" xlink:type="simple" xlink:show="embed" xlink:actuate="onLoad">
            <loext:p/>
          </draw:object>
          <draw:image xlink:href="./ObjectReplacements/Object 8" xlink:type="simple" xlink:show="embed" xlink:actuate="onLoad"/>
        </draw:frame>
        <draw:frame draw:style-name="gr11" draw:text-style-name="P6" draw:layer="layout" svg:width="10.665cm" svg:height="1.634cm" svg:x="8cm" svg:y="9cm">
          <draw:object xlink:href="./Object 9" xlink:type="simple" xlink:show="embed" xlink:actuate="onLoad">
            <loext:p/>
          </draw:object>
          <draw:image xlink:href="./ObjectReplacements/Object 9" xlink:type="simple" xlink:show="embed" xlink:actuate="onLoad"/>
        </draw:frame>
        <draw:custom-shape draw:style-name="gr26" draw:text-style-name="P6" draw:layer="layout" svg:width="0.999cm" svg:height="0.999cm" svg:x="2cm" svg:y="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7" draw:text-style-name="P6" draw:layer="layout" svg:width="0.999cm" svg:height="0.999cm" svg:x="2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6" draw:layer="layout" svg:width="0.999cm" svg:height="0.999cm" svg:x="2cm" svg:y="1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6" draw:layer="layout" svg:width="3.428cm" svg:height="0.886cm" svg:x="11.419cm" svg:y="11.978cm">
          <draw:object xlink:href="./Object 11" xlink:type="simple" xlink:show="embed" xlink:actuate="onLoad">
            <loext:p/>
          </draw:object>
          <draw:image xlink:href="./ObjectReplacements/Object 11" xlink:type="simple" xlink:show="embed" xlink:actuate="onLoad"/>
        </draw:frame>
        <draw:frame draw:style-name="gr11" draw:text-style-name="P6" draw:layer="layout" svg:width="5.486cm" svg:height="1.003cm" svg:x="20.557cm" svg:y="11.9cm">
          <draw:object xlink:href="./Object 12" xlink:type="simple" xlink:show="embed" xlink:actuate="onLoad">
            <loext:p/>
          </draw:object>
          <draw:image xlink:href="./ObjectReplacements/Object 12" xlink:type="simple" xlink:show="embed" xlink:actuate="onLoad"/>
        </draw:frame>
        <draw:custom-shape draw:style-name="gr13" draw:text-style-name="P6" xml:id="id81" draw:id="id81" draw:layer="layout" svg:width="0.777cm" svg:height="0.749cm" svg:x="11.197cm" svg:y="7.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xml:id="id82" draw:id="id82" draw:layer="layout" svg:width="0.777cm" svg:height="0.749cm" svg:x="13.142cm" svg:y="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1.974cm" svg:y1="7.676cm" svg:x2="13.142cm" svg:y2="7.675cm" draw:start-shape="id81" draw:start-glue-point="10" draw:end-shape="id82" draw:end-glue-point="6" svg:d="M11974 7676l1168-1" svg:viewBox="0 0 1169 2">
          <text:p/>
        </draw:connector>
        <draw:path draw:style-name="gr29" draw:text-style-name="P14" draw:layer="layout" svg:width="0.743cm" svg:height="0.545cm" svg:x="12.834cm" svg:y="6.644cm" svg:viewBox="0 0 744 546" svg:d="M744 546c-34-237-218-410-453-511-342-147-291 207-284 360v75">
          <text:p/>
        </draw:path>
        <draw:custom-shape draw:style-name="gr30" draw:text-style-name="P15" draw:layer="layout" svg:width="1cm" svg:height="1cm" svg:x="11.419cm" svg:y="6.6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 draw:text-style-name="P15" draw:layer="layout" svg:width="1cm" svg:height="1cm" svg:x="12.919cm" svg:y="6.676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6" draw:layer="layout" svg:width="0.419cm" svg:height="0.588cm" svg:x="11.319cm" svg:y="7.362cm">
          <draw:object xlink:href="./Object 10" xlink:type="simple" xlink:show="embed" xlink:actuate="onLoad">
            <loext:p/>
          </draw:object>
          <draw:image xlink:href="./ObjectReplacements/Object 10" xlink:type="simple" xlink:show="embed" xlink:actuate="onLoad"/>
        </draw:frame>
        <draw:frame draw:style-name="gr11" draw:text-style-name="P6" draw:layer="layout" svg:width="0.419cm" svg:height="0.588cm" svg:x="13.319cm" svg:y="7.361cm">
          <draw:object xlink:href="./Object 14" xlink:type="simple" xlink:show="embed" xlink:actuate="onLoad">
            <loext:p/>
          </draw:object>
          <draw:image xlink:href="./ObjectReplacements/Object 14" xlink:type="simple" xlink:show="embed" xlink:actuate="onLoad"/>
        </draw:frame>
        <draw:frame draw:style-name="gr11" draw:text-style-name="P6" draw:layer="layout" svg:width="0.946cm" svg:height="0.666cm" svg:x="11.973cm" svg:y="7.676cm">
          <draw:object xlink:href="./Object 15" xlink:type="simple" xlink:show="embed" xlink:actuate="onLoad">
            <loext:p/>
          </draw:object>
          <draw:image xlink:href="./ObjectReplacements/Object 15" xlink:type="simple" xlink:show="embed" xlink:actuate="onLoad"/>
        </draw:frame>
        <draw:custom-shape draw:style-name="gr13" draw:text-style-name="P6" xml:id="id83" draw:id="id83" draw:layer="layout" svg:width="0.777cm" svg:height="0.749cm" svg:x="21.874cm" svg:y="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1" draw:text-style-name="P5" draw:layer="layout" draw:type="line" svg:x1="22.651cm" svg:y1="9.775cm" svg:x2="23.832cm" svg:y2="9.78cm" draw:start-shape="id83" draw:start-glue-point="10" svg:d="M22651 9775l1181 5" svg:viewBox="0 0 1182 6">
          <text:p/>
        </draw:connector>
        <draw:connector draw:style-name="gr28" draw:text-style-name="P5" draw:layer="layout" draw:type="line" svg:x1="20.693cm" svg:y1="9.772cm" svg:x2="21.874cm" svg:y2="9.775cm" draw:end-shape="id83" draw:end-glue-point="6" svg:d="M20693 9772l1181 3" svg:viewBox="0 0 1182 4">
          <text:p/>
        </draw:connector>
        <draw:connector draw:style-name="gr28" draw:text-style-name="P5" draw:layer="layout" draw:type="line" svg:x1="22.253cm" svg:y1="8.662cm" svg:x2="22.263cm" svg:y2="9.4cm" draw:end-shape="id83" draw:end-glue-point="4" svg:d="M22253 8662l10 738" svg:viewBox="0 0 11 739">
          <text:p/>
        </draw:connector>
        <draw:connector draw:style-name="gr28" draw:text-style-name="P5" draw:layer="layout" draw:type="line" svg:x1="22.262cm" svg:y1="10.89cm" svg:x2="22.263cm" svg:y2="10.149cm" draw:end-shape="id83" draw:end-glue-point="8" svg:d="M22262 10890l1-741" svg:viewBox="0 0 2 742">
          <text:p/>
        </draw:connector>
        <draw:frame draw:style-name="gr11" draw:text-style-name="P6" draw:layer="layout" svg:width="0.946cm" svg:height="0.69cm" svg:x="20.151cm" svg:y="9.5cm">
          <draw:object xlink:href="./Object 16" xlink:type="simple" xlink:show="embed" xlink:actuate="onLoad">
            <loext:p/>
          </draw:object>
          <draw:image xlink:href="./ObjectReplacements/Object 16" xlink:type="simple" xlink:show="embed" xlink:actuate="onLoad"/>
        </draw:frame>
        <draw:frame draw:style-name="gr11" draw:text-style-name="P6" draw:layer="layout" svg:width="0.419cm" svg:height="0.588cm" svg:x="22.051cm" svg:y="9.5cm">
          <draw:object xlink:href="./Object 20" xlink:type="simple" xlink:show="embed" xlink:actuate="onLoad">
            <loext:p/>
          </draw:object>
          <draw:image xlink:href="./ObjectReplacements/Object 20" xlink:type="simple" xlink:show="embed" xlink:actuate="onLoad"/>
        </draw:frame>
        <draw:frame draw:style-name="gr11" draw:text-style-name="P6" draw:layer="layout" svg:width="0.948cm" svg:height="0.69cm" svg:x="21.798cm" svg:y="10.71cm">
          <draw:object xlink:href="./Object 17" xlink:type="simple" xlink:show="embed" xlink:actuate="onLoad">
            <loext:p/>
          </draw:object>
          <draw:image xlink:href="./ObjectReplacements/Object 17" xlink:type="simple" xlink:show="embed" xlink:actuate="onLoad"/>
        </draw:frame>
        <draw:frame draw:style-name="gr11" draw:text-style-name="P6" draw:layer="layout" svg:width="0.946cm" svg:height="0.69cm" svg:x="21.805cm" svg:y="8.2cm">
          <draw:object xlink:href="./Object 18" xlink:type="simple" xlink:show="embed" xlink:actuate="onLoad">
            <loext:p/>
          </draw:object>
          <draw:image xlink:href="./ObjectReplacements/Object 18" xlink:type="simple" xlink:show="embed" xlink:actuate="onLoad"/>
        </draw:frame>
        <draw:frame draw:style-name="gr11" draw:text-style-name="P6" draw:layer="layout" svg:width="0.95cm" svg:height="0.69cm" svg:x="23.851cm" svg:y="9.41cm">
          <draw:object xlink:href="./Object 19" xlink:type="simple" xlink:show="embed" xlink:actuate="onLoad">
            <loext:p/>
          </draw:object>
          <draw:image xlink:href="./ObjectReplacements/Object 19" xlink:type="simple" xlink:show="embed" xlink:actuate="onLoad"/>
        </draw:frame>
        <draw:frame presentation:style-name="pr18" draw:text-style-name="P16" draw:layer="layout" svg:width="3.666cm" svg:height="1cm" svg:x="1cm" svg:y="10cm" presentation:class="outline" presentation:user-transformed="true">
          <draw:text-box>
            <text:p><text:span text:style-name="T7">x N layers</text:span></text:p>
            <text:p><text:span text:style-name="T7"/></text:p>
          </draw:text-box>
        </draw:frame>
        <draw:custom-shape draw:style-name="gr32" draw:text-style-name="P15" draw:layer="layout" svg:width="5.527cm" svg:height="1.99cm" draw:transform="skewX (0.0991347015132779) rotate (1.66993102830817) translate (7.464cm 12.5cm)">
          <text:p/>
          <draw:enhanced-geometry svg:viewBox="0 0 21600 21600" draw:mirror-horizontal="false" draw:mirror-vertical="true" draw:text-areas="0 0 21600 21600" draw:type="circular-arrow" draw:modifiers="180 12.6924917018434 10097.39734937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18" draw:text-style-name="P16" draw:layer="layout" svg:width="5.666cm" svg:height="1cm" draw:transform="rotate (1.5707963267949) translate (6cm 12.366cm)" presentation:class="outline" presentation:user-transformed="true">
          <draw:text-box>
            <text:p><text:span text:style-name="T7">Residual connexion</text:span></text:p>
          </draw:text-box>
        </draw:frame>
        <draw:line draw:style-name="gr33" draw:text-style-name="P14" draw:layer="layout" svg:x1="6.5cm" svg:y1="6.5cm" svg:x2="26.5cm" svg:y2="6.5cm">
          <text:p/>
        </draw:line>
        <draw:line draw:style-name="gr33" draw:text-style-name="P14" draw:layer="layout" svg:x1="6.5cm" svg:y1="12.9cm" svg:x2="26.5cm" svg:y2="12.9cm">
          <text:p/>
        </draw:line>
        <draw:custom-shape draw:style-name="gr34" draw:text-style-name="P17" draw:layer="layout" svg:width="0.499cm" svg:height="0.999cm" svg:x="17cm" svg:y="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7" draw:layer="layout" svg:width="0.499cm" svg:height="0.999cm" svg:x="17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6" draw:layer="layout" svg:width="7.335cm" svg:height="1.003cm" svg:x="17.5cm" svg:y="4.997cm">
          <draw:object xlink:href="./Object 21" xlink:type="simple" xlink:show="embed" xlink:actuate="onLoad">
            <loext:p/>
          </draw:object>
          <draw:image xlink:href="./ObjectReplacements/Object 21" xlink:type="simple" xlink:show="embed" xlink:actuate="onLoad"/>
        </draw:frame>
        <draw:frame draw:style-name="gr11" draw:text-style-name="P6" draw:layer="layout" svg:width="0.419cm" svg:height="0.588cm" svg:x="12.081cm" svg:y="3.412cm">
          <draw:object xlink:href="./Object 3" xlink:type="simple" xlink:show="embed" xlink:actuate="onLoad">
            <loext:p/>
          </draw:object>
          <draw:image xlink:href="./ObjectReplacements/Object 3" xlink:type="simple" xlink:show="embed" xlink:actuate="onLoad"/>
        </draw:frame>
        <draw:frame draw:style-name="gr11" draw:text-style-name="P6" draw:layer="layout" svg:width="0.946cm" svg:height="0.666cm" svg:x="20.5cm" svg:y="3.517cm">
          <draw:object xlink:href="./Object 22" xlink:type="simple" xlink:show="embed" xlink:actuate="onLoad">
            <loext:p/>
          </draw:object>
          <draw:image xlink:href="./ObjectReplacements/Object 22" xlink:type="simple" xlink:show="embed" xlink:actuate="onLoad"/>
        </draw:frame>
        <anim:par presentation:node-type="timing-root">
          <anim:par smil:begin="id9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13" draw:text-style-name="P7" draw:layer="layout" svg:width="17cm" svg:height="14cm" svg:x="2cm" svg:y="13cm" presentation:class="notes" presentation:placeholder="true">
            <draw:text-box/>
          </draw:frame>
        </presentation:notes>
      </draw:page>
      <draw:page draw:name="page10" draw:style-name="dp1" draw:master-page-name="White_2f_Blue_20_Chart" presentation:presentation-page-layout-name="AL3T1" xml:id="id93" draw:id="id93">
        <office:forms form:automatic-focus="false" form:apply-design-mode="false"/>
        <draw:frame presentation:style-name="pr11" draw:layer="layout" svg:width="9.8cm" svg:height="2cm" svg:x="0cm" svg:y="0.8cm" presentation:class="title" presentation:user-transformed="true">
          <draw:text-box>
            <text:p>Entrée et sortie</text:p>
          </draw:text-box>
        </draw:frame>
        <draw:frame presentation:style-name="pr12" draw:layer="layout" svg:width="25.2cm" svg:height="10.5cm" svg:x="1.4cm" svg:y="3.5cm" presentation:class="outline" presentation:user-transformed="true">
          <draw:text-box>
            <text:list text:style-name="L4">
              <text:list-item>
                <text:p>Entrée : ECMWF ERA5</text:p>
                <text:list>
                  <text:list-item>
                    <text:p>Résolution abaissée de 0,25° à 1° </text:p>
                  </text:list-item>
                  <text:list-item>
                    <text:p>Normalisation moyenne zéro et variance unitaire</text:p>
                  </text:list-item>
                </text:list>
              </text:list-item>
              <text:list-item>
                <text:p>Sortie </text:p>
                <text:list>
                  <text:list-item>
                    <text:p>Sortie calculée par nœud via un MLP :</text:p>
                    <text:p/>
                  </text:list-item>
                  <text:list-item>
                    <text:p>La sortie est une différence donc : </text:p>
                  </text:list-item>
                </text:list>
              </text:list-item>
            </text:list>
          </draw:text-box>
        </draw:frame>
        <draw:frame draw:style-name="gr11" draw:text-style-name="P6" draw:layer="layout" svg:width="8.443cm" svg:height="1.415cm" svg:x="8.557cm" svg:y="10.5cm">
          <draw:object xlink:href="./Object 13" xlink:type="simple" xlink:show="embed" xlink:actuate="onLoad">
            <loext:p/>
          </draw:object>
          <draw:image xlink:href="./ObjectReplacements/Object 13" xlink:type="simple" xlink:show="embed" xlink:actuate="onLoad"/>
        </draw:frame>
        <draw:frame draw:style-name="gr11" draw:text-style-name="P6" draw:layer="layout" svg:width="4.504cm" svg:height="1.343cm" svg:x="8.5cm" svg:y="13.085cm">
          <draw:object xlink:href="./Object 1" xlink:type="simple" xlink:show="embed" xlink:actuate="onLoad">
            <loext:p/>
          </draw:object>
          <draw:image xlink:href="./ObjectReplacements/Object 1" xlink:type="simple" xlink:show="embed" xlink:actuate="onLoad"/>
        </draw:frame>
        <anim:par presentation:node-type="timing-root">
          <anim:par smil:begin="id9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0" presentation:class="page"/>
          <draw:frame presentation:style-name="pr13" draw:text-style-name="P7" draw:layer="layout" svg:width="17cm" svg:height="14cm" svg:x="2cm" svg:y="13cm" presentation:class="notes" presentation:placeholder="true">
            <draw:text-box/>
          </draw:frame>
        </presentation:notes>
      </draw:page>
      <draw:page draw:name="page11" draw:style-name="dp1" draw:master-page-name="Four_20_Bullets" presentation:presentation-page-layout-name="AL5T18" xml:id="id94" draw:id="id94">
        <office:forms form:automatic-focus="false" form:apply-design-mode="false"/>
        <draw:path draw:style-name="gr4" draw:text-style-name="P4"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9" draw:layer="layout" svg:width="7.5cm" svg:height="3.7cm" svg:x="0.8cm" svg:y="5.6cm" presentation:class="outline" presentation:user-transformed="true">
          <draw:text-box>
            <text:list text:style-name="L4">
              <text:list-item>
                <text:p>1 couche interne</text:p>
              </text:list-item>
            </text:list>
          </draw:text-box>
        </draw:frame>
        <draw:path draw:style-name="gr4" draw:text-style-name="P4"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9" draw:layer="layout" svg:width="7.5cm" svg:height="3.7cm" svg:x="9.1cm" svg:y="5.6cm" presentation:class="outline" presentation:user-transformed="true">
          <draw:text-box>
            <text:list text:style-name="L4">
              <text:list-item>
                <text:p>8 états latents</text:p>
              </text:list-item>
            </text:list>
          </draw:text-box>
        </draw:frame>
        <draw:path draw:style-name="gr4" draw:text-style-name="P4"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9" draw:layer="layout" svg:width="7.5cm" svg:height="3.7cm" svg:x="0.8cm" svg:y="11.6cm" presentation:class="outline" presentation:user-transformed="true">
          <draw:text-box>
            <text:list text:style-name="L4">
              <text:list-item>
                <text:p>Silu activation function</text:p>
              </text:list-item>
            </text:list>
          </draw:text-box>
        </draw:frame>
        <draw:path draw:style-name="gr4" draw:text-style-name="P4"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9" draw:layer="layout" svg:width="7.5cm" svg:height="3.7cm" svg:x="9.1cm" svg:y="11.6cm" presentation:class="outline" presentation:user-transformed="true">
          <draw:text-box>
            <text:list text:style-name="L4">
              <text:list-item>
                <text:p>Layer norm partout sauf decoder</text:p>
              </text:list-item>
            </text:list>
          </draw:text-box>
        </draw:frame>
        <draw:frame presentation:style-name="pr20" draw:layer="layout" svg:width="15.8cm" svg:height="2.628cm" svg:x="0.8cm" svg:y="0.6cm" presentation:class="title" presentation:user-transformed="true">
          <draw:text-box>
            <text:p>MLP hyperparamètres</text:p>
          </draw:text-box>
        </draw:frame>
        <draw:frame draw:style-name="gr5" draw:text-style-name="P5" draw:layer="layout" svg:width="8.364cm" svg:height="11.4cm" svg:x="17.791cm" svg:y="3cm">
          <draw:image xlink:href="Pictures/10000001000002770000035CA248B69F.png" xlink:type="simple" xlink:show="embed" xlink:actuate="onLoad" draw:mime-type="image/png">
            <text:p/>
          </draw:image>
        </draw:frame>
        <anim:par presentation:node-type="timing-root">
          <anim:par smil:begin="id9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1" presentation:class="page"/>
          <draw:frame presentation:style-name="pr21" draw:text-style-name="P2" draw:layer="layout" svg:width="17cm" svg:height="14cm" svg:x="2cm" svg:y="13cm" presentation:class="notes" presentation:placeholder="true">
            <draw:text-box/>
          </draw:frame>
        </presentation:notes>
      </draw:page>
      <draw:page draw:name="page12" draw:style-name="dp1" draw:master-page-name="Four_20_Bullets" presentation:presentation-page-layout-name="AL5T18" xml:id="id95" draw:id="id95">
        <draw:path draw:style-name="gr4" draw:text-style-name="P4"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9" draw:layer="layout" svg:width="7.5cm" svg:height="3.7cm" svg:x="0.8cm" svg:y="5.6cm" presentation:class="outline" presentation:user-transformed="true">
          <draw:text-box>
            <text:list text:style-name="L4">
              <text:list-item>
                <text:p>8 états latents</text:p>
              </text:list-item>
            </text:list>
          </draw:text-box>
        </draw:frame>
        <draw:path draw:style-name="gr4" draw:text-style-name="P4"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9" draw:layer="layout" svg:width="7.5cm" svg:height="3.7cm" svg:x="9.1cm" svg:y="5.6cm" presentation:class="outline" presentation:user-transformed="true">
          <draw:text-box>
            <text:list text:style-name="L4">
              <text:list-item>
                <text:p>4 étapes de message passing</text:p>
              </text:list-item>
            </text:list>
          </draw:text-box>
        </draw:frame>
        <draw:path draw:style-name="gr4" draw:text-style-name="P4"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9" draw:layer="layout" svg:width="7.5cm" svg:height="3.7cm" svg:x="0.8cm" svg:y="11.6cm" presentation:class="outline" presentation:user-transformed="true">
          <draw:text-box>
            <text:list text:style-name="L4">
              <text:list-item>
                <text:p>Adam optimizer<text:line-break/>(beta_1=0.9, <text:s text:c="7"/>beta_2=0.95) </text:p>
              </text:list-item>
            </text:list>
          </draw:text-box>
        </draw:frame>
        <draw:path draw:style-name="gr4" draw:text-style-name="P4"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9" draw:layer="layout" svg:width="7.5cm" svg:height="3.7cm" svg:x="9.1cm" svg:y="11.6cm" presentation:class="outline" presentation:user-transformed="true">
          <draw:text-box>
            <text:list text:style-name="L4">
              <text:list-item>
                <text:p>Fonction perte :<text:line-break/>Mean Square Error (MSE)</text:p>
              </text:list-item>
            </text:list>
          </draw:text-box>
        </draw:frame>
        <draw:frame presentation:style-name="pr20" draw:layer="layout" svg:width="15.8cm" svg:height="2.628cm" svg:x="0.8cm" svg:y="0.6cm" presentation:class="title" presentation:user-transformed="true">
          <draw:text-box>
            <text:p>PIFO hyperparamètres</text:p>
          </draw:text-box>
        </draw:frame>
        <draw:frame draw:style-name="gr5" draw:text-style-name="P5" draw:layer="layout" svg:width="8.488cm" svg:height="11cm" svg:x="17.912cm" svg:y="3cm">
          <draw:image xlink:href="Pictures/100000010000020C000002A76EA3A5F8.png" xlink:type="simple" xlink:show="embed" xlink:actuate="onLoad" draw:mime-type="image/png">
            <text:p/>
          </draw:image>
        </draw:frame>
        <anim:par presentation:node-type="timing-root">
          <anim:par smil:begin="id9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2" presentation:class="page"/>
          <draw:frame presentation:style-name="pr21" draw:text-style-name="P2" draw:layer="layout" svg:width="17cm" svg:height="14cm" svg:x="2cm" svg:y="13cm" presentation:class="notes" presentation:placeholder="true">
            <draw:text-box/>
          </draw:frame>
        </presentation:notes>
      </draw:page>
      <draw:page draw:name="page13" draw:style-name="dp1" draw:master-page-name="White_2f_Blue_20_Chart" presentation:presentation-page-layout-name="AL3T1" xml:id="id96" draw:id="id96">
        <draw:frame presentation:style-name="pr17" draw:text-style-name="P18" draw:layer="layout" svg:width="9.8cm" svg:height="2cm" svg:x="0cm" svg:y="0.8cm" presentation:class="title" presentation:user-transformed="true">
          <draw:text-box>
            <text:p><text:span text:style-name="T8">Courbe d’apprentissage</text:span></text:p>
          </draw:text-box>
        </draw:frame>
        <draw:frame presentation:style-name="pr18" draw:layer="layout" svg:width="6.4cm" svg:height="10cm" svg:x="20.6cm" svg:y="4cm" presentation:class="outline" presentation:user-transformed="true">
          <draw:text-box>
            <text:list text:style-name="L4">
              <text:list-item>
                <text:p>Pour 119 exemples, soit 1 mois de données (04/2025) et 30 itérations</text:p>
              </text:list-item>
            </text:list>
          </draw:text-box>
        </draw:frame>
        <draw:frame draw:style-name="gr5" draw:text-style-name="P5" draw:layer="layout" svg:width="15.292cm" svg:height="12.09cm" svg:x="3.708cm" svg:y="2.91cm">
          <draw:image xlink:href="Pictures/1000000100000242000001C9EE2A158D.png" xlink:type="simple" xlink:show="embed" xlink:actuate="onLoad" draw:mime-type="image/png">
            <text:p/>
          </draw:image>
        </draw:frame>
        <anim:par presentation:node-type="timing-root">
          <anim:par smil:begin="id9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3" presentation:class="page"/>
          <draw:frame presentation:style-name="pr13" draw:text-style-name="P7" draw:layer="layout" svg:width="17cm" svg:height="14cm" svg:x="2cm" svg:y="13cm" presentation:class="notes" presentation:placeholder="true">
            <draw:text-box/>
          </draw:frame>
        </presentation:notes>
      </draw:page>
      <draw:page draw:name="page14" draw:style-name="dp1" draw:master-page-name="White_2f_Blue_20_Chart" presentation:presentation-page-layout-name="AL3T1" xml:id="id97" draw:id="id97">
        <draw:frame presentation:style-name="pr11" draw:layer="layout" svg:width="9.8cm" svg:height="2cm" svg:x="0cm" svg:y="0.8cm" presentation:class="title" presentation:user-transformed="true">
          <draw:text-box>
            <text:p>Résultats</text:p>
          </draw:text-box>
        </draw:frame>
        <draw:frame draw:style-name="gr5" draw:text-style-name="P5" draw:layer="layout" svg:width="6.929cm" svg:height="5.305cm" svg:x="5.571cm" svg:y="3cm">
          <draw:image xlink:href="Pictures/1000000100000377000002A7E5AFB874.png" xlink:type="simple" xlink:show="embed" xlink:actuate="onLoad" draw:mime-type="image/png">
            <text:p/>
          </draw:image>
        </draw:frame>
        <draw:frame draw:style-name="gr5" draw:text-style-name="P5" draw:layer="layout" svg:width="5cm" svg:height="4.788cm" svg:x="18.5cm" svg:y="9.5cm">
          <draw:image xlink:href="Pictures/1000000100000168000000B590CCEC5C.png" xlink:type="simple" xlink:show="embed" xlink:actuate="onLoad" draw:mime-type="image/png">
            <text:p/>
          </draw:image>
        </draw:frame>
        <draw:frame draw:style-name="gr5" draw:text-style-name="P5" draw:layer="layout" svg:width="7.185cm" svg:height="5.5cm" svg:x="17.815cm" svg:y="3cm">
          <draw:image xlink:href="Pictures/1000000100000377000002A7A2E423AD.png" xlink:type="simple" xlink:show="embed" xlink:actuate="onLoad" draw:mime-type="image/png">
            <text:p/>
          </draw:image>
        </draw:frame>
        <draw:custom-shape draw:style-name="gr35" draw:text-style-name="P19" draw:layer="layout" svg:width="4cm" svg:height="2cm" svg:x="1cm" svg:y="4cm">
          <text:p text:style-name="P6">Référence </text:p>
          <text:p text:style-name="P6">X(t=1)</text:p>
          <draw:enhanced-geometry svg:viewBox="0 0 21600 21600" draw:type="rectangle" draw:enhanced-path="M 0 0 L 21600 0 21600 21600 0 21600 0 0 Z N"/>
        </draw:custom-shape>
        <draw:custom-shape draw:style-name="gr35" draw:text-style-name="P19" draw:layer="layout" svg:width="4cm" svg:height="2cm" svg:x="1cm" svg:y="10.5cm">
          <text:p text:style-name="P6">Prédiction</text:p>
          <text:p text:style-name="P6">X(t=1)</text:p>
          <draw:enhanced-geometry svg:viewBox="0 0 21600 21600" draw:type="rectangle" draw:enhanced-path="M 0 0 L 21600 0 21600 21600 0 21600 0 0 Z N"/>
        </draw:custom-shape>
        <draw:frame draw:style-name="gr5" draw:text-style-name="P5" draw:layer="layout" svg:width="5cm" svg:height="4.788cm" svg:x="6cm" svg:y="9.5cm">
          <draw:image xlink:href="Pictures/1000000100000168000000B55965C526.png" xlink:type="simple" xlink:show="embed" xlink:actuate="onLoad" draw:mime-type="image/png">
            <text:p/>
          </draw:image>
        </draw:frame>
        <draw:custom-shape draw:style-name="gr35" draw:text-style-name="P19" draw:layer="layout" svg:width="4cm" svg:height="2cm" svg:x="13.5cm" svg:y="4cm">
          <text:p text:style-name="P6">Référence </text:p>
          <text:p text:style-name="P6">X(t=4)</text:p>
          <draw:enhanced-geometry svg:viewBox="0 0 21600 21600" draw:type="rectangle" draw:enhanced-path="M 0 0 L 21600 0 21600 21600 0 21600 0 0 Z N"/>
        </draw:custom-shape>
        <draw:custom-shape draw:style-name="gr35" draw:text-style-name="P19" draw:layer="layout" svg:width="4cm" svg:height="2cm" svg:x="13.5cm" svg:y="10.5cm">
          <text:p text:style-name="P6">Prédiction </text:p>
          <text:p text:style-name="P6">X(t=4)</text:p>
          <draw:enhanced-geometry svg:viewBox="0 0 21600 21600" draw:type="rectangle" draw:enhanced-path="M 0 0 L 21600 0 21600 21600 0 21600 0 0 Z N"/>
        </draw:custom-shape>
        <anim:par presentation:node-type="timing-root">
          <anim:par smil:begin="id9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4" presentation:class="page"/>
          <draw:frame presentation:style-name="pr13" draw:text-style-name="P2" draw:layer="layout" svg:width="17cm" svg:height="14cm" svg:x="2cm" svg:y="13cm" presentation:class="notes" presentation:placeholder="true">
            <draw:text-box/>
          </draw:frame>
        </presentation:notes>
      </draw:page>
      <draw:page draw:name="page15" draw:style-name="dp1" draw:master-page-name="Blue_2f_White_20_Chart" presentation:presentation-page-layout-name="AL3T1" xml:id="id98" draw:id="id98">
        <draw:frame presentation:style-name="pr22" draw:layer="layout" svg:width="9.8cm" svg:height="2cm" svg:x="0cm" svg:y="0.8cm" presentation:class="title" presentation:user-transformed="true">
          <draw:text-box>
            <text:p>Quelques chiffres</text:p>
          </draw:text-box>
        </draw:frame>
        <draw:frame presentation:style-name="pr23" draw:layer="layout" svg:width="6.4cm" svg:height="10cm" svg:x="20.6cm" svg:y="4cm" presentation:class="outline" presentation:user-transformed="true">
          <draw:text-box>
            <text:p>Full dataset pour 30 ans de climatologie<text:line-break/>Soit 4 états par jour (t=00h, 06h, 12h, 18h).</text:p>
            <text:p>Taille : ~280Go. Soit ~ 44000 exemples.</text:p>
            <text:p>Estimation : ~8 jours de calcul avec mon <text:s/>CPU (core i7) (5-10 fois moins avec un GPU type Geforce 1050)</text:p>
          </draw:text-box>
        </draw:frame>
        <draw:custom-shape draw:style-name="gr36" draw:text-style-name="P19" draw:layer="layout" svg:width="8cm" svg:height="2cm" svg:x="1cm" svg:y="3.25cm">
          <text:p text:style-name="P6">65160 noeuds</text:p>
          <draw:enhanced-geometry svg:viewBox="0 0 21600 21600" draw:type="rectangle" draw:enhanced-path="M 0 0 L 21600 0 21600 21600 0 21600 0 0 Z N"/>
        </draw:custom-shape>
        <draw:custom-shape draw:style-name="gr37" draw:text-style-name="P20" draw:layer="layout" svg:width="8cm" svg:height="2cm" svg:x="0.5cm" svg:y="6cm">
          <text:p text:style-name="P6">257760 edges</text:p>
          <draw:enhanced-geometry svg:viewBox="0 0 21600 21600" draw:type="rectangle" draw:enhanced-path="M 0 0 L 21600 0 21600 21600 0 21600 0 0 Z N"/>
        </draw:custom-shape>
        <draw:custom-shape draw:style-name="gr38" draw:text-style-name="P21" draw:layer="layout" svg:width="11cm" svg:height="2cm" svg:x="8cm" svg:y="6.5cm">
          <text:p text:style-name="P6">Dataset : 741Mo pour un mois</text:p>
          <draw:enhanced-geometry svg:viewBox="0 0 21600 21600" draw:type="rectangle" draw:enhanced-path="M 0 0 L 21600 0 21600 21600 0 21600 0 0 Z N"/>
        </draw:custom-shape>
        <draw:custom-shape draw:style-name="gr39" draw:text-style-name="P22" draw:layer="layout" svg:width="11cm" svg:height="2cm" svg:x="9.5cm" svg:y="4cm">
          <text:p text:style-name="P6">Temps de learning : 30 min</text:p>
          <draw:enhanced-geometry svg:viewBox="0 0 21600 21600" draw:type="rectangle" draw:enhanced-path="M 0 0 L 21600 0 21600 21600 0 21600 0 0 Z N"/>
        </draw:custom-shape>
        <draw:custom-shape draw:style-name="gr40" draw:text-style-name="P23" draw:layer="layout" svg:width="11cm" svg:height="2cm" svg:x="7.5cm" svg:y="12cm">
          <text:p text:style-name="P6">Mémoire : ~3Go</text:p>
          <draw:enhanced-geometry svg:viewBox="0 0 21600 21600" draw:type="rectangle" draw:enhanced-path="M 0 0 L 21600 0 21600 21600 0 21600 0 0 Z N"/>
        </draw:custom-shape>
        <draw:custom-shape draw:style-name="gr41" draw:text-style-name="P24" draw:layer="layout" svg:width="11cm" svg:height="2cm" svg:x="1cm" svg:y="10.5cm">
          <text:p text:style-name="P6">2566 learnable parameters</text:p>
          <draw:enhanced-geometry svg:viewBox="0 0 21600 21600" draw:type="rectangle" draw:enhanced-path="M 0 0 L 21600 0 21600 21600 0 21600 0 0 Z N"/>
        </draw:custom-shape>
        <draw:custom-shape draw:style-name="gr42" draw:text-style-name="P25" draw:layer="layout" svg:width="11cm" svg:height="2cm" svg:x="9cm" svg:y="9cm">
          <text:p text:style-name="P6">Inférence : 30s /10 prevs (2,5 jours)</text:p>
          <draw:enhanced-geometry svg:viewBox="0 0 21600 21600" draw:type="rectangle" draw:enhanced-path="M 0 0 L 21600 0 21600 21600 0 21600 0 0 Z N"/>
        </draw:custom-shape>
        <anim:par presentation:node-type="timing-root">
          <anim:par smil:begin="id9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5" presentation:class="page"/>
          <draw:frame presentation:style-name="pr24" draw:text-style-name="P2" draw:layer="layout" svg:width="17cm" svg:height="14cm" svg:x="2cm" svg:y="13cm" presentation:class="notes" presentation:placeholder="true">
            <draw:text-box/>
          </draw:frame>
        </presentation:notes>
      </draw:page>
      <draw:page draw:name="page16" draw:style-name="dp4" draw:master-page-name="Left_20_Bar" presentation:presentation-page-layout-name="AL3T1" xml:id="id99" draw:id="id99">
        <draw:custom-shape draw:style-name="gr43" draw:text-style-name="P27" draw:layer="layout" svg:width="8cm" svg:height="6.95cm" svg:x="10cm" svg:y="4.35cm">
          <text:p text:style-name="P26"><text:span text:style-name="T9">Expérimental</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4" draw:text-style-name="P28" draw:layer="layout" svg:x1="14cm" svg:y1="12.192cm" svg:x2="14cm" svg:y2="15.75cm">
          <text:p/>
        </draw:line>
        <draw:frame presentation:style-name="pr25" draw:layer="layout" svg:width="14cm" svg:height="3.5cm" draw:transform="rotate (1.5707963267949) translate (0.5cm 14.75cm)" presentation:class="title" presentation:user-transformed="true">
          <draw:text-box>
            <text:p>Statut du projet</text:p>
          </draw:text-box>
        </draw:frame>
        <draw:frame presentation:style-name="pr26" draw:layer="layout" svg:width="8cm" svg:height="10cm" svg:x="19cm" svg:y="4cm" presentation:class="outline" presentation:user-transformed="true">
          <draw:text-box>
            <text:list text:style-name="L4">
              <text:list-item>
                <text:p>Statut : expérimental</text:p>
              </text:list-item>
              <text:list-item>
                <text:p>Signaux de résultats</text:p>
              </text:list-item>
              <text:list-item>
                <text:p>Code… *tousse* à structurer</text:p>
              </text:list-item>
              <text:list-item>
                <text:p>Dataset <text:s/>très restreint</text:p>
              </text:list-item>
            </text:list>
          </draw:text-box>
        </draw:frame>
        <anim:par presentation:node-type="timing-root">
          <anim:par smil:begin="id99.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16" presentation:class="page"/>
          <draw:frame presentation:style-name="pr27" draw:text-style-name="P2" draw:layer="layout" svg:width="17cm" svg:height="14cm" svg:x="2cm" svg:y="13cm" presentation:class="notes" presentation:placeholder="true">
            <draw:text-box/>
          </draw:frame>
        </presentation:notes>
      </draw:page>
      <draw:page draw:name="page17" draw:style-name="dp5" draw:master-page-name="Right_20_Bar" presentation:presentation-page-layout-name="AL3T1" xml:id="id100" draw:id="id100">
        <draw:custom-shape draw:style-name="gr43" draw:text-style-name="P27" draw:layer="layout" svg:width="8cm" svg:height="6.95cm" svg:x="10cm" svg:y="4.35cm">
          <text:p text:style-name="P26"><text:span text:style-name="T9">Fonctionnel</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4" draw:text-style-name="P28" draw:layer="layout" svg:x1="14cm" svg:y1="3.556cm" svg:x2="14cm" svg:y2="0cm">
          <text:p/>
        </draw:line>
        <draw:frame presentation:style-name="pr28" draw:layer="layout" svg:width="14cm" svg:height="3.5cm" draw:transform="rotate (-1.5707963267949) translate (27.5cm 0.5cm)" presentation:class="title" presentation:user-transformed="true">
          <draw:text-box>
            <text:p>Cible du projet</text:p>
          </draw:text-box>
        </draw:frame>
        <draw:frame presentation:style-name="pr29" draw:layer="layout" svg:width="8cm" svg:height="10cm" svg:x="0.5cm" svg:y="4cm" presentation:class="outline" presentation:user-transformed="true">
          <draw:text-box>
            <text:list text:style-name="L4">
              <text:list-item>
                <text:p>Structurer et augmenter le dataset</text:p>
              </text:list-item>
              <text:list-item>
                <text:p>Enregistrer les poids du modèle</text:p>
              </text:list-item>
              <text:list-item>
                <text:p>Créer le programme d’inférence et les représentations graphiques</text:p>
              </text:list-item>
              <text:list-item>
                <text:p>Publication sur Github</text:p>
              </text:list-item>
            </text:list>
          </draw:text-box>
        </draw:frame>
        <anim:par presentation:node-type="timing-root">
          <anim:par smil:begin="id100.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17" presentation:class="page"/>
          <draw:frame presentation:style-name="pr30" draw:text-style-name="P2" draw:layer="layout" svg:width="17cm" svg:height="14cm" svg:x="2cm" svg:y="13cm" presentation:class="notes" presentation:placeholder="true">
            <draw:text-box/>
          </draw:frame>
        </presentation:notes>
      </draw:page>
      <draw:page draw:name="page18" draw:style-name="dp1" draw:master-page-name="White_2f_Blue_20_Chart" presentation:presentation-page-layout-name="AL3T1" xml:id="id101" draw:id="id101">
        <draw:frame presentation:style-name="pr11" draw:layer="layout" svg:width="9.8cm" svg:height="2cm" svg:x="0cm" svg:y="0.8cm" presentation:class="title" presentation:user-transformed="true">
          <draw:text-box>
            <text:p>Références</text:p>
          </draw:text-box>
        </draw:frame>
        <draw:frame presentation:style-name="pr12" draw:layer="layout" svg:width="25.2cm" svg:height="10.5cm" svg:x="1.4cm" svg:y="3.5cm" presentation:class="outline" presentation:user-transformed="true">
          <draw:text-box>
            <text:list text:style-name="L4">
              <text:list-item>
                <text:p text:style-name="P29"><text:span text:style-name="T10">Remi Lam et al. Learning skillful medium-range global weather forecasting.</text:span><text:span text:style-name="T10"><text:line-break/></text:span><text:span text:style-name="T10">Science382,1416-1421(2023).DOI:10.1126/science.adi2336</text:span><text:span text:style-name="T10"><text:line-break/></text:span><text:span text:style-name="T10"><text:a xlink:href="https://www.science.org/doi/10.1126/science.adi2336" xlink:type="simple">https://www.science.org/doi/10.1126/science.adi2336</text:a></text:span></text:p>
              </text:list-item>
              <text:list-item>
                <text:p text:style-name="P29"><text:span text:style-name="T10">Ilan Price, et al. GenCast: Diffusion-based ensemble forecasting for medium-range weather</text:span><text:span text:style-name="T10"><text:line-break/></text:span><text:span text:style-name="T10"><text:a xlink:href="https://arxiv.org/abs/2312.15796" xlink:type="simple">https://arxiv.org/abs/2312.15796</text:a></text:span></text:p>
              </text:list-item>
              <text:list-item>
                <text:p text:style-name="P29"><text:span text:style-name="T10">GraphCast et Gencast (code source)</text:span><text:span text:style-name="T10"><text:line-break/></text:span><text:span text:style-name="T10"><text:a xlink:href="https://github.com/google-deepmind/graphcast" xlink:type="simple">https://github.com/google-deepmind/graphcast</text:a></text:span></text:p>
              </text:list-item>
              <text:list-item>
                <text:p text:style-name="P29"><text:span text:style-name="T10">Learning shortest path with GraphNetowks in TF-GNN</text:span><text:span text:style-name="T10"><text:line-break/></text:span><text:span text:style-name="T10"><text:a xlink:href="https://colab.research.google.com/github/tensorflow/gnn/blob/master/examples/notebooks/" xlink:type="simple">https://colab.research.google.com/github/tensorflow/gnn/blob/master/examples/notebooks/</text:a></text:span></text:p>
              </text:list-item>
              <text:list-item>
                <text:p text:style-name="P29"><text:span text:style-name="T10">Tensorflow </text:span><text:span text:style-name="T10"><text:line-break/></text:span><text:span text:style-name="T10"><text:a xlink:href="https://www.tensorflow.org/" xlink:type="simple">https://www.tensorflow.org</text:a></text:span></text:p>
              </text:list-item>
              <text:list-item>
                <text:p text:style-name="P29"><text:span text:style-name="T10">Tensorflow GNN</text:span><text:span text:style-name="T10"><text:line-break/></text:span><text:span text:style-name="T10"><text:a xlink:href="https://github.com/tensorflow/gnn" xlink:type="simple">https://github.com/tensorflow/gnn</text:a></text:span></text:p>
              </text:list-item>
            </text:list>
          </draw:text-box>
        </draw:frame>
        <anim:par presentation:node-type="timing-root">
          <anim:par smil:begin="id10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8" presentation:class="page"/>
          <draw:frame presentation:style-name="pr13" draw:text-style-name="P7" draw:layer="layout" svg:width="17cm" svg:height="14cm" svg:x="2cm" svg:y="13cm" presentation:class="notes" presentation:placeholder="true">
            <draw:text-box/>
          </draw:frame>
        </presentation:notes>
      </draw:page>
      <draw:page draw:name="page19" draw:style-name="dp1" draw:master-page-name="Freshes" presentation:presentation-page-layout-name="AL1T0" xml:id="id102" draw:id="id102">
        <draw:custom-shape draw:style-name="gr45" draw:text-style-name="P30"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draw:text-box>
            <text:p>Conclusion</text:p>
          </draw:text-box>
        </draw:frame>
        <draw:frame presentation:style-name="pr2" draw:layer="layout" svg:width="19cm" svg:height="5cm" svg:x="2cm" svg:y="9.2cm" presentation:class="subtitle" presentation:user-transformed="true">
          <draw:text-box>
            <text:p>Merci pour votre attention</text:p>
          </draw:text-box>
        </draw:frame>
        <anim:par presentation:node-type="timing-root">
          <anim:par smil:begin="id10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9"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Arrow_20_short" draw:display-name="Arrow short" svg:viewBox="0 0 20 13" svg:d="M0 13l10-13 10 13z"/>
    <draw:marker draw:name="Circle" svg:viewBox="0 0 1131 1131" svg:d="M462 1118l-102-29-102-51-93-72-72-93-51-102-29-102-13-105 13-102 29-106 51-102 72-89 93-72 102-50 102-34 106-9 101 9 106 34 98 50 93 72 72 89 51 102 29 106 13 102-13 105-29 102-51 102-72 93-93 72-98 51-106 29-101 13z"/>
    <draw:stroke-dash draw:name="Long_20_Dash" draw:display-name="Long Dash" draw:style="rect" draw:dots1="1" draw:dots1-length="400%" draw:distance="300%"/>
    <style:default-style style:family="graphic">
      <style:graphic-properties svg:stroke-color="#3465a4" draw:fill-color="#0d84a1"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White_2f_Blue_20_Chart" style:display-name="White/Blue Char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éro&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4.8.6.2$Linux_X86_64 LibreOffice_project/480$Build-2</meta:generator>
    <meta:creation-date>2025-05-04T08:37:27.076370469</meta:creation-date>
    <meta:editing-duration>PT19H30M29S</meta:editing-duration>
    <meta:editing-cycles>226</meta:editing-cycles>
    <dc:date>2025-05-18T11:39:05.944471115</dc:date>
    <meta:print-date>2025-05-11T19:36:35.128596092</meta:print-date>
    <meta:printed-by>Fichiers PDF</meta:printed-by>
    <meta:document-statistic meta:object-count="1777"/>
  </office:meta>
</office:document-meta>
</file>

<file path=Object 1/content.xml><?xml version="1.0" encoding="utf-8"?>
<math xmlns="http://www.w3.org/1998/Math/MathML" display="block">
  <semantics>
    <mrow>
      <mover accent="true">
        <msup>
          <mi>X</mi>
          <mrow>
            <mi>t</mi>
            <mo stretchy="false">+</mo>
            <mn>1</mn>
          </mrow>
        </msup>
        <mo stretchy="false">^</mo>
      </mover>
      <mo stretchy="false">=</mo>
      <mrow>
        <msup>
          <mi>X</mi>
          <mi>t</mi>
        </msup>
        <mo stretchy="false">+</mo>
        <mover accent="true">
          <msubsup>
            <mi>y</mi>
            <mi>i</mi>
            <mi>G</mi>
          </msubsup>
          <mo stretchy="false">^</mo>
        </mover>
      </mrow>
    </mrow>
    <annotation encoding="StarMath 5.0">hat X^{t+1} = X^{t} + hat y^{G}_i</annotation>
  </semantics>
</math>
</file>

<file path=Object 10/content.xml><?xml version="1.0" encoding="utf-8"?>
<math xmlns="http://www.w3.org/1998/Math/MathML" display="block">
  <semantics>
    <msubsup>
      <mi>v</mi>
      <mi>s</mi>
      <mi>G</mi>
    </msubsup>
    <annotation encoding="StarMath 5.0">v^G_s </annotation>
  </semantics>
</math>
</file>

<file path=Object 11/content.xml><?xml version="1.0" encoding="utf-8"?>
<math xmlns="http://www.w3.org/1998/Math/MathML" display="block">
  <semantics>
    <mrow>
      <msubsup>
        <mi>v</mi>
        <mi>i</mi>
        <mi>M</mi>
      </msubsup>
      <mo stretchy="false">←</mo>
      <mrow>
        <msubsup>
          <mi>v</mi>
          <mi>i</mi>
          <mi>M</mi>
        </msubsup>
        <mo stretchy="false">+</mo>
        <msubsup>
          <mi>v</mi>
          <mi>i</mi>
          <mi>M</mi>
        </msubsup>
      </mrow>
      <mi>'</mi>
    </mrow>
    <annotation encoding="StarMath 5.0">v^M_i leftarrow v^M_i + v^M_i'
</annotation>
  </semantics>
</math>
</file>

<file path=Object 12/content.xml><?xml version="1.0" encoding="utf-8"?>
<math xmlns="http://www.w3.org/1998/Math/MathML" display="block">
  <semantics>
    <mrow>
      <msubsup>
        <mi>e</mi>
        <mrow>
          <msubsup>
            <mi>v</mi>
            <mi>s</mi>
            <mi>G</mi>
          </msubsup>
          <mo stretchy="false">→</mo>
          <msubsup>
            <mi>v</mi>
            <mi>r</mi>
            <mi>G</mi>
          </msubsup>
        </mrow>
        <mi>G</mi>
      </msubsup>
      <mo stretchy="false">←</mo>
      <mrow>
        <msubsup>
          <mi>e</mi>
          <mrow>
            <msubsup>
              <mi>v</mi>
              <mi>s</mi>
              <mi>G</mi>
            </msubsup>
            <mo stretchy="false">→</mo>
            <msubsup>
              <mi>v</mi>
              <mi>r</mi>
              <mi>G</mi>
            </msubsup>
          </mrow>
          <mi>G</mi>
        </msubsup>
        <mo stretchy="false">+</mo>
        <msubsup>
          <mi>e</mi>
          <mrow>
            <msubsup>
              <mi>v</mi>
              <mi>s</mi>
              <mi>G</mi>
            </msubsup>
            <mo stretchy="false">→</mo>
            <msubsup>
              <mi>v</mi>
              <mi>r</mi>
              <mi>G</mi>
            </msubsup>
          </mrow>
          <mi>G</mi>
        </msubsup>
      </mrow>
      <mi>'</mi>
    </mrow>
    <annotation encoding="StarMath 5.0">e^G_{v^G_s toward v^G_r} leftarrow e^G_{v^G_s toward v^G_r} + e^G_{v^G_s toward v^G_r}'</annotation>
  </semantics>
</math>
</file>

<file path=Object 13/content.xml><?xml version="1.0" encoding="utf-8"?>
<math xmlns="http://www.w3.org/1998/Math/MathML" display="block">
  <semantics>
    <mrow>
      <mrow>
        <mover accent="true">
          <msup>
            <mi>X</mi>
            <mrow>
              <mi>t</mi>
              <mo stretchy="false">+</mo>
              <mn>1</mn>
            </mrow>
          </msup>
          <mo stretchy="false">^</mo>
        </mover>
        <mo stretchy="false">=</mo>
        <mover accent="true">
          <msubsup>
            <mi>y</mi>
            <mi>i</mi>
            <mi>G</mi>
          </msubsup>
          <mo stretchy="false">^</mo>
        </mover>
        <mo stretchy="false">=</mo>
        <msubsup>
          <mi mathvariant="italic">MLP</mi>
          <msup>
            <mi>ν</mi>
            <mi>G</mi>
          </msup>
          <mi mathvariant="italic">output</mi>
        </msubsup>
      </mrow>
      <mrow>
        <mo fence="true" form="prefix" stretchy="false">(</mo>
        <mrow>
          <msubsup>
            <mi>v</mi>
            <mi>i</mi>
            <mi>G</mi>
          </msubsup>
        </mrow>
        <mo fence="true" form="postfix" stretchy="false">)</mo>
      </mrow>
    </mrow>
    <annotation encoding="StarMath 5.0">hat X^{t+1} = hat y^{G}_i = MLP^{output}_{%inu^G}(v^{G}_{i} )</annotation>
  </semantics>
</math>
</file>

<file path=Object 14/content.xml><?xml version="1.0" encoding="utf-8"?>
<math xmlns="http://www.w3.org/1998/Math/MathML" display="block">
  <semantics>
    <msubsup>
      <mi>v</mi>
      <mi>r</mi>
      <mi>G</mi>
    </msubsup>
    <annotation encoding="StarMath 5.0">v^G_r </annotation>
  </semantics>
</math>
</file>

<file path=Object 15/content.xml><?xml version="1.0" encoding="utf-8"?>
<math xmlns="http://www.w3.org/1998/Math/MathML" display="block">
  <semantics>
    <msubsup>
      <mi>e</mi>
      <mrow>
        <msubsup>
          <mi>v</mi>
          <mi>s</mi>
          <mi>G</mi>
        </msubsup>
        <mo stretchy="false">→</mo>
        <msubsup>
          <mi>v</mi>
          <mi>r</mi>
          <mi>G</mi>
        </msubsup>
      </mrow>
      <mi>G</mi>
    </msubsup>
    <annotation encoding="StarMath 5.0">e^G_{v^G_s toward v^G_r}</annotation>
  </semantics>
</math>
</file>

<file path=Object 16/content.xml><?xml version="1.0" encoding="utf-8"?>
<math xmlns="http://www.w3.org/1998/Math/MathML" display="block">
  <semantics>
    <msubsup>
      <mi>e</mi>
      <mrow>
        <msubsup>
          <mi>v</mi>
          <msub>
            <mi>s</mi>
            <mn>2</mn>
          </msub>
          <mi>G</mi>
        </msubsup>
        <mo stretchy="false">→</mo>
        <msubsup>
          <mi>v</mi>
          <mi>i</mi>
          <mi>G</mi>
        </msubsup>
      </mrow>
      <mi>G</mi>
    </msubsup>
    <annotation encoding="StarMath 5.0">e^G_{v^G_{s_2} toward v^G_i}</annotation>
  </semantics>
</math>
</file>

<file path=Object 17/content.xml><?xml version="1.0" encoding="utf-8"?>
<math xmlns="http://www.w3.org/1998/Math/MathML" display="block">
  <semantics>
    <msubsup>
      <mi>e</mi>
      <mrow>
        <msubsup>
          <mi>v</mi>
          <msub>
            <mi>s</mi>
            <mn>3</mn>
          </msub>
          <mi>G</mi>
        </msubsup>
        <mo stretchy="false">→</mo>
        <msubsup>
          <mi>v</mi>
          <mi>i</mi>
          <mi>G</mi>
        </msubsup>
      </mrow>
      <mi>G</mi>
    </msubsup>
    <annotation encoding="StarMath 5.0">e^G_{v^G_{s_3} toward v^G_i}</annotation>
  </semantics>
</math>
</file>

<file path=Object 18/content.xml><?xml version="1.0" encoding="utf-8"?>
<math xmlns="http://www.w3.org/1998/Math/MathML" display="block">
  <semantics>
    <msubsup>
      <mi>e</mi>
      <mrow>
        <msubsup>
          <mi>v</mi>
          <msub>
            <mi>s</mi>
            <mn>1</mn>
          </msub>
          <mi>G</mi>
        </msubsup>
        <mo stretchy="false">→</mo>
        <msubsup>
          <mi>v</mi>
          <mi>i</mi>
          <mi>G</mi>
        </msubsup>
      </mrow>
      <mi>G</mi>
    </msubsup>
    <annotation encoding="StarMath 5.0">e^G_{v^G_{s_1} toward v^G_i}</annotation>
  </semantics>
</math>
</file>

<file path=Object 19/content.xml><?xml version="1.0" encoding="utf-8"?>
<math xmlns="http://www.w3.org/1998/Math/MathML" display="block">
  <semantics>
    <msubsup>
      <mi>e</mi>
      <mrow>
        <msubsup>
          <mi>v</mi>
          <msub>
            <mi>s</mi>
            <mn>0</mn>
          </msub>
          <mi>G</mi>
        </msubsup>
        <mo stretchy="false">→</mo>
        <msubsup>
          <mi>v</mi>
          <mi>i</mi>
          <mi>G</mi>
        </msubsup>
      </mrow>
      <mi>G</mi>
    </msubsup>
    <annotation encoding="StarMath 5.0">e^G_{v^G_{s_0} toward v^G_i}</annotation>
  </semantics>
</math>
</file>

<file path=Object 2/content.xml><?xml version="1.0" encoding="utf-8"?>
<math xmlns="http://www.w3.org/1998/Math/MathML" display="block">
  <semantics>
    <mrow>
      <mrow>
        <msubsup>
          <mi>v</mi>
          <mi>i</mi>
          <mi>G</mi>
        </msubsup>
        <mo stretchy="false">=</mo>
        <msubsup>
          <mi mathvariant="italic">MLP</mi>
          <msup>
            <mi>ν</mi>
            <mi>G</mi>
          </msup>
          <mi mathvariant="italic">embedder</mi>
        </msubsup>
      </mrow>
      <mrow>
        <mo fence="true" form="prefix" stretchy="false">(</mo>
        <mrow>
          <msubsup>
            <mi>v</mi>
            <mi>i</mi>
            <mrow>
              <mi>G</mi>
              <mi>,</mi>
              <mi mathvariant="italic">features</mi>
            </mrow>
          </msubsup>
        </mrow>
        <mo fence="true" form="postfix" stretchy="false">)</mo>
      </mrow>
    </mrow>
    <annotation encoding="StarMath 5.0">v^G_i = MLP^{embedder}_{%inu^G}(v^{G,features}_{i} )</annotation>
  </semantics>
</math>
</file>

<file path=Object 20/content.xml><?xml version="1.0" encoding="utf-8"?>
<math xmlns="http://www.w3.org/1998/Math/MathML" display="block">
  <semantics>
    <msubsup>
      <mi>v</mi>
      <mi>i</mi>
      <mi>G</mi>
    </msubsup>
    <annotation encoding="StarMath 5.0">v^G_i</annotation>
  </semantics>
</math>
</file>

<file path=Object 21/content.xml><?xml version="1.0" encoding="utf-8"?>
<math xmlns="http://www.w3.org/1998/Math/MathML" display="block">
  <semantics>
    <mrow>
      <mrow>
        <msubsup>
          <mi>e</mi>
          <mrow>
            <msubsup>
              <mi>v</mi>
              <mi>s</mi>
              <mi>G</mi>
            </msubsup>
            <mo stretchy="false">→</mo>
            <msubsup>
              <mi>v</mi>
              <mi>r</mi>
              <mi>G</mi>
            </msubsup>
          </mrow>
          <mi>G</mi>
        </msubsup>
        <mo stretchy="false">=</mo>
        <msubsup>
          <mi mathvariant="italic">MLP</mi>
          <msup>
            <mi>ε</mi>
            <mi>G</mi>
          </msup>
          <mi mathvariant="italic">embedder</mi>
        </msubsup>
      </mrow>
      <mrow>
        <mo fence="true" form="prefix" stretchy="false">(</mo>
        <mrow>
          <msubsup>
            <mi>e</mi>
            <mrow>
              <msubsup>
                <mi>v</mi>
                <mi>s</mi>
                <mi>G</mi>
              </msubsup>
              <mo stretchy="false">→</mo>
              <msubsup>
                <mi>v</mi>
                <mi>r</mi>
                <mi>G</mi>
              </msubsup>
            </mrow>
            <mrow>
              <mi>G</mi>
              <mi>,</mi>
              <mi mathvariant="italic">features</mi>
            </mrow>
          </msubsup>
        </mrow>
        <mo fence="true" form="postfix" stretchy="false">)</mo>
      </mrow>
    </mrow>
    <annotation encoding="StarMath 5.0">e^G_{v^G_s toward v^G_r} = MLP^{embedder}_{%ivarepsilon^G}(e^{G,features}_{v^G_s toward v^G_r} )</annotation>
  </semantics>
</math>
</file>

<file path=Object 22/content.xml><?xml version="1.0" encoding="utf-8"?>
<math xmlns="http://www.w3.org/1998/Math/MathML" display="block">
  <semantics>
    <msubsup>
      <mi>e</mi>
      <mrow>
        <msubsup>
          <mi>v</mi>
          <mi>s</mi>
          <mi>G</mi>
        </msubsup>
        <mo stretchy="false">→</mo>
        <msubsup>
          <mi>v</mi>
          <mi>r</mi>
          <mi>G</mi>
        </msubsup>
      </mrow>
      <mi>G</mi>
    </msubsup>
    <annotation encoding="StarMath 5.0">e^G_{v^G_s toward v^G_r}</annotation>
  </semantics>
</math>
</file>

<file path=Object 3/content.xml><?xml version="1.0" encoding="utf-8"?>
<math xmlns="http://www.w3.org/1998/Math/MathML" display="block">
  <semantics>
    <msubsup>
      <mi>v</mi>
      <mi>i</mi>
      <mi>G</mi>
    </msubsup>
    <annotation encoding="StarMath 5.0">v^G_i</annotation>
  </semantics>
</math>
</file>

<file path=Object 4/content.xml><?xml version="1.0" encoding="utf-8"?>
<math xmlns="http://www.w3.org/1998/Math/MathML" display="block">
  <semantics>
    <mrow>
      <mrow>
        <msup>
          <mover accent="true">
            <mi>X</mi>
            <mo stretchy="false">^</mo>
          </mover>
          <mrow>
            <mi>t</mi>
            <mo stretchy="false">+</mo>
            <mn>1</mn>
          </mrow>
        </msup>
        <mo stretchy="false">=</mo>
        <mi mathvariant="italic">PIFOCast</mi>
      </mrow>
      <mrow>
        <mo fence="true" form="prefix" stretchy="false">(</mo>
        <mrow>
          <msup>
            <mi>X</mi>
            <mi>t</mi>
          </msup>
        </mrow>
        <mo fence="true" form="postfix" stretchy="false">)</mo>
      </mrow>
    </mrow>
    <annotation encoding="StarMath 5.0">{hat X}^{t+1}=PIFOCast(X^{t})</annotation>
  </semantics>
</math>
</file>

<file path=Object 5/content.xml><?xml version="1.0" encoding="utf-8"?>
<math xmlns="http://www.w3.org/1998/Math/MathML" display="block">
  <semantics>
    <mrow>
      <msup>
        <mover accent="true">
          <mi>X</mi>
          <mo stretchy="false">^</mo>
        </mover>
        <mrow>
          <mrow>
            <mi>t</mi>
            <mo stretchy="false">+</mo>
            <mn>1</mn>
          </mrow>
          <mi mathvariant="normal">:</mi>
          <mrow>
            <mi>t</mi>
            <mo stretchy="false">+</mo>
            <mi>T</mi>
          </mrow>
        </mrow>
      </msup>
      <mo stretchy="false">=</mo>
      <munder>
        <munder>
          <mrow>
            <mi mathvariant="italic">PIFOCast</mi>
            <mrow>
              <mo fence="true" form="prefix" stretchy="false">(</mo>
              <mrow>
                <msup>
                  <mi>X</mi>
                  <mi>t</mi>
                </msup>
              </mrow>
              <mo fence="true" form="postfix" stretchy="false">)</mo>
            </mrow>
            <mi>,</mi>
            <mi mathvariant="italic">PIFOCast</mi>
            <mrow>
              <mo fence="true" form="prefix" stretchy="false">(</mo>
              <mrow>
                <msup>
                  <mover accent="true">
                    <mi>X</mi>
                    <mo stretchy="false">^</mo>
                  </mover>
                  <mrow>
                    <mi>t</mi>
                    <mo stretchy="false">+</mo>
                    <mn>1</mn>
                  </mrow>
                </msup>
              </mrow>
              <mo fence="true" form="postfix" stretchy="false">)</mo>
            </mrow>
            <mi>,</mi>
            <mn>...</mn>
            <mi>,</mi>
            <mi mathvariant="italic">PIFOCast</mi>
            <mrow>
              <mo fence="true" form="prefix" stretchy="false">(</mo>
              <mrow>
                <msup>
                  <mover accent="true">
                    <mi>X</mi>
                    <mo stretchy="false">^</mo>
                  </mover>
                  <mrow>
                    <mi>t</mi>
                    <mo stretchy="false">+</mo>
                    <mi>T</mi>
                    <mo stretchy="false">−</mo>
                    <mn>1</mn>
                  </mrow>
                </msup>
              </mrow>
              <mo fence="true" form="postfix" stretchy="false">)</mo>
            </mrow>
          </mrow>
          <mo stretchy="true">⏟</mo>
        </munder>
        <mrow>
          <mn>1.</mn>
          <mn>.</mn>
          <mi>T</mi>
          <mi mathvariant="italic">autoregressive</mi>
          <mi mathvariant="italic">iterations</mi>
        </mrow>
      </munder>
    </mrow>
    <annotation encoding="StarMath 5.0">{hat X}^{t+1:t+T}={PIFOCast(X^{t}),PIFOCast({hat X}^{t+1}),...,PIFOCast({hat X}^{t+T-1})} underbrace {1..T autoregressive iterations}</annotation>
  </semantics>
</math>
</file>

<file path=Object 6/content.xml><?xml version="1.0" encoding="utf-8"?>
<math xmlns="http://www.w3.org/1998/Math/MathML" display="block">
  <semantics>
    <mrow>
      <msubsup>
        <mi>v</mi>
        <mi>i</mi>
        <mi>G</mi>
      </msubsup>
      <mrow>
        <mi>'</mi>
        <mo stretchy="false">=</mo>
        <msubsup>
          <mi mathvariant="italic">MLP</mi>
          <msup>
            <mi>ν</mi>
            <mi>G</mi>
          </msup>
          <mi mathvariant="italic">decoder</mi>
        </msubsup>
      </mrow>
      <mrow>
        <mo fence="true" form="prefix" stretchy="false">(</mo>
        <mrow>
          <msubsup>
            <mi>v</mi>
            <mi>i</mi>
            <mi>G</mi>
          </msubsup>
        </mrow>
        <mo fence="true" form="postfix" stretchy="false">)</mo>
      </mrow>
    </mrow>
    <annotation encoding="StarMath 5.0">v^{G}_i' = MLP^{decoder}_{%inu^G}(v^{G}_{i} )</annotation>
  </semantics>
</math>
</file>

<file path=Object 7/content.xml><?xml version="1.0" encoding="utf-8"?>
<math xmlns="http://www.w3.org/1998/Math/MathML" display="block">
  <semantics>
    <mrow>
      <msubsup>
        <mi>e</mi>
        <mrow>
          <msubsup>
            <mi>v</mi>
            <mi>s</mi>
            <mi>G</mi>
          </msubsup>
          <mo stretchy="false">→</mo>
          <msubsup>
            <mi>v</mi>
            <mi>r</mi>
            <mi>G</mi>
          </msubsup>
        </mrow>
        <mi>G</mi>
      </msubsup>
      <mrow>
        <mi>'</mi>
        <mo stretchy="false">=</mo>
        <msubsup>
          <mi mathvariant="italic">MLP</mi>
          <msup>
            <mi>ε</mi>
            <mi>G</mi>
          </msup>
          <mi mathvariant="italic">decoder</mi>
        </msubsup>
      </mrow>
      <mrow>
        <mo fence="true" form="prefix" stretchy="false">(</mo>
        <mrow>
          <msubsup>
            <mi>e</mi>
            <mrow>
              <msubsup>
                <mi>v</mi>
                <mi>s</mi>
                <mi>G</mi>
              </msubsup>
              <mo stretchy="false">→</mo>
              <msubsup>
                <mi>v</mi>
                <mi>r</mi>
                <mi>G</mi>
              </msubsup>
            </mrow>
            <mi>G</mi>
          </msubsup>
        </mrow>
        <mo fence="true" form="postfix" stretchy="false">)</mo>
      </mrow>
    </mrow>
    <annotation encoding="StarMath 5.0">e^G_{v^G_s toward v^G_r}' = MLP^{decoder}_{%ivarepsilon^G}(e^{G}_{v^G_s toward v^G_r} )</annotation>
  </semantics>
</math>
</file>

<file path=Object 8/content.xml><?xml version="1.0" encoding="utf-8"?>
<math xmlns="http://www.w3.org/1998/Math/MathML" display="block">
  <semantics>
    <mrow>
      <msubsup>
        <mi>e</mi>
        <mrow>
          <msubsup>
            <mi>v</mi>
            <mi>s</mi>
            <mi>G</mi>
          </msubsup>
          <mo stretchy="false">→</mo>
          <msubsup>
            <mi>v</mi>
            <mi>r</mi>
            <mi>G</mi>
          </msubsup>
        </mrow>
        <mi>G</mi>
      </msubsup>
      <mrow>
        <mi>'</mi>
        <mo stretchy="false">=</mo>
        <msubsup>
          <mi mathvariant="italic">MLP</mi>
          <msup>
            <mi>ε</mi>
            <mi>G</mi>
          </msup>
          <mi mathvariant="italic">grid</mi>
        </msubsup>
      </mrow>
      <mrow>
        <mo fence="true" form="prefix" stretchy="false">(</mo>
        <mrow>
          <mrow>
            <mo fence="true" form="prefix" stretchy="true">[</mo>
            <mrow>
              <mrow>
                <msubsup>
                  <mi>e</mi>
                  <mrow>
                    <msubsup>
                      <mi>v</mi>
                      <mi>s</mi>
                      <mi>G</mi>
                    </msubsup>
                    <mo stretchy="false">→</mo>
                    <msubsup>
                      <mi>v</mi>
                      <mi>r</mi>
                      <mi>G</mi>
                    </msubsup>
                  </mrow>
                  <mi>G</mi>
                </msubsup>
                <mi>,</mi>
                <msubsup>
                  <mi>v</mi>
                  <mi>s</mi>
                  <mi>M</mi>
                </msubsup>
                <mi>,</mi>
                <msubsup>
                  <mi>v</mi>
                  <mi>r</mi>
                  <mi>M</mi>
                </msubsup>
              </mrow>
            </mrow>
            <mo fence="true" form="postfix" stretchy="true">]</mo>
          </mrow>
        </mrow>
        <mo fence="true" form="postfix" stretchy="false">)</mo>
      </mrow>
    </mrow>
    <annotation encoding="StarMath 5.0">e^G_{v^G_s toward v^G_r}' = MLP^{grid}_{%ivarepsilon^G}(left [e^{G}_{v^G_s toward v^G_r},v^M_s,v^M_r right])</annotation>
  </semantics>
</math>
</file>

<file path=Object 9/content.xml><?xml version="1.0" encoding="utf-8"?>
<math xmlns="http://www.w3.org/1998/Math/MathML" display="block">
  <semantics>
    <mrow>
      <msubsup>
        <mi>v</mi>
        <mi>i</mi>
        <mi>G</mi>
      </msubsup>
      <mrow>
        <mi>'</mi>
        <mo stretchy="false">=</mo>
        <msubsup>
          <mi mathvariant="italic">MLP</mi>
          <msup>
            <mi>ν</mi>
            <mi>G</mi>
          </msup>
          <mi mathvariant="italic">grid</mi>
        </msubsup>
      </mrow>
      <mrow>
        <mo fence="true" form="prefix" stretchy="false">(</mo>
        <mrow>
          <mrow>
            <mo fence="true" form="prefix" stretchy="true">[</mo>
            <mrow>
              <mrow>
                <msubsup>
                  <mi>v</mi>
                  <mi>i</mi>
                  <mrow>
                    <mi>G</mi>
                    <mi>,</mi>
                    <mi mathvariant="italic">features</mi>
                  </mrow>
                </msubsup>
                <mi>,</mi>
                <mrow>
                  <munder>
                    <mo stretchy="false">∑</mo>
                    <mrow>
                      <msubsup>
                        <mi>e</mi>
                        <mrow>
                          <msubsup>
                            <mi>v</mi>
                            <mi>s</mi>
                            <mi>G</mi>
                          </msubsup>
                          <mo stretchy="false">→</mo>
                          <msubsup>
                            <mi>v</mi>
                            <mi>r</mi>
                            <mi>G</mi>
                          </msubsup>
                        </mrow>
                        <mi>G</mi>
                      </msubsup>
                      <mi mathvariant="normal">:</mi>
                      <mrow>
                        <msubsup>
                          <mi>v</mi>
                          <mi>r</mi>
                          <mi>M</mi>
                        </msubsup>
                        <mo stretchy="false">=</mo>
                        <msubsup>
                          <mi>v</mi>
                          <mi>i</mi>
                          <mi>M</mi>
                        </msubsup>
                      </mrow>
                    </mrow>
                  </munder>
                  <msubsup>
                    <mi>e</mi>
                    <mrow>
                      <msubsup>
                        <mi>v</mi>
                        <mi>s</mi>
                        <mi>G</mi>
                      </msubsup>
                      <mo stretchy="false">→</mo>
                      <msubsup>
                        <mi>v</mi>
                        <mi>r</mi>
                        <mi>G</mi>
                      </msubsup>
                    </mrow>
                    <mi>G</mi>
                  </msubsup>
                </mrow>
                <mi>'</mi>
              </mrow>
            </mrow>
            <mo fence="true" form="postfix" stretchy="true">]</mo>
          </mrow>
        </mrow>
        <mo fence="true" form="postfix" stretchy="false">)</mo>
      </mrow>
    </mrow>
    <annotation encoding="StarMath 5.0">v^G_i' = MLP^{grid}_{%inu^G}(left[ v^{G,features}_{i}, sum from{ e^{G}_{v^G_s toward v^G_r} : v^M_r = v^M_i} e^G_{v^G_s toward v^G_r}'  right ])</annotation>
  </semantics>
</math>
</file>