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3"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Thumbnails/thumbnail.png" manifest:media-type="image/png"/>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Configurations2/" manifest:media-type="application/vnd.sun.xml.ui.configuration"/>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meta.xml" manifest:media-type="text/xml"/>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settings.xml" manifest:media-type="text/xml"/>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styles.xml" manifest:media-type="text/xml"/>
  <manifest:file-entry manifest:full-path="Pictures/1000000000000B8B0000067F5F2A6CFA.jpg" manifest:media-type="image/jpeg"/>
  <manifest:file-entry manifest:full-path="Pictures/1000000100000377000002A7E5AFB874.png" manifest:media-type="image/png"/>
  <manifest:file-entry manifest:full-path="Pictures/10000001000002770000035CA248B69F.png" manifest:media-type="image/png"/>
  <manifest:file-entry manifest:full-path="Pictures/100000010000014A0000014A81EC3A6B.png" manifest:media-type="image/png"/>
  <manifest:file-entry manifest:full-path="Pictures/10000000000002D50000067FA0EA658A.jpg" manifest:media-type="image/jpeg"/>
  <manifest:file-entry manifest:full-path="Pictures/10000000000001980000067F56384566.jpg" manifest:media-type="image/jpeg"/>
  <manifest:file-entry manifest:full-path="Pictures/10000000000006D7000003A64625AE57.jpg" manifest:media-type="image/jpeg"/>
  <manifest:file-entry manifest:full-path="Pictures/1000000100000168000000B55965C526.png" manifest:media-type="image/png"/>
  <manifest:file-entry manifest:full-path="Pictures/1000000000000318000001F1BD7F920C.png" manifest:media-type="image/png"/>
  <manifest:file-entry manifest:full-path="Pictures/1000000000000491000003595F7E172A.jpg" manifest:media-type="image/jpeg"/>
  <manifest:file-entry manifest:full-path="Pictures/1000000100000377000002A7A2E423AD.png" manifest:media-type="image/png"/>
  <manifest:file-entry manifest:full-path="Pictures/10000001000000FA000000AF57DCD893.png" manifest:media-type="image/png"/>
  <manifest:file-entry manifest:full-path="Pictures/100000010000021F000002524F80360B.png" manifest:media-type="image/png"/>
  <manifest:file-entry manifest:full-path="Pictures/1000000100000168000000B590CCEC5C.png" manifest:media-type="image/png"/>
  <manifest:file-entry manifest:full-path="Pictures/1000000000000318000001F1E98C8439.png" manifest:media-type="image/png"/>
  <manifest:file-entry manifest:full-path="Pictures/100000010000020C000002A76EA3A5F8.png" manifest:media-type="image/png"/>
  <manifest:file-entry manifest:full-path="Pictures/100000010000023D000001C519C3DC69.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pushWipe" smil:subtype="fromBottom"/>
    </style:style>
    <style:style style:name="gr1" style:family="graphic" style:parent-style-name="Outlined">
      <style:graphic-properties draw:stroke="solid" svg:stroke-width="0.1cm" svg:stroke-color="#ffffff" svg:stroke-linecap="round" draw:fill="solid" draw:fill-color="#ffffff" loext:decorative="false"/>
    </style:style>
    <style:style style:name="gr2" style:family="graphic">
      <style:graphic-properties style:protect="size" loext:decorative="false"/>
    </style:style>
    <style:style style:name="gr3" style:family="graphic" style:parent-style-name="Filled">
      <style:graphic-properties draw:fill="solid" draw:fill-color="#ffffff" loext:decorative="false"/>
    </style:style>
    <style:style style:name="gr4" style:family="graphic" style:parent-style-name="Filled_20_Blue">
      <style:graphic-properties draw:fill="solid" draw:fill-color="#0d84a1" loext:decorative="fals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auto-grow-height="false" fo:min-height="0.074cm" fo:min-width="0.269cm" fo:wrap-option="wrap" loext:decorative="false"/>
    </style:style>
    <style:style style:name="gr7" style:family="graphic" style:parent-style-name="standard">
      <style:graphic-properties draw:textarea-horizontal-align="justify" draw:textarea-vertical-align="middle" draw:auto-grow-height="false" fo:min-height="0.555cm" fo:min-width="0.305cm" loext:decorative="false"/>
    </style:style>
    <style:style style:name="gr8" style:family="graphic" style:parent-style-name="Outlined_20_Blue">
      <style:graphic-properties draw:stroke="solid" svg:stroke-width="0.1cm" svg:stroke-color="#0d84a1" svg:stroke-linecap="round" draw:fill="solid" draw:fill-color="#ffffff" draw:textarea-horizontal-align="center" draw:textarea-vertical-align="middle" draw:auto-grow-height="false" loext:decorative="false"/>
    </style:style>
    <style:style style:name="gr9" style:family="graphic" style:parent-style-name="Object_20_with_20_no_20_fill_20_and_20_no_20_line">
      <style:graphic-properties svg:stroke-color="#808080" draw:textarea-horizontal-align="center" draw:textarea-vertical-align="middle" draw:ole-draw-aspect="1" style:protect="size" loext:decorative="false"/>
    </style:style>
    <style:style style:name="gr10" style:family="graphic" style:parent-style-name="Object_20_with_20_no_20_fill_20_and_20_no_20_line">
      <style:graphic-properties draw:textarea-horizontal-align="center" draw:textarea-vertical-align="middle" draw:ole-draw-aspect="1" style:protect="size" loext:decorative="false"/>
    </style:style>
    <style:style style:name="gr11" style:family="graphic" style:parent-style-name="standard">
      <style:graphic-properties draw:fill="solid" draw:fill-color="#ffffff" draw:textarea-horizontal-align="justify" draw:textarea-vertical-align="middle" draw:auto-grow-height="false" fo:min-height="0.749cm" fo:min-width="4.5cm" style:writing-mode="lr-tb" loext:decorative="false"/>
      <style:paragraph-properties style:writing-mode="lr-tb"/>
    </style:style>
    <style:style style:name="gr12" style:family="graphic" style:parent-style-name="standard">
      <style:graphic-properties draw:textarea-horizontal-align="justify" draw:textarea-vertical-align="middle" draw:auto-grow-height="false" fo:min-height="0.281cm" fo:min-width="0.051cm" fo:wrap-option="wrap" loext:decorative="false"/>
    </style:style>
    <style:style style:name="gr13" style:family="graphic" style:parent-style-name="objectwithoutfill">
      <style:graphic-properties draw:stroke="solid" svg:stroke-color="#3465a4" draw:marker-end="Arrow_20_short" draw:marker-end-width="0.2cm" draw:fill="none" draw:textarea-vertical-align="middle" loext:decorative="false"/>
    </style:style>
    <style:style style:name="gr14" style:family="graphic" style:parent-style-name="objectwithoutfill">
      <style:graphic-properties draw:stroke="solid" svg:stroke-color="#3465a4" draw:marker-start="Arrow_20_short" draw:marker-end="Arrow_20_short" draw:marker-end-width="0.2cm" draw:fill="none" draw:textarea-vertical-align="middle" loext:decorative="false"/>
    </style:style>
    <style:style style:name="gr15" style:family="graphic" style:parent-style-name="standard">
      <style:graphic-properties draw:textarea-horizontal-align="justify" draw:textarea-vertical-align="middle" draw:auto-grow-height="false" fo:min-height="0.282cm" fo:min-width="0.05cm" fo:wrap-option="wrap" loext:decorative="false"/>
    </style:style>
    <style:style style:name="gr16" style:family="graphic" style:parent-style-name="standard">
      <style:graphic-properties draw:textarea-horizontal-align="justify" draw:textarea-vertical-align="middle" draw:auto-grow-height="false" fo:min-height="0.281cm" fo:min-width="0.05cm" fo:wrap-option="wrap" loext:decorative="false"/>
    </style:style>
    <style:style style:name="gr17" style:family="graphic" style:parent-style-name="standard">
      <style:graphic-properties draw:textarea-horizontal-align="justify" draw:textarea-vertical-align="middle" draw:auto-grow-height="false" fo:min-height="0.282cm" fo:min-width="0.051cm" fo:wrap-option="wrap" loext:decorative="false"/>
    </style:style>
    <style:style style:name="gr18" style:family="graphic" style:parent-style-name="standard">
      <style:graphic-properties svg:stroke-color="#3465a4" draw:fill-color="#dee6ef" draw:textarea-horizontal-align="justify" draw:textarea-vertical-align="middle" draw:auto-grow-height="false" fo:min-height="1cm" fo:min-width="4cm" style:writing-mode="lr-tb" loext:decorative="false"/>
      <style:paragraph-properties style:writing-mode="lr-tb"/>
    </style:style>
    <style:style style:name="gr19" style:family="graphic" style:parent-style-name="objectwithoutfill">
      <style:graphic-properties svg:stroke-color="#3465a4" draw:fill="none" draw:textarea-vertical-align="middle" loext:decorative="false"/>
    </style:style>
    <style:style style:name="gr20" style:family="graphic" style:parent-style-name="objectwithoutfill">
      <style:graphic-properties draw:stroke="dash" draw:stroke-dash="Long_20_Dash" svg:stroke-color="#3465a4" draw:fill="none" draw:textarea-vertical-align="middle" loext:decorative="false"/>
    </style:style>
    <style:style style:name="gr21" style:family="graphic" style:parent-style-name="standard">
      <style:graphic-properties draw:fill="solid" draw:fill-color="#ffffff" draw:textarea-horizontal-align="justify" draw:textarea-vertical-align="middle" draw:auto-grow-height="false" fo:min-height="0.749cm" fo:min-width="0.499cm" style:writing-mode="lr-tb" loext:decorative="false"/>
      <style:paragraph-properties style:writing-mode="lr-tb"/>
    </style:style>
    <style:style style:name="gr22" style:family="graphic" style:parent-style-name="standard">
      <style:graphic-properties draw:fill="solid" draw:fill-color="#ffffff" draw:textarea-horizontal-align="justify" draw:textarea-vertical-align="middle" draw:auto-grow-height="false" fo:min-height="0.749cm" fo:min-width="1.5cm" style:writing-mode="lr-tb" loext:decorative="false"/>
      <style:paragraph-properties style:writing-mode="lr-tb"/>
    </style:style>
    <style:style style:name="gr23" style:family="graphic" style:parent-style-name="standard">
      <style:graphic-properties draw:textarea-horizontal-align="justify" draw:textarea-vertical-align="middle" draw:auto-grow-height="false" fo:min-height="0.812cm" fo:min-width="0.562cm" fo:wrap-option="wrap" loext:decorative="false"/>
    </style:style>
    <style:style style:name="gr24" style:family="graphic" style:parent-style-name="objectwithoutfill">
      <style:graphic-properties draw:stroke="solid" svg:stroke-width="0.2cm" svg:stroke-color="#5983b0" draw:marker-start="Arrow_20_short" draw:marker-start-width="0.5cm" draw:marker-end="Arrow_20_short" draw:marker-end-width="0.5cm" draw:fill="none" draw:textarea-vertical-align="middle" fo:padding-top="0.225cm" fo:padding-bottom="0.225cm" fo:padding-left="0.35cm" fo:padding-right="0.35cm" loext:decorative="false"/>
    </style:style>
    <style:style style:name="gr25" style:family="graphic" style:parent-style-name="standard">
      <style:graphic-properties draw:textarea-vertical-align="middle" draw:auto-grow-height="false" fo:min-height="0.75cm" fo:min-width="0.5cm" fo:wrap-option="wrap" loext:decorative="false"/>
    </style:style>
    <style:style style:name="gr26" style:family="graphic" style:parent-style-name="standard">
      <style:graphic-properties draw:textarea-horizontal-align="justify" draw:textarea-vertical-align="middle" draw:auto-grow-height="false" fo:min-height="0.625cm" fo:min-width="0cm" loext:decorative="false"/>
    </style:style>
    <style:style style:name="gr27" style:family="graphic" style:parent-style-name="objectwithoutfill">
      <style:graphic-properties draw:stroke="solid" svg:stroke-color="#3465a4" draw:marker-start="" draw:marker-end="Arrow_20_short" draw:marker-end-width="0.2cm" draw:fill="none" draw:textarea-vertical-align="middle" loext:decorative="false"/>
    </style:style>
    <style:style style:name="gr28" style:family="graphic" style:parent-style-name="objectwithoutfill">
      <style:graphic-properties svg:stroke-color="#3465a4" draw:fill="none" draw:fill-color="#dee6ef" draw:textarea-vertical-align="middle" loext:decorative="false"/>
    </style:style>
    <style:style style:name="gr29" style:family="graphic" style:parent-style-name="standard">
      <style:graphic-properties svg:stroke-color="#3465a4" draw:fill-color="#800080" draw:textarea-vertical-align="middle" draw:auto-grow-height="false" fo:min-height="0.751cm" fo:min-width="0.501cm" fo:wrap-option="wrap" loext:decorative="false"/>
    </style:style>
    <style:style style:name="gr30" style:family="graphic" style:parent-style-name="objectwithoutfill">
      <style:graphic-properties draw:stroke="solid" svg:stroke-color="#3465a4" draw:marker-start="Arrow_20_short" draw:marker-end="" draw:marker-end-width="0.2cm" draw:fill="none" draw:textarea-vertical-align="middle" loext:decorative="false"/>
    </style:style>
    <style:style style:name="gr31" style:family="graphic" style:parent-style-name="standard">
      <style:graphic-properties svg:stroke-color="#3465a4" draw:fill-color="#800080" draw:textarea-vertical-align="middle" draw:auto-grow-height="false" fo:min-height="1.741cm" fo:min-width="5.028cm" fo:wrap-option="wrap" loext:decorative="false"/>
    </style:style>
    <style:style style:name="gr32" style:family="graphic" style:parent-style-name="objectwithoutfill">
      <style:graphic-properties draw:stroke="solid" svg:stroke-color="#3465a4" draw:fill="none" draw:fill-color="#dee6ef" draw:textarea-vertical-align="middle" loext:decorative="false"/>
    </style:style>
    <style:style style:name="gr33" style:family="graphic" style:parent-style-name="standard">
      <style:graphic-properties draw:fill-color="#b2b2b2" draw:textarea-horizontal-align="justify" draw:textarea-vertical-align="middle" draw:auto-grow-height="false" fo:min-height="0.625cm" fo:min-width="0cm" loext:decorative="false"/>
    </style:style>
    <style:style style:name="gr3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5" style:family="graphic" style:parent-style-name="standard">
      <style:graphic-properties draw:textarea-horizontal-align="justify" draw:textarea-vertical-align="middle" draw:auto-grow-height="false" fo:min-height="1.75cm" fo:min-width="3.5cm" style:writing-mode="lr-tb" loext:decorative="false"/>
      <style:paragraph-properties style:writing-mode="lr-tb"/>
    </style:style>
    <style:style style:name="gr36" style:family="graphic" style:parent-style-name="standard">
      <style:graphic-properties draw:textarea-horizontal-align="justify" draw:textarea-vertical-align="middle" draw:auto-grow-height="false" fo:min-height="1.75cm" fo:min-width="7.5cm" style:writing-mode="lr-tb" loext:decorative="false"/>
      <style:paragraph-properties style:writing-mode="lr-tb"/>
    </style:style>
    <style:style style:name="gr37" style:family="graphic" style:parent-style-name="standard">
      <style:graphic-properties draw:fill-color="#ffff6d" draw:textarea-horizontal-align="justify" draw:textarea-vertical-align="middle" draw:auto-grow-height="false" fo:min-height="1.75cm" fo:min-width="7.5cm" style:writing-mode="lr-tb" loext:decorative="false"/>
      <style:paragraph-properties style:writing-mode="lr-tb"/>
    </style:style>
    <style:style style:name="gr38" style:family="graphic" style:parent-style-name="standard">
      <style:graphic-properties draw:fill-color="#a1467e" draw:textarea-horizontal-align="justify" draw:textarea-vertical-align="middle" draw:auto-grow-height="false" fo:min-height="1.75cm" fo:min-width="10.5cm" style:writing-mode="lr-tb" loext:decorative="false"/>
      <style:paragraph-properties style:writing-mode="lr-tb"/>
    </style:style>
    <style:style style:name="gr39" style:family="graphic" style:parent-style-name="standard">
      <style:graphic-properties draw:fill-color="#bbe33d" draw:textarea-horizontal-align="justify" draw:textarea-vertical-align="middle" draw:auto-grow-height="false" fo:min-height="1.75cm" fo:min-width="10.5cm" style:writing-mode="lr-tb" loext:decorative="false"/>
      <style:paragraph-properties style:writing-mode="lr-tb"/>
    </style:style>
    <style:style style:name="gr40" style:family="graphic" style:parent-style-name="standard">
      <style:graphic-properties draw:fill-color="#729fcf" draw:textarea-horizontal-align="justify" draw:textarea-vertical-align="middle" draw:auto-grow-height="false" fo:min-height="1.75cm" fo:min-width="10.5cm" style:writing-mode="lr-tb" loext:decorative="false"/>
      <style:paragraph-properties style:writing-mode="lr-tb"/>
    </style:style>
    <style:style style:name="gr41" style:family="graphic" style:parent-style-name="standard">
      <style:graphic-properties draw:fill-color="#ff5429" draw:textarea-horizontal-align="justify" draw:textarea-vertical-align="middle" draw:auto-grow-height="false" fo:min-height="1.75cm" fo:min-width="10.5cm" style:writing-mode="lr-tb" loext:decorative="false"/>
      <style:paragraph-properties style:writing-mode="lr-tb"/>
    </style:style>
    <style:style style:name="gr42" style:family="graphic" style:parent-style-name="standard">
      <style:graphic-properties draw:fill-color="#127622" draw:textarea-horizontal-align="justify" draw:textarea-vertical-align="middle" draw:auto-grow-height="false" fo:min-height="1.75cm" fo:min-width="10.5cm" style:writing-mode="lr-tb" loext:decorative="false"/>
      <style:paragraph-properties style:writing-mode="lr-tb"/>
    </style:style>
    <style:style style:name="gr43" style:family="graphic" style:parent-style-name="Outlined_20_Blue">
      <style:graphic-properties draw:stroke="solid" svg:stroke-width="0.85cm" svg:stroke-color="#0d84a1" draw:marker-start-width="1.475cm" draw:marker-end-width="1.475cm" draw:stroke-linejoin="round" svg:stroke-linecap="round" draw:fill="none" draw:opacity="100%" draw:textarea-horizontal-align="center" draw:textarea-vertical-align="middle" draw:auto-grow-height="false" fo:padding-top="0.2cm" fo:padding-bottom="0.2cm" fo:padding-left="0.2cm" fo:padding-right="0.2cm" style:writing-mode="lr-tb" loext:decorative="false"/>
      <style:paragraph-properties style:writing-mode="lr-tb"/>
    </style:style>
    <style:style style:name="gr44" style:family="graphic" style:parent-style-name="Outlined_20_Blue">
      <style:graphic-properties draw:stroke="solid" svg:stroke-width="0.1cm" svg:stroke-color="#0d84a1" draw:marker-start="Circle" draw:marker-start-width="0.36cm" draw:marker-end-width="0.36cm" svg:stroke-linecap="round" loext:decorative="false"/>
    </style:style>
    <style:style style:name="gr45" style:family="graphic" style:parent-style-name="Filled">
      <style:graphic-properties draw:fill="solid" draw:fill-color="#ffffff" draw:opacity="50%" loext:decorative="false"/>
    </style:style>
    <style:style style:name="pr1" style:family="presentation" style:parent-style-name="Freshes-title">
      <style:graphic-properties loext:decorative="false"/>
      <style:paragraph-properties style:writing-mode="lr-tb"/>
    </style:style>
    <style:style style:name="pr2" style:family="presentation" style:parent-style-name="Freshes-subtitle">
      <style:graphic-properties loext:decorative="false"/>
      <style:paragraph-properties style:writing-mode="lr-tb"/>
    </style:style>
    <style:style style:name="pr3" style:family="presentation" style:parent-style-name="Freshes-notes">
      <style:graphic-properties draw:fill-color="#ffffff" draw:auto-grow-height="false" fo:min-height="14cm" loext:decorative="false"/>
      <style:paragraph-properties style:writing-mode="lr-tb"/>
    </style:style>
    <style:style style:name="pr4" style:family="presentation" style:parent-style-name="One_20_Bullet-title">
      <style:graphic-properties fo:min-height="0cm" loext:decorative="false"/>
      <style:paragraph-properties style:writing-mode="lr-tb"/>
    </style:style>
    <style:style style:name="pr5" style:family="presentation" style:parent-style-name="One_20_Bullet-subtitle">
      <style:graphic-properties draw:fill-color="#ffffff" fo:min-height="3.5cm" loext:decorative="false"/>
      <style:paragraph-properties style:writing-mode="lr-tb"/>
    </style:style>
    <style:style style:name="pr6" style:family="presentation" style:parent-style-name="One_20_Bullet-subtitle">
      <style:graphic-properties draw:fill-color="#ffffff" fo:min-height="6.149cm" loext:decorative="false"/>
      <style:paragraph-properties style:writing-mode="lr-tb"/>
    </style:style>
    <style:style style:name="pr7" style:family="presentation" style:parent-style-name="One_20_Bullet-notes">
      <style:graphic-properties draw:fill-color="#ffffff" draw:auto-grow-height="false" fo:min-height="14cm" loext:decorative="false"/>
      <style:paragraph-properties style:writing-mode="lr-tb"/>
    </style:style>
    <style:style style:name="pr8" style:family="presentation" style:parent-style-name="Two_20_Bullets-title">
      <style:graphic-properties fo:min-height="0cm" loext:decorative="false"/>
      <style:paragraph-properties style:writing-mode="lr-tb"/>
    </style:style>
    <style:style style:name="pr9" style:family="presentation" style:parent-style-name="Two_20_Bullets-outline1">
      <style:graphic-properties fo:min-height="0cm" loext:decorative="false"/>
      <style:paragraph-properties style:writing-mode="lr-tb"/>
    </style:style>
    <style:style style:name="pr10" style:family="presentation" style:parent-style-name="Two_20_Bullets-notes">
      <style:graphic-properties draw:fill-color="#ffffff" draw:auto-grow-height="false" fo:min-height="14cm" loext:decorative="false"/>
      <style:paragraph-properties style:writing-mode="lr-tb"/>
    </style:style>
    <style:style style:name="pr11" style:family="presentation" style:parent-style-name="White_2f_Blue_20_Chart-title">
      <style:graphic-properties fo:min-height="1.75cm" loext:decorative="false"/>
      <style:paragraph-properties style:writing-mode="lr-tb"/>
    </style:style>
    <style:style style:name="pr12" style:family="presentation" style:parent-style-name="White_2f_Blue_20_Chart-outline1">
      <style:graphic-properties fo:min-height="10.25cm" loext:decorative="false"/>
      <style:paragraph-properties style:writing-mode="lr-tb"/>
    </style:style>
    <style:style style:name="pr13" style:family="presentation" style:parent-style-name="White_2f_Blue_20_Chart-notes">
      <style:graphic-properties draw:fill-color="#ffffff" draw:auto-grow-height="false" fo:min-height="14cm" loext:decorative="false"/>
      <style:paragraph-properties style:writing-mode="lr-tb"/>
    </style:style>
    <style:style style:name="pr14" style:family="presentation" style:parent-style-name="Three_20_Bullets-outline1">
      <style:graphic-properties fo:min-height="0cm" loext:decorative="false"/>
      <style:paragraph-properties style:writing-mode="lr-tb"/>
    </style:style>
    <style:style style:name="pr15" style:family="presentation" style:parent-style-name="Three_20_Bullets-title">
      <style:graphic-properties fo:min-height="0cm" loext:decorative="false"/>
      <style:paragraph-properties style:writing-mode="lr-tb"/>
    </style:style>
    <style:style style:name="pr16" style:family="presentation" style:parent-style-name="Three_20_Bullets-notes">
      <style:graphic-properties draw:fill-color="#ffffff" draw:auto-grow-height="false" fo:min-height="14cm" loext:decorative="false"/>
      <style:paragraph-properties style:writing-mode="lr-tb"/>
    </style:style>
    <style:style style:name="pr17" style:family="presentation" style:parent-style-name="White_2f_Blue_20_Chart-title">
      <style:graphic-properties fo:min-height="0cm" loext:decorative="false"/>
      <style:paragraph-properties style:writing-mode="lr-tb"/>
    </style:style>
    <style:style style:name="pr18" style:family="presentation" style:parent-style-name="White_2f_Blue_20_Chart-outline1">
      <style:graphic-properties fo:min-height="0cm" loext:decorative="false"/>
      <style:paragraph-properties style:writing-mode="lr-tb"/>
    </style:style>
    <style:style style:name="pr19" style:family="presentation" style:parent-style-name="Four_20_Bullets-outline1">
      <style:graphic-properties fo:min-height="0cm" loext:decorative="false"/>
      <style:paragraph-properties style:writing-mode="lr-tb"/>
    </style:style>
    <style:style style:name="pr20" style:family="presentation" style:parent-style-name="Four_20_Bullets-title">
      <style:graphic-properties fo:min-height="0cm" loext:decorative="false"/>
      <style:paragraph-properties style:writing-mode="lr-tb"/>
    </style:style>
    <style:style style:name="pr21" style:family="presentation" style:parent-style-name="Four_20_Bullets-notes">
      <style:graphic-properties draw:fill-color="#ffffff" draw:auto-grow-height="false" fo:min-height="14cm" loext:decorative="false"/>
      <style:paragraph-properties style:writing-mode="lr-tb"/>
    </style:style>
    <style:style style:name="pr22" style:family="presentation" style:parent-style-name="Blue_2f_White_20_Chart-title">
      <style:graphic-properties fo:min-height="0cm" loext:decorative="false"/>
      <style:paragraph-properties style:writing-mode="lr-tb"/>
    </style:style>
    <style:style style:name="pr23" style:family="presentation" style:parent-style-name="Blue_2f_White_20_Chart-outline1">
      <style:graphic-properties fo:min-height="0cm" loext:decorative="false"/>
      <style:paragraph-properties style:writing-mode="lr-tb"/>
    </style:style>
    <style:style style:name="pr24" style:family="presentation" style:parent-style-name="Blue_2f_White_20_Chart-notes">
      <style:graphic-properties draw:fill-color="#ffffff" draw:auto-grow-height="false" fo:min-height="14cm" loext:decorative="false"/>
      <style:paragraph-properties style:writing-mode="lr-tb"/>
    </style:style>
    <style:style style:name="pr25" style:family="presentation" style:parent-style-name="Left_20_Bar-title">
      <style:graphic-properties fo:min-height="0cm" loext:decorative="false"/>
      <style:paragraph-properties style:writing-mode="lr-tb"/>
    </style:style>
    <style:style style:name="pr26" style:family="presentation" style:parent-style-name="Left_20_Bar-outline1">
      <style:graphic-properties fo:min-height="0cm" loext:decorative="false"/>
      <style:paragraph-properties style:writing-mode="lr-tb"/>
    </style:style>
    <style:style style:name="pr27" style:family="presentation" style:parent-style-name="Left_20_Bar-notes">
      <style:graphic-properties draw:fill-color="#ffffff" draw:auto-grow-height="false" fo:min-height="14cm" loext:decorative="false"/>
      <style:paragraph-properties style:writing-mode="lr-tb"/>
    </style:style>
    <style:style style:name="pr28" style:family="presentation" style:parent-style-name="Right_20_Bar-title">
      <style:graphic-properties fo:min-height="0cm" loext:decorative="false"/>
      <style:paragraph-properties style:writing-mode="lr-tb"/>
    </style:style>
    <style:style style:name="pr29" style:family="presentation" style:parent-style-name="Right_20_Bar-outline1">
      <style:graphic-properties fo:min-height="0cm" loext:decorative="false"/>
      <style:paragraph-properties style:writing-mode="lr-tb"/>
    </style:style>
    <style:style style:name="pr30" style:family="presentation" style:parent-style-name="Right_20_Bar-notes">
      <style:graphic-properties draw:fill-color="#ffffff" draw:auto-grow-height="false" fo:min-height="14cm" loext:decorative="false"/>
      <style:paragraph-properties style:writing-mode="lr-tb"/>
    </style:style>
    <style:style style:name="P1" style:family="paragraph">
      <loext:graphic-properties draw:fill="solid" draw:fill-color="#ffffff"/>
      <style:text-properties fo:color="#0d84a1" loext:opacity="100%"/>
    </style:style>
    <style:style style:name="P2" style:family="paragraph">
      <loext:graphic-properties draw:fill-color="#ffffff"/>
    </style:style>
    <style:style style:name="P3" style:family="paragraph">
      <style:paragraph-properties fo:text-align="start"/>
    </style:style>
    <style:style style:name="P4" style:family="paragraph">
      <loext:graphic-properties draw:fill="solid" draw:fill-color="#0d84a1"/>
    </style:style>
    <style:style style:name="P5" style:family="paragraph">
      <loext:graphic-properties draw:fill="none"/>
      <style:paragraph-properties fo:text-align="center"/>
    </style:style>
    <style:style style:name="P6" style:family="paragraph">
      <style:paragraph-properties fo:text-align="center"/>
    </style:style>
    <style:style style:name="P7" style:family="paragraph">
      <loext:graphic-properties draw:fill-color="#ffffff"/>
      <style:text-properties fo:font-size="20pt"/>
    </style:style>
    <style:style style:name="P8" style:family="paragraph">
      <style:paragraph-properties fo:text-align="center"/>
      <style:text-properties fo:color="#b2b2b2" loext:opacity="100%"/>
    </style:style>
    <style:style style:name="P9" style:family="paragraph">
      <loext:graphic-properties draw:fill="solid" draw:fill-color="#ffffff"/>
      <style:paragraph-properties fo:text-align="center" style:writing-mode="lr-tb"/>
      <style:text-properties fo:color="#b2b2b2" loext:opacity="100%"/>
    </style:style>
    <style:style style:name="P10" style:family="paragraph">
      <loext:graphic-properties draw:fill-color="#dee6ef"/>
      <style:paragraph-properties fo:text-align="center" style:writing-mode="lr-tb"/>
    </style:style>
    <style:style style:name="P11" style:family="paragraph">
      <loext:graphic-properties draw:fill="solid" draw:fill-color="#ffffff"/>
      <style:paragraph-properties fo:text-align="center" style:writing-mode="lr-tb"/>
    </style:style>
    <style:style style:name="P12" style:family="paragraph">
      <style:text-properties fo:font-size="24pt" style:font-size-asian="24pt" style:font-size-complex="24pt"/>
    </style:style>
    <style:style style:name="P13" style:family="paragraph">
      <style:text-properties fo:font-size="24pt"/>
    </style:style>
    <style:style style:name="P14" style:family="paragraph">
      <loext:graphic-properties draw:fill="none" draw:fill-color="#dee6ef"/>
      <style:paragraph-properties fo:text-align="center"/>
    </style:style>
    <style:style style:name="P15" style:family="paragraph">
      <loext:graphic-properties draw:fill-color="#800080"/>
      <style:paragraph-properties fo:text-align="center"/>
    </style:style>
    <style:style style:name="P16" style:family="paragraph">
      <style:text-properties fo:font-size="18pt" style:font-size-asian="18pt" style:font-size-complex="18pt"/>
    </style:style>
    <style:style style:name="P17" style:family="paragraph">
      <loext:graphic-properties draw:fill-color="#b2b2b2"/>
      <style:paragraph-properties fo:text-align="center"/>
    </style:style>
    <style:style style:name="P18" style:family="paragraph">
      <style:text-properties fo:font-size="20pt" style:font-size-asian="20pt" style:font-size-complex="20pt"/>
    </style:style>
    <style:style style:name="P19" style:family="paragraph">
      <style:paragraph-properties fo:text-align="center" style:writing-mode="lr-tb"/>
    </style:style>
    <style:style style:name="P20" style:family="paragraph">
      <loext:graphic-properties draw:fill-color="#ffff6d"/>
      <style:paragraph-properties fo:text-align="center" style:writing-mode="lr-tb"/>
    </style:style>
    <style:style style:name="P21" style:family="paragraph">
      <loext:graphic-properties draw:fill-color="#a1467e"/>
      <style:paragraph-properties fo:text-align="center" style:writing-mode="lr-tb"/>
    </style:style>
    <style:style style:name="P22" style:family="paragraph">
      <loext:graphic-properties draw:fill-color="#bbe33d"/>
      <style:paragraph-properties fo:text-align="center" style:writing-mode="lr-tb"/>
    </style:style>
    <style:style style:name="P23" style:family="paragraph">
      <loext:graphic-properties draw:fill-color="#729fcf"/>
      <style:paragraph-properties fo:text-align="center" style:writing-mode="lr-tb"/>
    </style:style>
    <style:style style:name="P24" style:family="paragraph">
      <loext:graphic-properties draw:fill-color="#ff5429"/>
      <style:paragraph-properties fo:text-align="center" style:writing-mode="lr-tb"/>
    </style:style>
    <style:style style:name="P25" style:family="paragraph">
      <loext:graphic-properties draw:fill-color="#127622"/>
      <style:paragraph-properties fo:text-align="center" style:writing-mode="lr-tb"/>
    </style:style>
    <style:style style:name="P26" style:family="paragraph">
      <style:text-properties fo:color="#0d84a1" loext:opacity="100%" fo:font-size="24pt" style:font-size-asian="24pt" style:font-size-complex="24pt"/>
    </style:style>
    <style:style style:name="P27" style:family="paragraph">
      <loext:graphic-properties draw:fill="none" draw:opacity="100%"/>
      <style:paragraph-properties style:writing-mode="lr-tb"/>
      <style:text-properties fo:color="#0d84a1" loext:opacity="100%" fo:font-size="24pt" style:font-size-asian="24pt" style:font-size-complex="24pt"/>
    </style:style>
    <style:style style:name="P28" style:family="paragraph">
      <style:text-properties fo:color="#0d84a1" loext:opacity="100%"/>
    </style:style>
    <style:style style:name="P29" style:family="paragraph">
      <style:paragraph-properties fo:margin-top="0.42cm" fo:margin-bottom="0.35cm"/>
    </style:style>
    <style:style style:name="P30" style:family="paragraph">
      <loext:graphic-properties draw:fill="solid" draw:fill-color="#ffffff" draw:opacity="50%"/>
    </style:style>
    <style:style style:name="T1" style:family="text">
      <style:text-properties fo:font-size="12pt" style:font-size-asian="12pt" style:font-size-complex="12pt"/>
    </style:style>
    <style:style style:name="T2" style:family="text">
      <style:text-properties fo:color="#ffff00" loext:opacity="100%"/>
    </style:style>
    <style:style style:name="T3" style:family="text">
      <style:text-properties fo:color="#b2b2b2" loext:opacity="100%"/>
    </style:style>
    <style:style style:name="T4" style:family="text">
      <style:text-properties fo:font-size="24pt" style:text-underline-style="solid" style:text-underline-width="auto" style:text-underline-color="font-color" style:font-size-asian="24pt" style:font-size-complex="24pt"/>
    </style:style>
    <style:style style:name="T5" style:family="text">
      <style:text-properties fo:font-size="24pt" style:font-size-asian="24pt" style:font-size-complex="24pt"/>
    </style:style>
    <style:style style:name="T6" style:family="text">
      <style:text-properties fo:font-size="24pt"/>
    </style:style>
    <style:style style:name="T7" style:family="text">
      <style:text-properties fo:font-size="18pt" style:font-size-asian="18pt" style:font-size-complex="18pt"/>
    </style:style>
    <style:style style:name="T8" style:family="text">
      <style:text-properties fo:font-size="20pt" style:font-size-asian="20pt" style:font-size-complex="20pt"/>
    </style:style>
    <style:style style:name="T9" style:family="text">
      <style:text-properties fo:color="#0d84a1" loext:opacity="100%" fo:font-size="24pt" fo:font-weight="bold" style:font-size-asian="24pt" style:font-weight-asian="bold" style:font-size-complex="24pt" style:font-weight-complex="bold"/>
    </style:style>
    <style:style style:name="T10" style:family="text">
      <style:text-properties fo:font-size="14pt" style:font-size-asian="14pt" style:font-size-complex="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text:list-style style:name="L4">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Freshes" presentation:presentation-page-layout-name="AL1T0" xml:id="id84" draw:id="id84">
        <office:forms form:automatic-focus="false" form:apply-design-mode="false"/>
        <draw:line draw:style-name="gr1" draw:text-style-name="P1" draw:layer="layout" svg:x1="2cm" svg:y1="8.9cm" svg:x2="20.4cm" svg:y2="8.9cm">
          <text:p/>
        </draw:line>
        <draw:frame presentation:style-name="pr1" draw:layer="layout" svg:width="24cm" svg:height="7cm" svg:x="2cm" svg:y="1.6cm" presentation:class="title" presentation:user-transformed="true">
          <draw:text-box>
            <text:p>PIFOCAST</text:p>
          </draw:text-box>
        </draw:frame>
        <draw:frame presentation:style-name="pr2" draw:layer="layout" svg:width="19cm" svg:height="5cm" svg:x="2cm" svg:y="9.2cm" presentation:class="subtitle" presentation:user-transformed="true">
          <draw:text-box>
            <text:p>Un modèle simple de prévision météo<text:line-break/></text:p>
            <text:p><text:span text:style-name="T1">Nicolas Gasnier 2025</text:span></text:p>
          </draw:text-box>
        </draw:frame>
        <anim:par presentation:node-type="timing-root">
          <anim:par smil:begin="id84.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One_20_Bullet" presentation:presentation-page-layout-name="AL1T0" xml:id="id85" draw:id="id85">
        <office:forms form:automatic-focus="false" form:apply-design-mode="false"/>
        <draw:path draw:style-name="gr3" draw:text-style-name="P1" draw:layer="layout" svg:width="5.335cm" svg:height="4.127cm" svg:x="11.327cm" svg:y="2cm" svg:viewBox="0 0 5336 4128" svg:d="M0 2670c0-66 22-116 66-151 34-37 84-56 150-56h513c59 0 109 19 148 59 39 39 59 88 59 148 0 59-21 109-62 150-40 41-89 61-145 61h-513c-59 0-110-20-153-61-42-41-63-91-63-150zM226 3917c0-57 22-107 66-151 40-37 90-56 150-56h4457c59 0 109 19 150 59 41 39 61 87 61 145s-20 108-61 151c-41 42-91 63-150 63h-4457c-60 0-111-20-153-61s-63-91-63-150zM729 936c0-63 19-112 56-146 41-44 91-66 151-66 59 0 109 22 150 66l353 357c44 41 66 89 66 146 0 62-20 113-59 153-39 39-89 58-148 58-54 0-102-20-146-61l-367-357c-37-34-56-85-56-150zM1363 2671c0 213 44 404 132 574 6 21 27 32 61 32h405c19 0 31-5 35-16 5-11 0-24-16-40-132-160-197-343-197-550 0-245 87-453 263-624 175-171 384-256 625-256 245 0 452 85 623 256s256 379 256 624c0 210-64 393-193 550-9 16-14 25-14 28 0 6 3 13 7 19 5 6 14 9 26 9h413c22 0 40-11 52-32 91-173 136-364 136-574 0-236-59-453-176-654-118-201-277-360-477-477-201-118-419-177-654-177s-453 59-653 177c-201 117-360 276-477 477-118 201-177 418-177 654zM2460 729v-513c0-59 20-110 61-152 40-43 90-64 148-64s109 21 152 64c44 42 66 93 66 152v513c0 59-22 110-66 152-43 43-94 64-152 64s-108-21-148-64c-41-42-61-93-61-152zM3836 1293c0-60 21-108 62-146l352-357c41-44 91-66 151-66 62 0 113 20 152 61s59 91 59 151c0 62-17 113-52 150l-371 357c-41 38-89 57-146 57-62 0-112-19-150-57-38-37-57-87-57-150zM4405 2670c0-66 21-116 61-151 35-37 82-56 141-56h513c59 0 110 19 152 59 43 39 64 88 64 148 0 59-21 109-64 150-42 41-93 61-152 61h-513c-56 0-104-20-143-61s-59-91-59-150z">
          <text:p/>
        </draw:path>
        <draw:frame presentation:style-name="pr4" draw:layer="layout" svg:width="25cm" svg:height="2cm" svg:x="1.5cm" svg:y="6.5cm" presentation:class="title" presentation:user-transformed="true">
          <draw:text-box>
            <text:p>Introduction</text:p>
          </draw:text-box>
        </draw:frame>
        <draw:frame presentation:style-name="pr5" draw:text-style-name="P2" draw:layer="layout" svg:width="17cm" svg:height="3.5cm" svg:x="9.5cm" svg:y="9cm" presentation:class="subtitle" presentation:user-transformed="true">
          <draw:text-box>
            <text:p>La suite de PIFO, un modèle Javascript simple</text:p>
          </draw:text-box>
        </draw:frame>
        <draw:frame presentation:style-name="pr6" draw:text-style-name="P2" draw:layer="layout" svg:width="8.5cm" svg:height="6.149cm" svg:x="1.5cm" svg:y="8.926cm">
          <draw:text-box>
            <text:p text:style-name="P3"><text:span text:style-name="T2">P</text:span>rojet<text:span text:style-name="T2"><text:line-break/></text:span><text:span text:style-name="T2">I</text:span>nformatique à<text:line-break/><text:span text:style-name="T2">F</text:span>ormules<text:line-break/><text:span text:style-name="T2">O</text:span>uvertes</text:p>
          </draw:text-box>
        </draw:frame>
        <anim:par presentation:node-type="timing-root">
          <anim:par smil:begin="id85.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2" presentation:class="page"/>
          <draw:frame presentation:style-name="pr7" draw:text-style-name="P2" draw:layer="layout" svg:width="17cm" svg:height="14cm" svg:x="2cm" svg:y="13cm" presentation:class="notes" presentation:placeholder="true">
            <draw:text-box/>
          </draw:frame>
        </presentation:notes>
      </draw:page>
      <draw:page draw:name="page3" draw:style-name="dp1" draw:master-page-name="Two_20_Bullets" presentation:presentation-page-layout-name="AL2T3" xml:id="id86" draw:id="id86">
        <office:forms form:automatic-focus="false" form:apply-design-mode="false"/>
        <draw:frame presentation:style-name="pr8" draw:layer="backgroundobjects" svg:width="15cm" svg:height="2.629cm" svg:x="12cm" svg:y="2cm" presentation:class="title" presentation:user-transformed="true">
          <draw:text-box>
            <text:p>Fonctions clés de PIFO</text:p>
          </draw:text-box>
        </draw:frame>
        <draw:frame presentation:style-name="pr9" draw:layer="layout" svg:width="11.25cm" svg:height="3.5cm" svg:x="15.7cm" svg:y="5cm" presentation:class="outline" presentation:user-transformed="true">
          <draw:text-box>
            <text:list text:style-name="L4">
              <text:list-item>
                <text:p>Coeurs barotropique and barocliniques</text:p>
              </text:list-item>
            </text:list>
          </draw:text-box>
        </draw:frame>
        <draw:path draw:style-name="gr4" draw:text-style-name="P4" draw:layer="layout" svg:width="1.226cm" svg:height="0.963cm" svg:x="13.773cm" svg:y="12.036cm" svg:viewBox="0 0 1227 964" svg:d="M864 425c8-8 12-18 12-30s-4-22-12-31c-9-9-19-13-32-13-59 0-114 6-166 18-51 12-99 30-144 55-45 24-87 53-125 85-39 33-79 72-121 118-8 10-13 20-13 30 0 13 4 23 13 31 9 9 19 13 30 13s22-4 31-13c13-10 30-27 51-48 21-22 37-37 46-46 63-56 125-96 184-120 60-24 131-36 214-36 13 0 23-4 32-13zM1227 259c0 43-5 87-14 132-39 194-163 343-371 446-97 49-198 74-300 74-66 0-132-10-196-32-7-3-27-12-60-29-34-17-56-25-66-25-7 0-16 7-27 22-10 14-20 30-30 47-10 18-22 34-36 48-15 15-28 22-42 22-19 0-33-4-43-12s-20-21-31-41c-1-1-3-4-4-7-2-3-3-5-4-6-1-2-2-4-2-7-1-2-1-6-1-10 0-16 7-32 21-50 14-17 30-32 47-45 17-12 32-25 46-38s21-25 21-33c0-2-3-11-9-26-6-16-10-26-11-30-4-23-6-46-6-71 0-53 10-104 30-151 20-48 47-90 81-127 34-36 73-68 117-95 43-27 90-49 139-65 25-8 58-14 100-18 41-3 82-5 122-6 41 0 82-2 123-4s78-7 112-16 60-22 78-39c4-4 11-11 20-20s15-15 20-19 11-8 19-13c8-6 16-9 25-12 9-2 19-3 30-3 17 0 33 11 48 32 14 21 25 46 32 76s13 59 16 85c4 26 6 48 6 66z">
          <text:p/>
        </draw:path>
        <draw:frame presentation:style-name="pr9" draw:layer="layout" svg:width="11.25cm" svg:height="3.5cm" svg:x="15.75cm" svg:y="8.5cm" presentation:class="outline" presentation:user-transformed="true">
          <draw:text-box>
            <text:list text:style-name="L4">
              <text:list-item>
                <text:p>Initialisation depuis les analyses GFS</text:p>
              </text:list-item>
            </text:list>
          </draw:text-box>
        </draw:frame>
        <draw:frame draw:style-name="gr5" draw:text-style-name="P5" draw:layer="layout" svg:width="11cm" svg:height="6.903cm" svg:x="0.5cm" svg:y="1.5cm">
          <draw:image xlink:href="Pictures/1000000000000318000001F1E98C8439.png" xlink:type="simple" xlink:show="embed" xlink:actuate="onLoad" draw:mime-type="image/png">
            <text:p/>
          </draw:image>
        </draw:frame>
        <draw:frame draw:style-name="gr5" draw:text-style-name="P5" draw:layer="layout" svg:width="11cm" svg:height="6.903cm" svg:x="0.5cm" svg:y="8.597cm">
          <draw:image xlink:href="Pictures/1000000000000318000001F1BD7F920C.png" xlink:type="simple" xlink:show="embed" xlink:actuate="onLoad" draw:mime-type="image/png">
            <text:p/>
          </draw:image>
        </draw:frame>
        <draw:custom-shape draw:style-name="gr6" draw:layer="layout" svg:width="0.999cm" svg:height="0.999cm" svg:x="14.001cm" svg:y="6.001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7" draw:text-style-name="P6" draw:layer="layout" svg:width="0.999cm" svg:height="0.999cm" svg:x="14cm" svg:y="9.001cm">
          <text:p/>
          <draw:enhanced-geometry svg:viewBox="0 0 21600 21600" draw:text-areas="4230 4230 21600 21600" draw:type="flowchart-internal-storage" draw:enhanced-path="M 0 0 L 21600 0 21600 21600 0 21600 Z N M 4230 0 L 4230 21600 N M 0 4230 L 21600 4230 N"/>
        </draw:custom-shape>
        <draw:frame presentation:style-name="pr9" draw:layer="layout" svg:width="11.25cm" svg:height="3.5cm" svg:x="15.75cm" svg:y="11.5cm" presentation:class="outline" presentation:user-transformed="true">
          <draw:text-box>
            <text:list text:style-name="L4">
              <text:list-item>
                <text:p>Aire limitée, résolution ~1°</text:p>
              </text:list-item>
            </text:list>
          </draw:text-box>
        </draw:frame>
        <anim:par presentation:node-type="timing-root">
          <anim:par smil:begin="id86.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3" presentation:class="page"/>
          <draw:frame presentation:style-name="pr10" draw:text-style-name="P2" draw:layer="layout" svg:width="17cm" svg:height="14cm" svg:x="2cm" svg:y="13cm" presentation:class="notes" presentation:placeholder="true">
            <draw:text-box/>
          </draw:frame>
        </presentation:notes>
      </draw:page>
      <draw:page draw:name="page4" draw:style-name="dp1" draw:master-page-name="White_2f_Blue_20_Chart" presentation:presentation-page-layout-name="AL3T1" xml:id="id87" draw:id="id87">
        <office:forms form:automatic-focus="false" form:apply-design-mode="false"/>
        <draw:frame presentation:style-name="pr11" draw:layer="layout" svg:width="9.8cm" svg:height="2cm" svg:x="0cm" svg:y="0.8cm" presentation:class="title" presentation:user-transformed="true">
          <draw:text-box>
            <text:p>Modèle classique</text:p>
          </draw:text-box>
        </draw:frame>
        <draw:frame presentation:style-name="pr12" draw:layer="layout" svg:width="25.2cm" svg:height="10.5cm" svg:x="1.4cm" svg:y="3.5cm" presentation:class="outline" presentation:user-transformed="true">
          <draw:text-box>
            <text:list text:style-name="L4">
              <text:list-item>
                <text:p>Itération :</text:p>
                <text:list>
                  <text:list-item>
                    <text:p>Calcul de dérivées <text:line-break/>(eq. Dynamiques + paramétrisations)</text:p>
                  </text:list-item>
                  <text:list-item>
                    <text:p>Etat T+1 = Dérivée + Etat T<text:line-break/>(Euler, Leapfrog, Runge Kutta, méthodes <text:line-break/>lagrangiennes...)</text:p>
                  </text:list-item>
                </text:list>
              </text:list-item>
              <text:list-item>
                <text:p>Problématiques : </text:p>
                <text:list>
                  <text:list-item>
                    <text:p>Ingénierie humaine complexe <text:line-break/>(modèles dans le modèle, <text:line-break/>problèmes d’instabilité numériques…)</text:p>
                  </text:list-item>
                  <text:list-item>
                    <text:p>Non linéarité (pas de temps petit)</text:p>
                  </text:list-item>
                </text:list>
              </text:list-item>
            </text:list>
          </draw:text-box>
        </draw:frame>
        <draw:frame draw:style-name="gr5" draw:text-style-name="P5" draw:layer="layout" svg:width="4.614cm" svg:height="3.229cm" svg:x="22.886cm" svg:y="10.771cm">
          <draw:image xlink:href="Pictures/10000001000000FA000000AF57DCD893.png" xlink:type="simple" xlink:show="embed" xlink:actuate="onLoad" draw:mime-type="image/png">
            <text:p/>
          </draw:image>
        </draw:frame>
        <draw:frame draw:style-name="gr5" draw:text-style-name="P5" draw:layer="layout" svg:width="4.73cm" svg:height="4.73cm" svg:x="17.77cm" svg:y="9.77cm">
          <draw:image xlink:href="Pictures/100000010000014A0000014A81EC3A6B.png" xlink:type="simple" xlink:show="embed" xlink:actuate="onLoad" draw:mime-type="image/png">
            <text:p/>
          </draw:image>
        </draw:frame>
        <draw:frame draw:style-name="gr5" draw:text-style-name="P5" draw:layer="layout" svg:width="5.473cm" svg:height="5.987cm" svg:x="20.527cm" svg:y="3.013cm">
          <draw:image xlink:href="Pictures/100000010000021F000002524F80360B.png" xlink:type="simple" xlink:show="embed" xlink:actuate="onLoad" draw:mime-type="image/png">
            <text:p/>
          </draw:image>
        </draw:frame>
        <anim:par presentation:node-type="timing-root">
          <anim:par smil:begin="id87.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4" presentation:class="page"/>
          <draw:frame presentation:style-name="pr13" draw:text-style-name="P7" draw:layer="layout" svg:width="17cm" svg:height="14cm" svg:x="2cm" svg:y="13cm" presentation:class="notes" presentation:placeholder="true">
            <draw:text-box/>
          </draw:frame>
        </presentation:notes>
      </draw:page>
      <draw:page draw:name="page5" draw:style-name="dp1" draw:master-page-name="Three_20_Bullets" presentation:presentation-page-layout-name="AL4T12" xml:id="id88" draw:id="id88">
        <office:forms form:automatic-focus="false" form:apply-design-mode="false"/>
        <draw:path draw:style-name="gr4" draw:text-style-name="P4" draw:layer="layout" svg:width="1.114cm" svg:height="1.269cm" svg:x="4.522cm" svg:y="8.084cm" svg:viewBox="0 0 1115 1270" svg:d="M1094 856c10 5 16 13 18 23 3 11 2 21-3 29l-40 67c-12 21-29 26-52 15l-82-50 15 65c3 10 2 19-3 28s-12 15-22 19l-37 10c-10 3-20 2-30-4s-16-14-17-24l-47-176-157-89v193l132 132c8 8 12 18 12 28 0 11-4 21-12 29l-28 27c-8 8-17 13-28 13s-20-5-26-13l-50-47v99c0 12-4 21-12 29-8 7-18 11-27 11h-80c-11 0-21-4-28-11-8-8-11-17-11-29v-99l-50 47c-8 8-18 13-29 13-10 0-19-5-26-13l-29-27c-9-8-13-18-13-29 0-10 4-19 13-26l134-134v-193l-157 89-47 176c-3 10-9 18-18 24-10 6-19 7-29 4l-37-10c-10-2-18-8-23-18s-6-19-5-29l18-65-82 50c-23 11-41 6-52-15l-40-67c-13-22-8-39 15-52l84-47-64-18c-12-3-20-9-25-18s-6-19-2-29l10-37c1-10 7-18 16-24 9-5 19-7 31-3l173 47 159-92-159-92-173 47c-12 4-22 2-31-3-9-6-15-14-16-24l-10-37c-4-10-3-20 2-29s13-15 25-18l64-18-84-47c-23-13-28-30-15-52l40-67c11-21 29-26 52-15l82 50-15-65c-3-6-4-13-1-19 2-7 6-13 10-18s9-8 16-10l37-10c7-1 13-1 20 0 6 2 12 5 17 10s8 11 10 18l47 176 157 89v-193l-135-132c-6-8-10-18-10-28 0-11 4-21 10-29l30-27c18-20 37-20 55 0l50 47v-99c0-12 3-21 11-29 7-7 17-11 28-11h80c11 0 21 4 28 11 8 8 11 17 11 29v99l50-47c6-8 15-13 27-13s21 5 27 13l30 27c7 8 10 18 10 29 0 10-3 20-10 28l-134 132v193l157-89 47-176c1-10 7-18 17-24s20-7 30-4l37 10c10 4 17 10 22 19s6 18 3 28l-15 65 82-50c23-11 40-6 52 15l40 67c11 22 6 39-15 52l-85 47 65 18c11 3 20 9 25 18s5 19 2 29l-10 37c-1 10-7 18-16 24-9 5-19 7-31 3l-174-47-158 92 158 92 174-47c12-4 22-2 31 3 9 6 15 14 16 24l10 37c3 10 3 20-2 29s-14 15-25 18l-65 18z">
          <text:p/>
        </draw:path>
        <draw:frame presentation:style-name="pr14" draw:layer="layout" svg:width="8.4cm" svg:height="5cm" svg:x="0.7cm" svg:y="9.6cm" presentation:class="outline" presentation:user-transformed="true">
          <draw:text-box>
            <text:list text:style-name="L4">
              <text:list-item>
                <text:p>Utiliser l’approche GNN</text:p>
              </text:list-item>
            </text:list>
          </draw:text-box>
        </draw:frame>
        <draw:path draw:style-name="gr4" draw:text-style-name="P4" draw:layer="layout" svg:width="1.271cm" svg:height="1.11cm" svg:x="13.335cm" svg:y="8.237cm" svg:viewBox="0 0 1272 1111" svg:d="M389 555c62 0 116 20 163 58 47 39 74 88 81 148 9 73-10 136-58 190-47 53-107 80-178 80-58 0-109-18-153-54-43-37-70-83-80-139-4-12-1-22 7-31s19-14 32-14h80c20 0 33 8 39 25 12 36 37 54 75 54 16 0 31-4 43-12 13-8 22-20 29-35 6-14 9-29 7-44-3-20-13-36-30-48-16-13-34-19-54-19h-352c-12 0-21-4-29-11-7-8-11-17-11-29v-79c0-12 4-21 11-29 8-7 17-11 29-11zM40 475c-12 0-21-3-29-11-7-7-11-17-11-28v-80c0-11 4-21 11-28 8-8 17-11 29-11h828c20 0 38-7 55-19 16-12 26-28 30-48 3-23-3-45-19-64s-36-28-61-28c-38 0-63 18-74 54-7 17-20 25-40 25h-79c-9 0-16-2-23-6-6-4-11-10-15-17-3-8-4-15-2-21 8-42 26-79 53-111 28-32 62-55 103-69 42-14 85-17 129-8 45 9 84 31 117 64s54 72 64 116c15 76-1 144-49 202-48 59-109 88-184 88zM992 555c89 0 162 35 218 104 57 70 74 150 53 241-12 49-37 93-76 131s-84 62-135 72c-71 17-137 7-196-28-60-36-101-86-124-150-5-14-4-26 5-36 8-11 19-17 32-17h84c17 0 28 7 35 20 23 40 58 60 104 60 33 0 61-12 85-35 23-23 34-51 34-84s-11-61-34-84c-24-23-52-35-85-35h-288c-18-63-51-116-99-159z">
          <text:p/>
        </draw:path>
        <draw:frame presentation:style-name="pr14" draw:layer="layout" svg:width="8.4cm" svg:height="5cm" svg:x="9.8cm" svg:y="9.6cm" presentation:class="outline" presentation:user-transformed="true">
          <draw:text-box>
            <text:list text:style-name="L4">
              <text:list-item>
                <text:p>Puissance de calcul limitée</text:p>
              </text:list-item>
            </text:list>
          </draw:text-box>
        </draw:frame>
        <draw:path draw:style-name="gr4" draw:text-style-name="P4" draw:layer="layout" svg:width="1.269cm" svg:height="1.11cm" svg:x="22.233cm" svg:y="8.276cm" svg:viewBox="0 0 1270 1111" svg:d="M159 159c154 0 285 54 393 162 108 109 162 240 162 393v358c0 11-3 21-11 28-7 8-17 11-28 11h-80c-11 0-21-3-28-11-8-7-11-17-11-28v-358c-154 0-285-54-394-162-108-108-162-239-162-393zM1111 0h159c0 142-48 266-144 372s-214 166-355 181c-26-101-75-190-146-268 25-43 54-82 88-116 34-35 72-65 113-90 41-24 86-44 135-58s99-21 150-21z">
          <text:p/>
        </draw:path>
        <draw:frame presentation:style-name="pr14" draw:layer="layout" svg:width="8.4cm" svg:height="5cm" svg:x="18.9cm" svg:y="9.6cm" presentation:class="outline" presentation:user-transformed="true">
          <draw:text-box>
            <text:list text:style-name="L4">
              <text:list-item>
                <text:p>Résultats <text:s/>physiquemnt réalistes</text:p>
              </text:list-item>
            </text:list>
          </draw:text-box>
        </draw:frame>
        <draw:frame presentation:style-name="pr15" draw:layer="layout" svg:width="25.2cm" svg:height="5cm" svg:x="1.4cm" svg:y="0.9cm" presentation:class="title" presentation:user-transformed="true">
          <draw:text-box>
            <text:p>Objectifs PIFOCast</text:p>
          </draw:text-box>
        </draw:frame>
        <anim:par presentation:node-type="timing-root">
          <anim:par smil:begin="id88.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5" presentation:class="page"/>
          <draw:frame presentation:style-name="pr16" draw:text-style-name="P2" draw:layer="layout" svg:width="17cm" svg:height="14cm" svg:x="2cm" svg:y="13cm" presentation:class="notes" presentation:placeholder="true">
            <draw:text-box/>
          </draw:frame>
        </presentation:notes>
      </draw:page>
      <draw:page draw:name="page6" draw:style-name="dp1" draw:master-page-name="White_2f_Blue_20_Chart" presentation:presentation-page-layout-name="AL3T1" xml:id="id89" draw:id="id89">
        <office:forms form:automatic-focus="false" form:apply-design-mode="false"/>
        <draw:frame presentation:style-name="pr17" draw:layer="layout" svg:width="10cm" svg:height="2cm" svg:x="0cm" svg:y="0.8cm" presentation:class="title" presentation:user-transformed="true">
          <draw:text-box>
            <text:p>Générer une prévision</text:p>
          </draw:text-box>
        </draw:frame>
        <draw:frame presentation:style-name="pr18" draw:layer="layout" svg:width="25.5cm" svg:height="2cm" svg:x="1.5cm" svg:y="4cm" presentation:class="outline" presentation:user-transformed="true">
          <draw:text-box>
            <text:list text:style-name="L4">
              <text:list-item>
                <text:p>Pour un état X, le modèle prédit un nouvel état :</text:p>
              </text:list-item>
            </text:list>
          </draw:text-box>
        </draw:frame>
        <draw:connector draw:style-name="gr8" draw:text-style-name="P1" draw:layer="layout" draw:type="lines" svg:x1="16.825cm" svg:y1="7.725cm" svg:x2="19.325cm" svg:y2="7.725cm" svg:d="M16825 7725h550 1400 550" svg:viewBox="0 0 2501 1">
          <text:p/>
        </draw:connector>
        <draw:frame draw:style-name="gr9" draw:text-style-name="P6" draw:layer="layout" svg:width="9.732cm" svg:height="1.497cm" svg:x="3.033cm" svg:y="6.5cm">
          <draw:object xlink:href="./Object 4" xlink:type="simple" xlink:show="embed" xlink:actuate="onLoad">
            <loext:p/>
          </draw:object>
          <draw:image xlink:href="./ObjectReplacements/Object 4" xlink:type="simple" xlink:show="embed" xlink:actuate="onLoad"/>
        </draw:frame>
        <draw:frame draw:style-name="gr10" draw:text-style-name="P6" draw:layer="layout" svg:width="30.184cm" svg:height="2.756cm" svg:x="3cm" svg:y="10.5cm">
          <draw:object xlink:href="./Object 5" xlink:type="simple" xlink:show="embed" xlink:actuate="onLoad">
            <loext:p/>
          </draw:object>
          <draw:image xlink:href="./ObjectReplacements/Object 5" xlink:type="simple" xlink:show="embed" xlink:actuate="onLoad"/>
        </draw:frame>
        <draw:frame presentation:style-name="pr18" draw:layer="layout" svg:width="25.5cm" svg:height="2cm" svg:x="1.5cm" svg:y="8.5cm" presentation:class="outline" presentation:user-transformed="true">
          <draw:text-box>
            <text:list text:style-name="L4">
              <text:list-item>
                <text:p>On itère pour créer une prévision complète : </text:p>
              </text:list-item>
            </text:list>
          </draw:text-box>
        </draw:frame>
        <anim:par presentation:node-type="timing-root">
          <anim:par smil:begin="id89.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6" presentation:class="page"/>
          <draw:frame presentation:style-name="pr13" draw:text-style-name="P7" draw:layer="layout" svg:width="17cm" svg:height="14cm" svg:x="2cm" svg:y="13cm" presentation:class="notes" presentation:placeholder="true">
            <draw:text-box/>
          </draw:frame>
        </presentation:notes>
      </draw:page>
      <draw:page draw:name="page7" draw:style-name="dp1" draw:master-page-name="White_2f_Blue_20_Chart" presentation:presentation-page-layout-name="AL3T1" xml:id="id90" draw:id="id90">
        <office:forms form:automatic-focus="false" form:apply-design-mode="false"/>
        <draw:custom-shape draw:style-name="gr11" draw:text-style-name="P9" draw:layer="layout" svg:width="5cm" svg:height="0.999cm" draw:transform="rotate (1.5707963267949) translate (2.408cm 11.732cm)">
          <text:p text:style-name="P8"><text:span text:style-name="T3">(rebouclage)</text:span></text:p>
          <draw:enhanced-geometry svg:viewBox="0 0 21600 21600" draw:type="rectangle" draw:enhanced-path="M 0 0 L 21600 0 21600 21600 0 21600 0 0 Z N"/>
        </draw:custom-shape>
        <draw:frame presentation:style-name="pr11" draw:layer="layout" svg:width="9.8cm" svg:height="2cm" svg:x="0cm" svg:y="0.8cm" presentation:class="title" presentation:user-transformed="true">
          <draw:text-box>
            <text:p>Architecture</text:p>
          </draw:text-box>
        </draw:frame>
        <draw:custom-shape draw:style-name="gr12" draw:text-style-name="P6" xml:id="id1" draw:id="id1" draw:layer="layout" svg:width="0.777cm" svg:height="0.749cm" svg:x="3.668cm" svg:y="3.7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2" draw:id="id2" draw:layer="layout" svg:width="0.777cm" svg:height="0.749cm" svg:x="3.668cm" svg:y="5.2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5.613cm" svg:y="3.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3" draw:id="id3" draw:layer="layout" svg:width="0.777cm" svg:height="0.749cm" svg:x="5.613cm" svg:y="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3.668cm" svg:y="6.7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5.612cm" svg:y="6.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7.557cm" svg:y="3.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7.557cm" svg:y="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7.557cm" svg:y="6.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3" draw:text-style-name="P5" draw:layer="layout" svg:x1="4.057cm" svg:y1="4.464cm" svg:x2="4.057cm" svg:y2="5.215cm" draw:start-shape="id1" draw:start-glue-point="8" draw:end-shape="id2" draw:end-glue-point="4" svg:d="M4057 4464v751" svg:viewBox="0 0 1 752">
          <text:p/>
        </draw:connector>
        <draw:connector draw:style-name="gr13" draw:text-style-name="P5" draw:layer="layout" draw:type="line" svg:x1="4.057cm" svg:y1="4.464cm" svg:x2="4.057cm" svg:y2="5.215cm" draw:start-shape="id1" draw:start-glue-point="8" draw:end-shape="id2" draw:end-glue-point="4" svg:d="M4057 4464v751" svg:viewBox="0 0 1 752">
          <text:p/>
        </draw:connector>
        <draw:connector draw:style-name="gr13" draw:text-style-name="P5" draw:layer="layout" svg:x1="6.001cm" svg:y1="4.464cm" svg:x2="6.001cm" svg:y2="5.215cm" svg:d="M6001 4464v751" svg:viewBox="0 0 1 752">
          <text:p/>
        </draw:connector>
        <draw:connector draw:style-name="gr13" draw:text-style-name="P5" draw:layer="layout" draw:type="line" svg:x1="6.001cm" svg:y1="4.464cm" svg:x2="6.001cm" svg:y2="5.215cm" svg:d="M6001 4464v751" svg:viewBox="0 0 1 752">
          <text:p/>
        </draw:connector>
        <draw:connector draw:style-name="gr13" draw:text-style-name="P5" draw:layer="layout" svg:x1="7.946cm" svg:y1="4.464cm" svg:x2="7.946cm" svg:y2="5.215cm" svg:d="M7946 4464v751" svg:viewBox="0 0 1 752">
          <text:p/>
        </draw:connector>
        <draw:connector draw:style-name="gr13" draw:text-style-name="P5" draw:layer="layout" draw:type="line" svg:x1="7.946cm" svg:y1="4.464cm" svg:x2="7.946cm" svg:y2="5.215cm" svg:d="M7946 4464v751" svg:viewBox="0 0 1 752">
          <text:p/>
        </draw:connector>
        <draw:connector draw:style-name="gr14" draw:text-style-name="P5" draw:layer="layout" svg:x1="4.056cm" svg:y1="5.964cm" svg:x2="4.056cm" svg:y2="6.715cm" svg:d="M4056 5964v751" svg:viewBox="0 0 1 752">
          <text:p/>
        </draw:connector>
        <draw:connector draw:style-name="gr14" draw:text-style-name="P5" draw:layer="layout" draw:type="line" svg:x1="4.056cm" svg:y1="5.964cm" svg:x2="4.056cm" svg:y2="6.715cm" svg:d="M4056 5964v751" svg:viewBox="0 0 1 752">
          <text:p/>
        </draw:connector>
        <draw:connector draw:style-name="gr14" draw:text-style-name="P5" draw:layer="layout" svg:x1="4.056cm" svg:y1="5.965cm" svg:x2="4.056cm" svg:y2="6.715cm" svg:d="M4056 5965v750" svg:viewBox="0 0 1 751">
          <text:p/>
        </draw:connector>
        <draw:connector draw:style-name="gr14" draw:text-style-name="P5" draw:layer="layout" draw:type="line" svg:x1="6.001cm" svg:y1="7.464cm" svg:x2="6.001cm" svg:y2="8.215cm" svg:d="M6001 7464v751" svg:viewBox="0 0 1 752">
          <text:p/>
        </draw:connector>
        <draw:connector draw:style-name="gr14" draw:text-style-name="P5" draw:layer="layout" svg:x1="6.001cm" svg:y1="5.964cm" svg:x2="6.001cm" svg:y2="6.715cm" svg:d="M6001 5964v751" svg:viewBox="0 0 1 752">
          <text:p/>
        </draw:connector>
        <draw:connector draw:style-name="gr14" draw:text-style-name="P5" draw:layer="layout" draw:type="line" svg:x1="6.001cm" svg:y1="5.964cm" svg:x2="6.001cm" svg:y2="6.715cm" svg:d="M6001 5964v751" svg:viewBox="0 0 1 752">
          <text:p/>
        </draw:connector>
        <draw:connector draw:style-name="gr14" draw:text-style-name="P5" draw:layer="layout" svg:x1="6.001cm" svg:y1="5.965cm" svg:x2="6.001cm" svg:y2="6.715cm" svg:d="M6001 5965v750" svg:viewBox="0 0 1 751">
          <text:p/>
        </draw:connector>
        <draw:connector draw:style-name="gr14" draw:text-style-name="P5" draw:layer="layout" draw:type="line" svg:x1="6.001cm" svg:y1="5.965cm" svg:x2="6.001cm" svg:y2="6.715cm" svg:d="M6001 5965v750" svg:viewBox="0 0 1 751">
          <text:p/>
        </draw:connector>
        <draw:connector draw:style-name="gr14" draw:text-style-name="P5" draw:layer="layout" svg:x1="7.946cm" svg:y1="5.964cm" svg:x2="7.946cm" svg:y2="6.715cm" svg:d="M7946 5964v751" svg:viewBox="0 0 1 752">
          <text:p/>
        </draw:connector>
        <draw:connector draw:style-name="gr14" draw:text-style-name="P5" draw:layer="layout" draw:type="line" svg:x1="7.946cm" svg:y1="5.964cm" svg:x2="7.946cm" svg:y2="6.715cm" svg:d="M7946 5964v751" svg:viewBox="0 0 1 752">
          <text:p/>
        </draw:connector>
        <draw:connector draw:style-name="gr14" draw:text-style-name="P5" draw:layer="layout" svg:x1="7.946cm" svg:y1="5.965cm" svg:x2="7.946cm" svg:y2="6.715cm" svg:d="M7946 5965v750" svg:viewBox="0 0 1 751">
          <text:p/>
        </draw:connector>
        <draw:connector draw:style-name="gr14" draw:text-style-name="P5" draw:layer="layout" draw:type="line" svg:x1="7.946cm" svg:y1="5.965cm" svg:x2="7.946cm" svg:y2="6.715cm" svg:d="M7946 5965v750" svg:viewBox="0 0 1 751">
          <text:p/>
        </draw:connector>
        <draw:connector draw:style-name="gr14" draw:text-style-name="P5" draw:layer="layout" draw:type="line" svg:x1="4.445cm" svg:y1="5.59cm" svg:x2="5.613cm" svg:y2="5.589cm" draw:start-shape="id2" draw:start-glue-point="10" draw:end-shape="id3" draw:end-glue-point="6" svg:d="M4445 5590l1168-1" svg:viewBox="0 0 1169 2">
          <text:p/>
        </draw:connector>
        <draw:connector draw:style-name="gr14" draw:text-style-name="P5" draw:layer="layout" draw:type="line" svg:x1="4.445cm" svg:y1="5.59cm" svg:x2="5.613cm" svg:y2="5.589cm" draw:start-shape="id2" draw:start-glue-point="10" draw:end-shape="id3" draw:end-glue-point="6" svg:d="M4445 5590l1168-1" svg:viewBox="0 0 1169 2">
          <text:p/>
        </draw:connector>
        <draw:connector draw:style-name="gr14" draw:text-style-name="P5" draw:layer="layout" draw:type="line" svg:x1="6.39cm" svg:y1="5.59cm" svg:x2="7.557cm" svg:y2="5.589cm" svg:d="M6390 5590l1167-1" svg:viewBox="0 0 1168 2">
          <text:p/>
        </draw:connector>
        <draw:connector draw:style-name="gr14" draw:text-style-name="P5" draw:layer="layout" draw:type="line" svg:x1="6.39cm" svg:y1="5.59cm" svg:x2="7.557cm" svg:y2="5.589cm" svg:d="M6390 5590l1167-1" svg:viewBox="0 0 1168 2">
          <text:p/>
        </draw:connector>
        <draw:connector draw:style-name="gr14" draw:text-style-name="P5" draw:layer="layout" draw:type="line" svg:x1="4.445cm" svg:y1="7.09cm" svg:x2="5.613cm" svg:y2="7.089cm" svg:d="M4445 7090l1168-1" svg:viewBox="0 0 1169 2">
          <text:p/>
        </draw:connector>
        <draw:connector draw:style-name="gr14" draw:text-style-name="P5" draw:layer="layout" draw:type="line" svg:x1="4.445cm" svg:y1="7.09cm" svg:x2="5.613cm" svg:y2="7.089cm" svg:d="M4445 7090l1168-1" svg:viewBox="0 0 1169 2">
          <text:p/>
        </draw:connector>
        <draw:connector draw:style-name="gr14" draw:text-style-name="P5" draw:layer="layout" draw:type="line" svg:x1="6.39cm" svg:y1="7.089cm" svg:x2="7.557cm" svg:y2="7.088cm" svg:d="M6390 7089l1167-1" svg:viewBox="0 0 1168 2">
          <text:p/>
        </draw:connector>
        <draw:connector draw:style-name="gr14" draw:text-style-name="P5" draw:layer="layout" draw:type="line" svg:x1="6.39cm" svg:y1="7.089cm" svg:x2="7.557cm" svg:y2="7.088cm" svg:d="M6390 7089l1167-1" svg:viewBox="0 0 1168 2">
          <text:p/>
        </draw:connector>
        <draw:connector draw:style-name="gr14" draw:text-style-name="P5" draw:layer="layout" draw:type="line" svg:x1="4.056cm" svg:y1="7.464cm" svg:x2="4.056cm" svg:y2="8.215cm" svg:d="M4056 7464v751" svg:viewBox="0 0 1 752">
          <text:p/>
        </draw:connector>
        <draw:connector draw:style-name="gr14" draw:text-style-name="P5" draw:layer="layout" draw:type="line" svg:x1="4.056cm" svg:y1="7.465cm" svg:x2="4.056cm" svg:y2="8.215cm" svg:d="M4056 7465v750" svg:viewBox="0 0 1 751">
          <text:p/>
        </draw:connector>
        <draw:connector draw:style-name="gr14" draw:text-style-name="P5" draw:layer="layout" draw:type="line" svg:x1="7.946cm" svg:y1="7.464cm" svg:x2="7.946cm" svg:y2="8.215cm" svg:d="M7946 7464v751" svg:viewBox="0 0 1 752">
          <text:p/>
        </draw:connector>
        <draw:connector draw:style-name="gr14" draw:text-style-name="P5" draw:layer="layout" draw:type="line" svg:x1="8.334cm" svg:y1="7.09cm" svg:x2="9.502cm" svg:y2="7.089cm" svg:d="M8334 7090l1168-1" svg:viewBox="0 0 1169 2">
          <text:p/>
        </draw:connector>
        <draw:connector draw:style-name="gr14" draw:text-style-name="P5" draw:layer="layout" draw:type="line" svg:x1="8.334cm" svg:y1="7.09cm" svg:x2="9.502cm" svg:y2="7.089cm" svg:d="M8334 7090l1168-1" svg:viewBox="0 0 1169 2">
          <text:p/>
        </draw:connector>
        <draw:connector draw:style-name="gr14" draw:text-style-name="P5" draw:layer="layout" draw:type="line" svg:x1="8.334cm" svg:y1="5.59cm" svg:x2="9.501cm" svg:y2="5.589cm" svg:d="M8334 5590l1167-1" svg:viewBox="0 0 1168 2">
          <text:p/>
        </draw:connector>
        <draw:connector draw:style-name="gr14" draw:text-style-name="P5" draw:layer="layout" draw:type="line" svg:x1="8.334cm" svg:y1="5.59cm" svg:x2="9.501cm" svg:y2="5.589cm" svg:d="M8334 5590l1167-1" svg:viewBox="0 0 1168 2">
          <text:p/>
        </draw:connector>
        <draw:connector draw:style-name="gr14" draw:text-style-name="P5" draw:layer="layout" draw:type="line" svg:x1="2.5cm" svg:y1="5.59cm" svg:x2="3.668cm" svg:y2="5.589cm" svg:d="M2500 5590l1168-1" svg:viewBox="0 0 1169 2">
          <text:p/>
        </draw:connector>
        <draw:connector draw:style-name="gr14" draw:text-style-name="P5" draw:layer="layout" draw:type="line" svg:x1="2.5cm" svg:y1="5.59cm" svg:x2="3.668cm" svg:y2="5.589cm" svg:d="M2500 5590l1168-1" svg:viewBox="0 0 1169 2">
          <text:p/>
        </draw:connector>
        <draw:connector draw:style-name="gr14" draw:text-style-name="P5" draw:layer="layout" draw:type="line" svg:x1="2.5cm" svg:y1="7.09cm" svg:x2="3.668cm" svg:y2="7.089cm" svg:d="M2500 7090l1168-1" svg:viewBox="0 0 1169 2">
          <text:p/>
        </draw:connector>
        <draw:connector draw:style-name="gr14" draw:text-style-name="P5" draw:layer="layout" draw:type="line" svg:x1="2.5cm" svg:y1="7.09cm" svg:x2="3.668cm" svg:y2="7.089cm" svg:d="M2500 7090l1168-1" svg:viewBox="0 0 1169 2">
          <text:p/>
        </draw:connector>
        <draw:custom-shape draw:style-name="gr12" draw:text-style-name="P6" xml:id="id4" draw:id="id4" draw:layer="layout" svg:width="0.777cm" svg:height="0.749cm" svg:x="3.668cm" svg:y="3.7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5" draw:id="id5" draw:layer="layout" svg:width="0.777cm" svg:height="0.749cm" svg:x="3.668cm" svg:y="5.2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5.613cm" svg:y="3.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6" draw:id="id6" draw:layer="layout" svg:width="0.777cm" svg:height="0.749cm" svg:x="5.613cm" svg:y="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3.668cm" svg:y="6.7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5.612cm" svg:y="6.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7.557cm" svg:y="3.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7.557cm" svg:y="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7.557cm" svg:y="6.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3" draw:text-style-name="P5" draw:layer="layout" svg:x1="4.057cm" svg:y1="4.464cm" svg:x2="4.057cm" svg:y2="5.215cm" draw:start-shape="id4" draw:start-glue-point="8" draw:end-shape="id5" draw:end-glue-point="4" svg:d="M4057 4464v751" svg:viewBox="0 0 1 752">
          <text:p/>
        </draw:connector>
        <draw:connector draw:style-name="gr13" draw:text-style-name="P5" draw:layer="layout" draw:type="line" svg:x1="4.057cm" svg:y1="4.464cm" svg:x2="4.057cm" svg:y2="5.215cm" draw:start-shape="id4" draw:start-glue-point="8" draw:end-shape="id5" draw:end-glue-point="4" svg:d="M4057 4464v751" svg:viewBox="0 0 1 752">
          <text:p/>
        </draw:connector>
        <draw:connector draw:style-name="gr13" draw:text-style-name="P5" draw:layer="layout" svg:x1="6.001cm" svg:y1="4.464cm" svg:x2="6.001cm" svg:y2="5.215cm" svg:d="M6001 4464v751" svg:viewBox="0 0 1 752">
          <text:p/>
        </draw:connector>
        <draw:connector draw:style-name="gr13" draw:text-style-name="P5" draw:layer="layout" draw:type="line" svg:x1="6.001cm" svg:y1="4.464cm" svg:x2="6.001cm" svg:y2="5.215cm" svg:d="M6001 4464v751" svg:viewBox="0 0 1 752">
          <text:p/>
        </draw:connector>
        <draw:connector draw:style-name="gr13" draw:text-style-name="P5" draw:layer="layout" svg:x1="7.946cm" svg:y1="4.464cm" svg:x2="7.946cm" svg:y2="5.215cm" svg:d="M7946 4464v751" svg:viewBox="0 0 1 752">
          <text:p/>
        </draw:connector>
        <draw:connector draw:style-name="gr13" draw:text-style-name="P5" draw:layer="layout" draw:type="line" svg:x1="7.946cm" svg:y1="4.464cm" svg:x2="7.946cm" svg:y2="5.215cm" svg:d="M7946 4464v751" svg:viewBox="0 0 1 752">
          <text:p/>
        </draw:connector>
        <draw:connector draw:style-name="gr14" draw:text-style-name="P5" draw:layer="layout" svg:x1="4.056cm" svg:y1="5.964cm" svg:x2="4.056cm" svg:y2="6.715cm" svg:d="M4056 5964v751" svg:viewBox="0 0 1 752">
          <text:p/>
        </draw:connector>
        <draw:connector draw:style-name="gr14" draw:text-style-name="P5" draw:layer="layout" draw:type="line" svg:x1="4.056cm" svg:y1="5.964cm" svg:x2="4.056cm" svg:y2="6.715cm" svg:d="M4056 5964v751" svg:viewBox="0 0 1 752">
          <text:p/>
        </draw:connector>
        <draw:connector draw:style-name="gr14" draw:text-style-name="P5" draw:layer="layout" svg:x1="4.056cm" svg:y1="5.965cm" svg:x2="4.056cm" svg:y2="6.715cm" svg:d="M4056 5965v750" svg:viewBox="0 0 1 751">
          <text:p/>
        </draw:connector>
        <draw:connector draw:style-name="gr14" draw:text-style-name="P5" draw:layer="layout" draw:type="line" svg:x1="6.001cm" svg:y1="7.464cm" svg:x2="6.001cm" svg:y2="8.215cm" svg:d="M6001 7464v751" svg:viewBox="0 0 1 752">
          <text:p/>
        </draw:connector>
        <draw:connector draw:style-name="gr14" draw:text-style-name="P5" draw:layer="layout" svg:x1="6.001cm" svg:y1="5.964cm" svg:x2="6.001cm" svg:y2="6.715cm" svg:d="M6001 5964v751" svg:viewBox="0 0 1 752">
          <text:p/>
        </draw:connector>
        <draw:connector draw:style-name="gr14" draw:text-style-name="P5" draw:layer="layout" draw:type="line" svg:x1="6.001cm" svg:y1="5.964cm" svg:x2="6.001cm" svg:y2="6.715cm" svg:d="M6001 5964v751" svg:viewBox="0 0 1 752">
          <text:p/>
        </draw:connector>
        <draw:connector draw:style-name="gr14" draw:text-style-name="P5" draw:layer="layout" svg:x1="6.001cm" svg:y1="5.965cm" svg:x2="6.001cm" svg:y2="6.715cm" svg:d="M6001 5965v750" svg:viewBox="0 0 1 751">
          <text:p/>
        </draw:connector>
        <draw:connector draw:style-name="gr14" draw:text-style-name="P5" draw:layer="layout" draw:type="line" svg:x1="6.001cm" svg:y1="5.965cm" svg:x2="6.001cm" svg:y2="6.715cm" svg:d="M6001 5965v750" svg:viewBox="0 0 1 751">
          <text:p/>
        </draw:connector>
        <draw:connector draw:style-name="gr14" draw:text-style-name="P5" draw:layer="layout" svg:x1="7.946cm" svg:y1="5.964cm" svg:x2="7.946cm" svg:y2="6.715cm" svg:d="M7946 5964v751" svg:viewBox="0 0 1 752">
          <text:p/>
        </draw:connector>
        <draw:connector draw:style-name="gr14" draw:text-style-name="P5" draw:layer="layout" draw:type="line" svg:x1="7.946cm" svg:y1="5.964cm" svg:x2="7.946cm" svg:y2="6.715cm" svg:d="M7946 5964v751" svg:viewBox="0 0 1 752">
          <text:p/>
        </draw:connector>
        <draw:connector draw:style-name="gr14" draw:text-style-name="P5" draw:layer="layout" svg:x1="7.946cm" svg:y1="5.965cm" svg:x2="7.946cm" svg:y2="6.715cm" svg:d="M7946 5965v750" svg:viewBox="0 0 1 751">
          <text:p/>
        </draw:connector>
        <draw:connector draw:style-name="gr14" draw:text-style-name="P5" draw:layer="layout" draw:type="line" svg:x1="7.946cm" svg:y1="5.965cm" svg:x2="7.946cm" svg:y2="6.715cm" svg:d="M7946 5965v750" svg:viewBox="0 0 1 751">
          <text:p/>
        </draw:connector>
        <draw:connector draw:style-name="gr14" draw:text-style-name="P5" draw:layer="layout" draw:type="line" svg:x1="4.445cm" svg:y1="5.59cm" svg:x2="5.613cm" svg:y2="5.589cm" draw:start-shape="id5" draw:start-glue-point="10" draw:end-shape="id6" draw:end-glue-point="6" svg:d="M4445 5590l1168-1" svg:viewBox="0 0 1169 2">
          <text:p/>
        </draw:connector>
        <draw:connector draw:style-name="gr14" draw:text-style-name="P5" draw:layer="layout" draw:type="line" svg:x1="4.445cm" svg:y1="5.59cm" svg:x2="5.613cm" svg:y2="5.589cm" draw:start-shape="id5" draw:start-glue-point="10" draw:end-shape="id6" draw:end-glue-point="6" svg:d="M4445 5590l1168-1" svg:viewBox="0 0 1169 2">
          <text:p/>
        </draw:connector>
        <draw:connector draw:style-name="gr14" draw:text-style-name="P5" draw:layer="layout" draw:type="line" svg:x1="6.39cm" svg:y1="5.59cm" svg:x2="7.557cm" svg:y2="5.589cm" svg:d="M6390 5590l1167-1" svg:viewBox="0 0 1168 2">
          <text:p/>
        </draw:connector>
        <draw:connector draw:style-name="gr14" draw:text-style-name="P5" draw:layer="layout" draw:type="line" svg:x1="6.39cm" svg:y1="5.59cm" svg:x2="7.557cm" svg:y2="5.589cm" svg:d="M6390 5590l1167-1" svg:viewBox="0 0 1168 2">
          <text:p/>
        </draw:connector>
        <draw:connector draw:style-name="gr14" draw:text-style-name="P5" draw:layer="layout" draw:type="line" svg:x1="4.445cm" svg:y1="7.09cm" svg:x2="5.613cm" svg:y2="7.089cm" svg:d="M4445 7090l1168-1" svg:viewBox="0 0 1169 2">
          <text:p/>
        </draw:connector>
        <draw:connector draw:style-name="gr14" draw:text-style-name="P5" draw:layer="layout" draw:type="line" svg:x1="4.445cm" svg:y1="7.09cm" svg:x2="5.613cm" svg:y2="7.089cm" svg:d="M4445 7090l1168-1" svg:viewBox="0 0 1169 2">
          <text:p/>
        </draw:connector>
        <draw:connector draw:style-name="gr14" draw:text-style-name="P5" draw:layer="layout" draw:type="line" svg:x1="6.39cm" svg:y1="7.089cm" svg:x2="7.557cm" svg:y2="7.088cm" svg:d="M6390 7089l1167-1" svg:viewBox="0 0 1168 2">
          <text:p/>
        </draw:connector>
        <draw:connector draw:style-name="gr14" draw:text-style-name="P5" draw:layer="layout" draw:type="line" svg:x1="6.39cm" svg:y1="7.089cm" svg:x2="7.557cm" svg:y2="7.088cm" svg:d="M6390 7089l1167-1" svg:viewBox="0 0 1168 2">
          <text:p/>
        </draw:connector>
        <draw:connector draw:style-name="gr14" draw:text-style-name="P5" draw:layer="layout" draw:type="line" svg:x1="4.056cm" svg:y1="7.464cm" svg:x2="4.056cm" svg:y2="8.215cm" svg:d="M4056 7464v751" svg:viewBox="0 0 1 752">
          <text:p/>
        </draw:connector>
        <draw:connector draw:style-name="gr14" draw:text-style-name="P5" draw:layer="layout" draw:type="line" svg:x1="4.056cm" svg:y1="7.465cm" svg:x2="4.056cm" svg:y2="8.215cm" svg:d="M4056 7465v750" svg:viewBox="0 0 1 751">
          <text:p/>
        </draw:connector>
        <draw:connector draw:style-name="gr14" draw:text-style-name="P5" draw:layer="layout" draw:type="line" svg:x1="7.946cm" svg:y1="7.464cm" svg:x2="7.946cm" svg:y2="8.215cm" svg:d="M7946 7464v751" svg:viewBox="0 0 1 752">
          <text:p/>
        </draw:connector>
        <draw:connector draw:style-name="gr14" draw:text-style-name="P5" draw:layer="layout" draw:type="line" svg:x1="8.334cm" svg:y1="7.09cm" svg:x2="9.502cm" svg:y2="7.089cm" svg:d="M8334 7090l1168-1" svg:viewBox="0 0 1169 2">
          <text:p/>
        </draw:connector>
        <draw:connector draw:style-name="gr14" draw:text-style-name="P5" draw:layer="layout" draw:type="line" svg:x1="8.334cm" svg:y1="7.09cm" svg:x2="9.502cm" svg:y2="7.089cm" svg:d="M8334 7090l1168-1" svg:viewBox="0 0 1169 2">
          <text:p/>
        </draw:connector>
        <draw:connector draw:style-name="gr14" draw:text-style-name="P5" draw:layer="layout" draw:type="line" svg:x1="8.334cm" svg:y1="5.59cm" svg:x2="9.501cm" svg:y2="5.589cm" svg:d="M8334 5590l1167-1" svg:viewBox="0 0 1168 2">
          <text:p/>
        </draw:connector>
        <draw:connector draw:style-name="gr14" draw:text-style-name="P5" draw:layer="layout" draw:type="line" svg:x1="8.334cm" svg:y1="5.59cm" svg:x2="9.501cm" svg:y2="5.589cm" svg:d="M8334 5590l1167-1" svg:viewBox="0 0 1168 2">
          <text:p/>
        </draw:connector>
        <draw:connector draw:style-name="gr14" draw:text-style-name="P5" draw:layer="layout" draw:type="line" svg:x1="2.5cm" svg:y1="5.59cm" svg:x2="3.668cm" svg:y2="5.589cm" svg:d="M2500 5590l1168-1" svg:viewBox="0 0 1169 2">
          <text:p/>
        </draw:connector>
        <draw:connector draw:style-name="gr14" draw:text-style-name="P5" draw:layer="layout" draw:type="line" svg:x1="2.5cm" svg:y1="5.59cm" svg:x2="3.668cm" svg:y2="5.589cm" svg:d="M2500 5590l1168-1" svg:viewBox="0 0 1169 2">
          <text:p/>
        </draw:connector>
        <draw:connector draw:style-name="gr14" draw:text-style-name="P5" draw:layer="layout" draw:type="line" svg:x1="2.5cm" svg:y1="7.09cm" svg:x2="3.668cm" svg:y2="7.089cm" svg:d="M2500 7090l1168-1" svg:viewBox="0 0 1169 2">
          <text:p/>
        </draw:connector>
        <draw:connector draw:style-name="gr14" draw:text-style-name="P5" draw:layer="layout" draw:type="line" svg:x1="2.5cm" svg:y1="7.09cm" svg:x2="3.668cm" svg:y2="7.089cm" svg:d="M2500 7090l1168-1" svg:viewBox="0 0 1169 2">
          <text:p/>
        </draw:connector>
        <draw:custom-shape draw:style-name="gr12" draw:text-style-name="P6" xml:id="id7" draw:id="id7" draw:layer="layout" svg:width="0.777cm" svg:height="0.749cm" svg:x="3.668cm" svg:y="3.7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8" draw:id="id8" draw:layer="layout" svg:width="0.777cm" svg:height="0.749cm" svg:x="3.668cm" svg:y="5.2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5.613cm" svg:y="3.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9" draw:id="id9" draw:layer="layout" svg:width="0.777cm" svg:height="0.749cm" svg:x="5.613cm" svg:y="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3.668cm" svg:y="6.7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5.612cm" svg:y="6.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7.557cm" svg:y="3.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7.557cm" svg:y="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7.557cm" svg:y="6.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3" draw:text-style-name="P5" draw:layer="layout" svg:x1="4.057cm" svg:y1="4.464cm" svg:x2="4.057cm" svg:y2="5.215cm" draw:start-shape="id7" draw:start-glue-point="8" draw:end-shape="id8" draw:end-glue-point="4" svg:d="M4057 4464v751" svg:viewBox="0 0 1 752">
          <text:p/>
        </draw:connector>
        <draw:connector draw:style-name="gr13" draw:text-style-name="P5" draw:layer="layout" draw:type="line" svg:x1="4.057cm" svg:y1="4.464cm" svg:x2="4.057cm" svg:y2="5.215cm" draw:start-shape="id7" draw:start-glue-point="8" draw:end-shape="id8" draw:end-glue-point="4" svg:d="M4057 4464v751" svg:viewBox="0 0 1 752">
          <text:p/>
        </draw:connector>
        <draw:connector draw:style-name="gr13" draw:text-style-name="P5" draw:layer="layout" svg:x1="6.001cm" svg:y1="4.464cm" svg:x2="6.001cm" svg:y2="5.215cm" svg:d="M6001 4464v751" svg:viewBox="0 0 1 752">
          <text:p/>
        </draw:connector>
        <draw:connector draw:style-name="gr13" draw:text-style-name="P5" draw:layer="layout" draw:type="line" svg:x1="6.001cm" svg:y1="4.464cm" svg:x2="6.001cm" svg:y2="5.215cm" svg:d="M6001 4464v751" svg:viewBox="0 0 1 752">
          <text:p/>
        </draw:connector>
        <draw:connector draw:style-name="gr13" draw:text-style-name="P5" draw:layer="layout" svg:x1="7.946cm" svg:y1="4.464cm" svg:x2="7.946cm" svg:y2="5.215cm" svg:d="M7946 4464v751" svg:viewBox="0 0 1 752">
          <text:p/>
        </draw:connector>
        <draw:connector draw:style-name="gr13" draw:text-style-name="P5" draw:layer="layout" draw:type="line" svg:x1="7.946cm" svg:y1="4.464cm" svg:x2="7.946cm" svg:y2="5.215cm" svg:d="M7946 4464v751" svg:viewBox="0 0 1 752">
          <text:p/>
        </draw:connector>
        <draw:connector draw:style-name="gr14" draw:text-style-name="P5" draw:layer="layout" svg:x1="4.056cm" svg:y1="5.964cm" svg:x2="4.056cm" svg:y2="6.715cm" svg:d="M4056 5964v751" svg:viewBox="0 0 1 752">
          <text:p/>
        </draw:connector>
        <draw:connector draw:style-name="gr14" draw:text-style-name="P5" draw:layer="layout" draw:type="line" svg:x1="4.056cm" svg:y1="5.964cm" svg:x2="4.056cm" svg:y2="6.715cm" svg:d="M4056 5964v751" svg:viewBox="0 0 1 752">
          <text:p/>
        </draw:connector>
        <draw:connector draw:style-name="gr14" draw:text-style-name="P5" draw:layer="layout" svg:x1="4.056cm" svg:y1="5.965cm" svg:x2="4.056cm" svg:y2="6.715cm" svg:d="M4056 5965v750" svg:viewBox="0 0 1 751">
          <text:p/>
        </draw:connector>
        <draw:connector draw:style-name="gr14" draw:text-style-name="P5" draw:layer="layout" draw:type="line" svg:x1="6.001cm" svg:y1="7.464cm" svg:x2="6.001cm" svg:y2="8.215cm" svg:d="M6001 7464v751" svg:viewBox="0 0 1 752">
          <text:p/>
        </draw:connector>
        <draw:connector draw:style-name="gr14" draw:text-style-name="P5" draw:layer="layout" svg:x1="6.001cm" svg:y1="5.964cm" svg:x2="6.001cm" svg:y2="6.715cm" svg:d="M6001 5964v751" svg:viewBox="0 0 1 752">
          <text:p/>
        </draw:connector>
        <draw:connector draw:style-name="gr14" draw:text-style-name="P5" draw:layer="layout" draw:type="line" svg:x1="6.001cm" svg:y1="5.964cm" svg:x2="6.001cm" svg:y2="6.715cm" svg:d="M6001 5964v751" svg:viewBox="0 0 1 752">
          <text:p/>
        </draw:connector>
        <draw:connector draw:style-name="gr14" draw:text-style-name="P5" draw:layer="layout" svg:x1="6.001cm" svg:y1="5.965cm" svg:x2="6.001cm" svg:y2="6.715cm" svg:d="M6001 5965v750" svg:viewBox="0 0 1 751">
          <text:p/>
        </draw:connector>
        <draw:connector draw:style-name="gr14" draw:text-style-name="P5" draw:layer="layout" draw:type="line" svg:x1="6.001cm" svg:y1="5.965cm" svg:x2="6.001cm" svg:y2="6.715cm" svg:d="M6001 5965v750" svg:viewBox="0 0 1 751">
          <text:p/>
        </draw:connector>
        <draw:connector draw:style-name="gr14" draw:text-style-name="P5" draw:layer="layout" svg:x1="7.946cm" svg:y1="5.964cm" svg:x2="7.946cm" svg:y2="6.715cm" svg:d="M7946 5964v751" svg:viewBox="0 0 1 752">
          <text:p/>
        </draw:connector>
        <draw:connector draw:style-name="gr14" draw:text-style-name="P5" draw:layer="layout" draw:type="line" svg:x1="7.946cm" svg:y1="5.964cm" svg:x2="7.946cm" svg:y2="6.715cm" svg:d="M7946 5964v751" svg:viewBox="0 0 1 752">
          <text:p/>
        </draw:connector>
        <draw:connector draw:style-name="gr14" draw:text-style-name="P5" draw:layer="layout" svg:x1="7.946cm" svg:y1="5.965cm" svg:x2="7.946cm" svg:y2="6.715cm" svg:d="M7946 5965v750" svg:viewBox="0 0 1 751">
          <text:p/>
        </draw:connector>
        <draw:connector draw:style-name="gr14" draw:text-style-name="P5" draw:layer="layout" draw:type="line" svg:x1="7.946cm" svg:y1="5.965cm" svg:x2="7.946cm" svg:y2="6.715cm" svg:d="M7946 5965v750" svg:viewBox="0 0 1 751">
          <text:p/>
        </draw:connector>
        <draw:connector draw:style-name="gr14" draw:text-style-name="P5" draw:layer="layout" draw:type="line" svg:x1="4.445cm" svg:y1="5.59cm" svg:x2="5.613cm" svg:y2="5.589cm" draw:start-shape="id8" draw:start-glue-point="10" draw:end-shape="id9" draw:end-glue-point="6" svg:d="M4445 5590l1168-1" svg:viewBox="0 0 1169 2">
          <text:p/>
        </draw:connector>
        <draw:connector draw:style-name="gr14" draw:text-style-name="P5" draw:layer="layout" draw:type="line" svg:x1="4.445cm" svg:y1="5.59cm" svg:x2="5.613cm" svg:y2="5.589cm" draw:start-shape="id8" draw:start-glue-point="10" draw:end-shape="id9" draw:end-glue-point="6" svg:d="M4445 5590l1168-1" svg:viewBox="0 0 1169 2">
          <text:p/>
        </draw:connector>
        <draw:connector draw:style-name="gr14" draw:text-style-name="P5" draw:layer="layout" draw:type="line" svg:x1="6.39cm" svg:y1="5.59cm" svg:x2="7.557cm" svg:y2="5.589cm" svg:d="M6390 5590l1167-1" svg:viewBox="0 0 1168 2">
          <text:p/>
        </draw:connector>
        <draw:connector draw:style-name="gr14" draw:text-style-name="P5" draw:layer="layout" draw:type="line" svg:x1="6.39cm" svg:y1="5.59cm" svg:x2="7.557cm" svg:y2="5.589cm" svg:d="M6390 5590l1167-1" svg:viewBox="0 0 1168 2">
          <text:p/>
        </draw:connector>
        <draw:connector draw:style-name="gr14" draw:text-style-name="P5" draw:layer="layout" draw:type="line" svg:x1="4.445cm" svg:y1="7.09cm" svg:x2="5.613cm" svg:y2="7.089cm" svg:d="M4445 7090l1168-1" svg:viewBox="0 0 1169 2">
          <text:p/>
        </draw:connector>
        <draw:connector draw:style-name="gr14" draw:text-style-name="P5" draw:layer="layout" draw:type="line" svg:x1="4.445cm" svg:y1="7.09cm" svg:x2="5.613cm" svg:y2="7.089cm" svg:d="M4445 7090l1168-1" svg:viewBox="0 0 1169 2">
          <text:p/>
        </draw:connector>
        <draw:connector draw:style-name="gr14" draw:text-style-name="P5" draw:layer="layout" draw:type="line" svg:x1="6.39cm" svg:y1="7.089cm" svg:x2="7.557cm" svg:y2="7.088cm" svg:d="M6390 7089l1167-1" svg:viewBox="0 0 1168 2">
          <text:p/>
        </draw:connector>
        <draw:connector draw:style-name="gr14" draw:text-style-name="P5" draw:layer="layout" draw:type="line" svg:x1="6.39cm" svg:y1="7.089cm" svg:x2="7.557cm" svg:y2="7.088cm" svg:d="M6390 7089l1167-1" svg:viewBox="0 0 1168 2">
          <text:p/>
        </draw:connector>
        <draw:connector draw:style-name="gr14" draw:text-style-name="P5" draw:layer="layout" draw:type="line" svg:x1="4.056cm" svg:y1="7.464cm" svg:x2="4.056cm" svg:y2="8.215cm" svg:d="M4056 7464v751" svg:viewBox="0 0 1 752">
          <text:p/>
        </draw:connector>
        <draw:connector draw:style-name="gr14" draw:text-style-name="P5" draw:layer="layout" draw:type="line" svg:x1="4.056cm" svg:y1="7.465cm" svg:x2="4.056cm" svg:y2="8.215cm" svg:d="M4056 7465v750" svg:viewBox="0 0 1 751">
          <text:p/>
        </draw:connector>
        <draw:connector draw:style-name="gr14" draw:text-style-name="P5" draw:layer="layout" draw:type="line" svg:x1="7.946cm" svg:y1="7.464cm" svg:x2="7.946cm" svg:y2="8.215cm" svg:d="M7946 7464v751" svg:viewBox="0 0 1 752">
          <text:p/>
        </draw:connector>
        <draw:connector draw:style-name="gr14" draw:text-style-name="P5" draw:layer="layout" draw:type="line" svg:x1="8.334cm" svg:y1="7.09cm" svg:x2="9.502cm" svg:y2="7.089cm" svg:d="M8334 7090l1168-1" svg:viewBox="0 0 1169 2">
          <text:p/>
        </draw:connector>
        <draw:connector draw:style-name="gr14" draw:text-style-name="P5" draw:layer="layout" draw:type="line" svg:x1="8.334cm" svg:y1="7.09cm" svg:x2="9.502cm" svg:y2="7.089cm" svg:d="M8334 7090l1168-1" svg:viewBox="0 0 1169 2">
          <text:p/>
        </draw:connector>
        <draw:connector draw:style-name="gr14" draw:text-style-name="P5" draw:layer="layout" draw:type="line" svg:x1="8.334cm" svg:y1="5.59cm" svg:x2="9.501cm" svg:y2="5.589cm" svg:d="M8334 5590l1167-1" svg:viewBox="0 0 1168 2">
          <text:p/>
        </draw:connector>
        <draw:connector draw:style-name="gr14" draw:text-style-name="P5" draw:layer="layout" draw:type="line" svg:x1="8.334cm" svg:y1="5.59cm" svg:x2="9.501cm" svg:y2="5.589cm" svg:d="M8334 5590l1167-1" svg:viewBox="0 0 1168 2">
          <text:p/>
        </draw:connector>
        <draw:connector draw:style-name="gr14" draw:text-style-name="P5" draw:layer="layout" draw:type="line" svg:x1="2.5cm" svg:y1="5.59cm" svg:x2="3.668cm" svg:y2="5.589cm" svg:d="M2500 5590l1168-1" svg:viewBox="0 0 1169 2">
          <text:p/>
        </draw:connector>
        <draw:connector draw:style-name="gr14" draw:text-style-name="P5" draw:layer="layout" draw:type="line" svg:x1="2.5cm" svg:y1="5.59cm" svg:x2="3.668cm" svg:y2="5.589cm" svg:d="M2500 5590l1168-1" svg:viewBox="0 0 1169 2">
          <text:p/>
        </draw:connector>
        <draw:connector draw:style-name="gr14" draw:text-style-name="P5" draw:layer="layout" draw:type="line" svg:x1="2.5cm" svg:y1="7.09cm" svg:x2="3.668cm" svg:y2="7.089cm" svg:d="M2500 7090l1168-1" svg:viewBox="0 0 1169 2">
          <text:p/>
        </draw:connector>
        <draw:connector draw:style-name="gr14" draw:text-style-name="P5" draw:layer="layout" draw:type="line" svg:x1="2.5cm" svg:y1="7.09cm" svg:x2="3.668cm" svg:y2="7.089cm" svg:d="M2500 7090l1168-1" svg:viewBox="0 0 1169 2">
          <text:p/>
        </draw:connector>
        <draw:custom-shape draw:style-name="gr12" draw:text-style-name="P6" xml:id="id10" draw:id="id10" draw:layer="layout" svg:width="0.777cm" svg:height="0.749cm" svg:x="3.668cm" svg:y="3.7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11" draw:id="id11" draw:layer="layout" svg:width="0.777cm" svg:height="0.749cm" svg:x="3.668cm" svg:y="5.2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5.613cm" svg:y="3.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12" draw:id="id12" draw:layer="layout" svg:width="0.777cm" svg:height="0.749cm" svg:x="5.613cm" svg:y="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3.668cm" svg:y="6.7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5.612cm" svg:y="6.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7.557cm" svg:y="3.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7.557cm" svg:y="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7.557cm" svg:y="6.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3" draw:text-style-name="P5" draw:layer="layout" svg:x1="4.057cm" svg:y1="4.464cm" svg:x2="4.057cm" svg:y2="5.215cm" draw:start-shape="id10" draw:start-glue-point="8" draw:end-shape="id11" draw:end-glue-point="4" svg:d="M4057 4464v751" svg:viewBox="0 0 1 752">
          <text:p/>
        </draw:connector>
        <draw:connector draw:style-name="gr13" draw:text-style-name="P5" draw:layer="layout" draw:type="line" svg:x1="4.057cm" svg:y1="4.464cm" svg:x2="4.057cm" svg:y2="5.215cm" draw:start-shape="id10" draw:start-glue-point="8" draw:end-shape="id11" draw:end-glue-point="4" svg:d="M4057 4464v751" svg:viewBox="0 0 1 752">
          <text:p/>
        </draw:connector>
        <draw:connector draw:style-name="gr13" draw:text-style-name="P5" draw:layer="layout" svg:x1="6.001cm" svg:y1="4.464cm" svg:x2="6.001cm" svg:y2="5.215cm" svg:d="M6001 4464v751" svg:viewBox="0 0 1 752">
          <text:p/>
        </draw:connector>
        <draw:connector draw:style-name="gr13" draw:text-style-name="P5" draw:layer="layout" draw:type="line" svg:x1="6.001cm" svg:y1="4.464cm" svg:x2="6.001cm" svg:y2="5.215cm" svg:d="M6001 4464v751" svg:viewBox="0 0 1 752">
          <text:p/>
        </draw:connector>
        <draw:connector draw:style-name="gr13" draw:text-style-name="P5" draw:layer="layout" svg:x1="7.946cm" svg:y1="4.464cm" svg:x2="7.946cm" svg:y2="5.215cm" svg:d="M7946 4464v751" svg:viewBox="0 0 1 752">
          <text:p/>
        </draw:connector>
        <draw:connector draw:style-name="gr13" draw:text-style-name="P5" draw:layer="layout" draw:type="line" svg:x1="7.946cm" svg:y1="4.464cm" svg:x2="7.946cm" svg:y2="5.215cm" svg:d="M7946 4464v751" svg:viewBox="0 0 1 752">
          <text:p/>
        </draw:connector>
        <draw:connector draw:style-name="gr14" draw:text-style-name="P5" draw:layer="layout" svg:x1="4.056cm" svg:y1="5.964cm" svg:x2="4.056cm" svg:y2="6.715cm" svg:d="M4056 5964v751" svg:viewBox="0 0 1 752">
          <text:p/>
        </draw:connector>
        <draw:connector draw:style-name="gr14" draw:text-style-name="P5" draw:layer="layout" draw:type="line" svg:x1="4.056cm" svg:y1="5.964cm" svg:x2="4.056cm" svg:y2="6.715cm" svg:d="M4056 5964v751" svg:viewBox="0 0 1 752">
          <text:p/>
        </draw:connector>
        <draw:connector draw:style-name="gr14" draw:text-style-name="P5" draw:layer="layout" svg:x1="4.056cm" svg:y1="5.965cm" svg:x2="4.056cm" svg:y2="6.715cm" svg:d="M4056 5965v750" svg:viewBox="0 0 1 751">
          <text:p/>
        </draw:connector>
        <draw:connector draw:style-name="gr14" draw:text-style-name="P5" draw:layer="layout" draw:type="line" svg:x1="6.001cm" svg:y1="7.464cm" svg:x2="6.001cm" svg:y2="8.215cm" svg:d="M6001 7464v751" svg:viewBox="0 0 1 752">
          <text:p/>
        </draw:connector>
        <draw:connector draw:style-name="gr14" draw:text-style-name="P5" draw:layer="layout" svg:x1="6.001cm" svg:y1="5.964cm" svg:x2="6.001cm" svg:y2="6.715cm" svg:d="M6001 5964v751" svg:viewBox="0 0 1 752">
          <text:p/>
        </draw:connector>
        <draw:connector draw:style-name="gr14" draw:text-style-name="P5" draw:layer="layout" draw:type="line" svg:x1="6.001cm" svg:y1="5.964cm" svg:x2="6.001cm" svg:y2="6.715cm" svg:d="M6001 5964v751" svg:viewBox="0 0 1 752">
          <text:p/>
        </draw:connector>
        <draw:connector draw:style-name="gr14" draw:text-style-name="P5" draw:layer="layout" svg:x1="6.001cm" svg:y1="5.965cm" svg:x2="6.001cm" svg:y2="6.715cm" svg:d="M6001 5965v750" svg:viewBox="0 0 1 751">
          <text:p/>
        </draw:connector>
        <draw:connector draw:style-name="gr14" draw:text-style-name="P5" draw:layer="layout" draw:type="line" svg:x1="6.001cm" svg:y1="5.965cm" svg:x2="6.001cm" svg:y2="6.715cm" svg:d="M6001 5965v750" svg:viewBox="0 0 1 751">
          <text:p/>
        </draw:connector>
        <draw:connector draw:style-name="gr14" draw:text-style-name="P5" draw:layer="layout" svg:x1="7.946cm" svg:y1="5.964cm" svg:x2="7.946cm" svg:y2="6.715cm" svg:d="M7946 5964v751" svg:viewBox="0 0 1 752">
          <text:p/>
        </draw:connector>
        <draw:connector draw:style-name="gr14" draw:text-style-name="P5" draw:layer="layout" draw:type="line" svg:x1="7.946cm" svg:y1="5.964cm" svg:x2="7.946cm" svg:y2="6.715cm" svg:d="M7946 5964v751" svg:viewBox="0 0 1 752">
          <text:p/>
        </draw:connector>
        <draw:connector draw:style-name="gr14" draw:text-style-name="P5" draw:layer="layout" svg:x1="7.946cm" svg:y1="5.965cm" svg:x2="7.946cm" svg:y2="6.715cm" svg:d="M7946 5965v750" svg:viewBox="0 0 1 751">
          <text:p/>
        </draw:connector>
        <draw:connector draw:style-name="gr14" draw:text-style-name="P5" draw:layer="layout" draw:type="line" svg:x1="7.946cm" svg:y1="5.965cm" svg:x2="7.946cm" svg:y2="6.715cm" svg:d="M7946 5965v750" svg:viewBox="0 0 1 751">
          <text:p/>
        </draw:connector>
        <draw:connector draw:style-name="gr14" draw:text-style-name="P5" draw:layer="layout" draw:type="line" svg:x1="4.445cm" svg:y1="5.59cm" svg:x2="5.613cm" svg:y2="5.589cm" draw:start-shape="id11" draw:start-glue-point="10" draw:end-shape="id12" draw:end-glue-point="6" svg:d="M4445 5590l1168-1" svg:viewBox="0 0 1169 2">
          <text:p/>
        </draw:connector>
        <draw:connector draw:style-name="gr14" draw:text-style-name="P5" draw:layer="layout" draw:type="line" svg:x1="4.445cm" svg:y1="5.59cm" svg:x2="5.613cm" svg:y2="5.589cm" draw:start-shape="id11" draw:start-glue-point="10" draw:end-shape="id12" draw:end-glue-point="6" svg:d="M4445 5590l1168-1" svg:viewBox="0 0 1169 2">
          <text:p/>
        </draw:connector>
        <draw:connector draw:style-name="gr14" draw:text-style-name="P5" draw:layer="layout" draw:type="line" svg:x1="6.39cm" svg:y1="5.59cm" svg:x2="7.557cm" svg:y2="5.589cm" svg:d="M6390 5590l1167-1" svg:viewBox="0 0 1168 2">
          <text:p/>
        </draw:connector>
        <draw:connector draw:style-name="gr14" draw:text-style-name="P5" draw:layer="layout" draw:type="line" svg:x1="6.39cm" svg:y1="5.59cm" svg:x2="7.557cm" svg:y2="5.589cm" svg:d="M6390 5590l1167-1" svg:viewBox="0 0 1168 2">
          <text:p/>
        </draw:connector>
        <draw:connector draw:style-name="gr14" draw:text-style-name="P5" draw:layer="layout" draw:type="line" svg:x1="4.445cm" svg:y1="7.09cm" svg:x2="5.613cm" svg:y2="7.089cm" svg:d="M4445 7090l1168-1" svg:viewBox="0 0 1169 2">
          <text:p/>
        </draw:connector>
        <draw:connector draw:style-name="gr14" draw:text-style-name="P5" draw:layer="layout" draw:type="line" svg:x1="4.445cm" svg:y1="7.09cm" svg:x2="5.613cm" svg:y2="7.089cm" svg:d="M4445 7090l1168-1" svg:viewBox="0 0 1169 2">
          <text:p/>
        </draw:connector>
        <draw:connector draw:style-name="gr14" draw:text-style-name="P5" draw:layer="layout" draw:type="line" svg:x1="6.39cm" svg:y1="7.089cm" svg:x2="7.557cm" svg:y2="7.088cm" svg:d="M6390 7089l1167-1" svg:viewBox="0 0 1168 2">
          <text:p/>
        </draw:connector>
        <draw:connector draw:style-name="gr14" draw:text-style-name="P5" draw:layer="layout" draw:type="line" svg:x1="6.39cm" svg:y1="7.089cm" svg:x2="7.557cm" svg:y2="7.088cm" svg:d="M6390 7089l1167-1" svg:viewBox="0 0 1168 2">
          <text:p/>
        </draw:connector>
        <draw:connector draw:style-name="gr14" draw:text-style-name="P5" draw:layer="layout" draw:type="line" svg:x1="4.056cm" svg:y1="7.464cm" svg:x2="4.056cm" svg:y2="8.215cm" svg:d="M4056 7464v751" svg:viewBox="0 0 1 752">
          <text:p/>
        </draw:connector>
        <draw:connector draw:style-name="gr14" draw:text-style-name="P5" draw:layer="layout" draw:type="line" svg:x1="4.056cm" svg:y1="7.465cm" svg:x2="4.056cm" svg:y2="8.215cm" svg:d="M4056 7465v750" svg:viewBox="0 0 1 751">
          <text:p/>
        </draw:connector>
        <draw:connector draw:style-name="gr14" draw:text-style-name="P5" draw:layer="layout" draw:type="line" svg:x1="7.946cm" svg:y1="7.464cm" svg:x2="7.946cm" svg:y2="8.215cm" svg:d="M7946 7464v751" svg:viewBox="0 0 1 752">
          <text:p/>
        </draw:connector>
        <draw:connector draw:style-name="gr14" draw:text-style-name="P5" draw:layer="layout" draw:type="line" svg:x1="8.334cm" svg:y1="7.09cm" svg:x2="9.502cm" svg:y2="7.089cm" svg:d="M8334 7090l1168-1" svg:viewBox="0 0 1169 2">
          <text:p/>
        </draw:connector>
        <draw:connector draw:style-name="gr14" draw:text-style-name="P5" draw:layer="layout" draw:type="line" svg:x1="8.334cm" svg:y1="7.09cm" svg:x2="9.502cm" svg:y2="7.089cm" svg:d="M8334 7090l1168-1" svg:viewBox="0 0 1169 2">
          <text:p/>
        </draw:connector>
        <draw:connector draw:style-name="gr14" draw:text-style-name="P5" draw:layer="layout" draw:type="line" svg:x1="8.334cm" svg:y1="5.59cm" svg:x2="9.501cm" svg:y2="5.589cm" svg:d="M8334 5590l1167-1" svg:viewBox="0 0 1168 2">
          <text:p/>
        </draw:connector>
        <draw:connector draw:style-name="gr14" draw:text-style-name="P5" draw:layer="layout" draw:type="line" svg:x1="8.334cm" svg:y1="5.59cm" svg:x2="9.501cm" svg:y2="5.589cm" svg:d="M8334 5590l1167-1" svg:viewBox="0 0 1168 2">
          <text:p/>
        </draw:connector>
        <draw:connector draw:style-name="gr14" draw:text-style-name="P5" draw:layer="layout" draw:type="line" svg:x1="2.5cm" svg:y1="5.59cm" svg:x2="3.668cm" svg:y2="5.589cm" svg:d="M2500 5590l1168-1" svg:viewBox="0 0 1169 2">
          <text:p/>
        </draw:connector>
        <draw:connector draw:style-name="gr14" draw:text-style-name="P5" draw:layer="layout" draw:type="line" svg:x1="2.5cm" svg:y1="5.59cm" svg:x2="3.668cm" svg:y2="5.589cm" svg:d="M2500 5590l1168-1" svg:viewBox="0 0 1169 2">
          <text:p/>
        </draw:connector>
        <draw:connector draw:style-name="gr14" draw:text-style-name="P5" draw:layer="layout" draw:type="line" svg:x1="2.5cm" svg:y1="7.09cm" svg:x2="3.668cm" svg:y2="7.089cm" svg:d="M2500 7090l1168-1" svg:viewBox="0 0 1169 2">
          <text:p/>
        </draw:connector>
        <draw:connector draw:style-name="gr14" draw:text-style-name="P5" draw:layer="layout" draw:type="line" svg:x1="2.5cm" svg:y1="7.09cm" svg:x2="3.668cm" svg:y2="7.089cm" svg:d="M2500 7090l1168-1" svg:viewBox="0 0 1169 2">
          <text:p/>
        </draw:connector>
        <draw:custom-shape draw:style-name="gr12" draw:text-style-name="P6" xml:id="id13" draw:id="id13" draw:layer="layout" svg:width="0.777cm" svg:height="0.749cm" svg:x="3.668cm" svg:y="3.7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14" draw:id="id14" draw:layer="layout" svg:width="0.777cm" svg:height="0.749cm" svg:x="3.668cm" svg:y="5.2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5.613cm" svg:y="3.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15" draw:id="id15" draw:layer="layout" svg:width="0.777cm" svg:height="0.749cm" svg:x="5.613cm" svg:y="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3.668cm" svg:y="6.7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5.612cm" svg:y="6.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7.557cm" svg:y="3.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7.557cm" svg:y="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7.557cm" svg:y="6.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3" draw:text-style-name="P5" draw:layer="layout" svg:x1="4.057cm" svg:y1="4.464cm" svg:x2="4.057cm" svg:y2="5.215cm" draw:start-shape="id13" draw:start-glue-point="8" draw:end-shape="id14" draw:end-glue-point="4" svg:d="M4057 4464v751" svg:viewBox="0 0 1 752">
          <text:p/>
        </draw:connector>
        <draw:connector draw:style-name="gr13" draw:text-style-name="P5" draw:layer="layout" draw:type="line" svg:x1="4.057cm" svg:y1="4.464cm" svg:x2="4.057cm" svg:y2="5.215cm" draw:start-shape="id13" draw:start-glue-point="8" draw:end-shape="id14" draw:end-glue-point="4" svg:d="M4057 4464v751" svg:viewBox="0 0 1 752">
          <text:p/>
        </draw:connector>
        <draw:connector draw:style-name="gr13" draw:text-style-name="P5" draw:layer="layout" svg:x1="6.001cm" svg:y1="4.464cm" svg:x2="6.001cm" svg:y2="5.215cm" svg:d="M6001 4464v751" svg:viewBox="0 0 1 752">
          <text:p/>
        </draw:connector>
        <draw:connector draw:style-name="gr13" draw:text-style-name="P5" draw:layer="layout" draw:type="line" svg:x1="6.001cm" svg:y1="4.464cm" svg:x2="6.001cm" svg:y2="5.215cm" svg:d="M6001 4464v751" svg:viewBox="0 0 1 752">
          <text:p/>
        </draw:connector>
        <draw:connector draw:style-name="gr13" draw:text-style-name="P5" draw:layer="layout" svg:x1="7.946cm" svg:y1="4.464cm" svg:x2="7.946cm" svg:y2="5.215cm" svg:d="M7946 4464v751" svg:viewBox="0 0 1 752">
          <text:p/>
        </draw:connector>
        <draw:connector draw:style-name="gr13" draw:text-style-name="P5" draw:layer="layout" draw:type="line" svg:x1="7.946cm" svg:y1="4.464cm" svg:x2="7.946cm" svg:y2="5.215cm" svg:d="M7946 4464v751" svg:viewBox="0 0 1 752">
          <text:p/>
        </draw:connector>
        <draw:connector draw:style-name="gr14" draw:text-style-name="P5" draw:layer="layout" svg:x1="4.056cm" svg:y1="5.964cm" svg:x2="4.056cm" svg:y2="6.715cm" svg:d="M4056 5964v751" svg:viewBox="0 0 1 752">
          <text:p/>
        </draw:connector>
        <draw:connector draw:style-name="gr14" draw:text-style-name="P5" draw:layer="layout" draw:type="line" svg:x1="4.056cm" svg:y1="5.964cm" svg:x2="4.056cm" svg:y2="6.715cm" svg:d="M4056 5964v751" svg:viewBox="0 0 1 752">
          <text:p/>
        </draw:connector>
        <draw:connector draw:style-name="gr14" draw:text-style-name="P5" draw:layer="layout" svg:x1="4.056cm" svg:y1="5.965cm" svg:x2="4.056cm" svg:y2="6.715cm" svg:d="M4056 5965v750" svg:viewBox="0 0 1 751">
          <text:p/>
        </draw:connector>
        <draw:connector draw:style-name="gr14" draw:text-style-name="P5" draw:layer="layout" draw:type="line" svg:x1="6.001cm" svg:y1="7.464cm" svg:x2="6.001cm" svg:y2="8.215cm" svg:d="M6001 7464v751" svg:viewBox="0 0 1 752">
          <text:p/>
        </draw:connector>
        <draw:connector draw:style-name="gr14" draw:text-style-name="P5" draw:layer="layout" svg:x1="6.001cm" svg:y1="5.964cm" svg:x2="6.001cm" svg:y2="6.715cm" svg:d="M6001 5964v751" svg:viewBox="0 0 1 752">
          <text:p/>
        </draw:connector>
        <draw:connector draw:style-name="gr14" draw:text-style-name="P5" draw:layer="layout" draw:type="line" svg:x1="6.001cm" svg:y1="5.964cm" svg:x2="6.001cm" svg:y2="6.715cm" svg:d="M6001 5964v751" svg:viewBox="0 0 1 752">
          <text:p/>
        </draw:connector>
        <draw:connector draw:style-name="gr14" draw:text-style-name="P5" draw:layer="layout" svg:x1="6.001cm" svg:y1="5.965cm" svg:x2="6.001cm" svg:y2="6.715cm" svg:d="M6001 5965v750" svg:viewBox="0 0 1 751">
          <text:p/>
        </draw:connector>
        <draw:connector draw:style-name="gr14" draw:text-style-name="P5" draw:layer="layout" draw:type="line" svg:x1="6.001cm" svg:y1="5.965cm" svg:x2="6.001cm" svg:y2="6.715cm" svg:d="M6001 5965v750" svg:viewBox="0 0 1 751">
          <text:p/>
        </draw:connector>
        <draw:connector draw:style-name="gr14" draw:text-style-name="P5" draw:layer="layout" svg:x1="7.946cm" svg:y1="5.964cm" svg:x2="7.946cm" svg:y2="6.715cm" svg:d="M7946 5964v751" svg:viewBox="0 0 1 752">
          <text:p/>
        </draw:connector>
        <draw:connector draw:style-name="gr14" draw:text-style-name="P5" draw:layer="layout" draw:type="line" svg:x1="7.946cm" svg:y1="5.964cm" svg:x2="7.946cm" svg:y2="6.715cm" svg:d="M7946 5964v751" svg:viewBox="0 0 1 752">
          <text:p/>
        </draw:connector>
        <draw:connector draw:style-name="gr14" draw:text-style-name="P5" draw:layer="layout" svg:x1="7.946cm" svg:y1="5.965cm" svg:x2="7.946cm" svg:y2="6.715cm" svg:d="M7946 5965v750" svg:viewBox="0 0 1 751">
          <text:p/>
        </draw:connector>
        <draw:connector draw:style-name="gr14" draw:text-style-name="P5" draw:layer="layout" draw:type="line" svg:x1="7.946cm" svg:y1="5.965cm" svg:x2="7.946cm" svg:y2="6.715cm" svg:d="M7946 5965v750" svg:viewBox="0 0 1 751">
          <text:p/>
        </draw:connector>
        <draw:connector draw:style-name="gr14" draw:text-style-name="P5" draw:layer="layout" draw:type="line" svg:x1="4.445cm" svg:y1="5.59cm" svg:x2="5.613cm" svg:y2="5.589cm" draw:start-shape="id14" draw:start-glue-point="10" draw:end-shape="id15" draw:end-glue-point="6" svg:d="M4445 5590l1168-1" svg:viewBox="0 0 1169 2">
          <text:p/>
        </draw:connector>
        <draw:connector draw:style-name="gr14" draw:text-style-name="P5" draw:layer="layout" draw:type="line" svg:x1="4.445cm" svg:y1="5.59cm" svg:x2="5.613cm" svg:y2="5.589cm" draw:start-shape="id14" draw:start-glue-point="10" draw:end-shape="id15" draw:end-glue-point="6" svg:d="M4445 5590l1168-1" svg:viewBox="0 0 1169 2">
          <text:p/>
        </draw:connector>
        <draw:connector draw:style-name="gr14" draw:text-style-name="P5" draw:layer="layout" draw:type="line" svg:x1="6.39cm" svg:y1="5.59cm" svg:x2="7.557cm" svg:y2="5.589cm" svg:d="M6390 5590l1167-1" svg:viewBox="0 0 1168 2">
          <text:p/>
        </draw:connector>
        <draw:connector draw:style-name="gr14" draw:text-style-name="P5" draw:layer="layout" draw:type="line" svg:x1="6.39cm" svg:y1="5.59cm" svg:x2="7.557cm" svg:y2="5.589cm" svg:d="M6390 5590l1167-1" svg:viewBox="0 0 1168 2">
          <text:p/>
        </draw:connector>
        <draw:connector draw:style-name="gr14" draw:text-style-name="P5" draw:layer="layout" draw:type="line" svg:x1="4.445cm" svg:y1="7.09cm" svg:x2="5.613cm" svg:y2="7.089cm" svg:d="M4445 7090l1168-1" svg:viewBox="0 0 1169 2">
          <text:p/>
        </draw:connector>
        <draw:connector draw:style-name="gr14" draw:text-style-name="P5" draw:layer="layout" draw:type="line" svg:x1="4.445cm" svg:y1="7.09cm" svg:x2="5.613cm" svg:y2="7.089cm" svg:d="M4445 7090l1168-1" svg:viewBox="0 0 1169 2">
          <text:p/>
        </draw:connector>
        <draw:connector draw:style-name="gr14" draw:text-style-name="P5" draw:layer="layout" draw:type="line" svg:x1="6.39cm" svg:y1="7.089cm" svg:x2="7.557cm" svg:y2="7.088cm" svg:d="M6390 7089l1167-1" svg:viewBox="0 0 1168 2">
          <text:p/>
        </draw:connector>
        <draw:connector draw:style-name="gr14" draw:text-style-name="P5" draw:layer="layout" draw:type="line" svg:x1="6.39cm" svg:y1="7.089cm" svg:x2="7.557cm" svg:y2="7.088cm" svg:d="M6390 7089l1167-1" svg:viewBox="0 0 1168 2">
          <text:p/>
        </draw:connector>
        <draw:connector draw:style-name="gr14" draw:text-style-name="P5" draw:layer="layout" draw:type="line" svg:x1="4.056cm" svg:y1="7.464cm" svg:x2="4.056cm" svg:y2="8.215cm" svg:d="M4056 7464v751" svg:viewBox="0 0 1 752">
          <text:p/>
        </draw:connector>
        <draw:connector draw:style-name="gr14" draw:text-style-name="P5" draw:layer="layout" draw:type="line" svg:x1="4.056cm" svg:y1="7.465cm" svg:x2="4.056cm" svg:y2="8.215cm" svg:d="M4056 7465v750" svg:viewBox="0 0 1 751">
          <text:p/>
        </draw:connector>
        <draw:connector draw:style-name="gr14" draw:text-style-name="P5" draw:layer="layout" draw:type="line" svg:x1="7.946cm" svg:y1="7.464cm" svg:x2="7.946cm" svg:y2="8.215cm" svg:d="M7946 7464v751" svg:viewBox="0 0 1 752">
          <text:p/>
        </draw:connector>
        <draw:connector draw:style-name="gr14" draw:text-style-name="P5" draw:layer="layout" draw:type="line" svg:x1="8.334cm" svg:y1="7.09cm" svg:x2="9.502cm" svg:y2="7.089cm" svg:d="M8334 7090l1168-1" svg:viewBox="0 0 1169 2">
          <text:p/>
        </draw:connector>
        <draw:connector draw:style-name="gr14" draw:text-style-name="P5" draw:layer="layout" draw:type="line" svg:x1="8.334cm" svg:y1="7.09cm" svg:x2="9.502cm" svg:y2="7.089cm" svg:d="M8334 7090l1168-1" svg:viewBox="0 0 1169 2">
          <text:p/>
        </draw:connector>
        <draw:connector draw:style-name="gr14" draw:text-style-name="P5" draw:layer="layout" draw:type="line" svg:x1="8.334cm" svg:y1="5.59cm" svg:x2="9.501cm" svg:y2="5.589cm" svg:d="M8334 5590l1167-1" svg:viewBox="0 0 1168 2">
          <text:p/>
        </draw:connector>
        <draw:connector draw:style-name="gr14" draw:text-style-name="P5" draw:layer="layout" draw:type="line" svg:x1="8.334cm" svg:y1="5.59cm" svg:x2="9.501cm" svg:y2="5.589cm" svg:d="M8334 5590l1167-1" svg:viewBox="0 0 1168 2">
          <text:p/>
        </draw:connector>
        <draw:connector draw:style-name="gr14" draw:text-style-name="P5" draw:layer="layout" draw:type="line" svg:x1="2.5cm" svg:y1="5.59cm" svg:x2="3.668cm" svg:y2="5.589cm" svg:d="M2500 5590l1168-1" svg:viewBox="0 0 1169 2">
          <text:p/>
        </draw:connector>
        <draw:connector draw:style-name="gr14" draw:text-style-name="P5" draw:layer="layout" draw:type="line" svg:x1="2.5cm" svg:y1="5.59cm" svg:x2="3.668cm" svg:y2="5.589cm" svg:d="M2500 5590l1168-1" svg:viewBox="0 0 1169 2">
          <text:p/>
        </draw:connector>
        <draw:connector draw:style-name="gr14" draw:text-style-name="P5" draw:layer="layout" draw:type="line" svg:x1="2.5cm" svg:y1="7.09cm" svg:x2="3.668cm" svg:y2="7.089cm" svg:d="M2500 7090l1168-1" svg:viewBox="0 0 1169 2">
          <text:p/>
        </draw:connector>
        <draw:connector draw:style-name="gr14" draw:text-style-name="P5" draw:layer="layout" draw:type="line" svg:x1="2.5cm" svg:y1="7.09cm" svg:x2="3.668cm" svg:y2="7.089cm" svg:d="M2500 7090l1168-1" svg:viewBox="0 0 1169 2">
          <text:p/>
        </draw:connector>
        <draw:custom-shape draw:style-name="gr12" draw:text-style-name="P6" xml:id="id16" draw:id="id16" draw:layer="layout" svg:width="0.777cm" svg:height="0.749cm" svg:x="3.668cm" svg:y="3.7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17" draw:id="id17" draw:layer="layout" svg:width="0.777cm" svg:height="0.749cm" svg:x="3.668cm" svg:y="5.2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5.613cm" svg:y="3.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18" draw:id="id18" draw:layer="layout" svg:width="0.777cm" svg:height="0.749cm" svg:x="5.613cm" svg:y="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3.668cm" svg:y="6.7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5.612cm" svg:y="6.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7.557cm" svg:y="3.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7.557cm" svg:y="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7.557cm" svg:y="6.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3" draw:text-style-name="P5" draw:layer="layout" svg:x1="4.057cm" svg:y1="4.464cm" svg:x2="4.057cm" svg:y2="5.215cm" draw:start-shape="id16" draw:start-glue-point="8" draw:end-shape="id17" draw:end-glue-point="4" svg:d="M4057 4464v751" svg:viewBox="0 0 1 752">
          <text:p/>
        </draw:connector>
        <draw:connector draw:style-name="gr13" draw:text-style-name="P5" draw:layer="layout" draw:type="line" svg:x1="4.057cm" svg:y1="4.464cm" svg:x2="4.057cm" svg:y2="5.215cm" draw:start-shape="id16" draw:start-glue-point="8" draw:end-shape="id17" draw:end-glue-point="4" svg:d="M4057 4464v751" svg:viewBox="0 0 1 752">
          <text:p/>
        </draw:connector>
        <draw:connector draw:style-name="gr13" draw:text-style-name="P5" draw:layer="layout" svg:x1="6.001cm" svg:y1="4.464cm" svg:x2="6.001cm" svg:y2="5.215cm" svg:d="M6001 4464v751" svg:viewBox="0 0 1 752">
          <text:p/>
        </draw:connector>
        <draw:connector draw:style-name="gr13" draw:text-style-name="P5" draw:layer="layout" draw:type="line" svg:x1="6.001cm" svg:y1="4.464cm" svg:x2="6.001cm" svg:y2="5.215cm" svg:d="M6001 4464v751" svg:viewBox="0 0 1 752">
          <text:p/>
        </draw:connector>
        <draw:connector draw:style-name="gr13" draw:text-style-name="P5" draw:layer="layout" svg:x1="7.946cm" svg:y1="4.464cm" svg:x2="7.946cm" svg:y2="5.215cm" svg:d="M7946 4464v751" svg:viewBox="0 0 1 752">
          <text:p/>
        </draw:connector>
        <draw:connector draw:style-name="gr13" draw:text-style-name="P5" draw:layer="layout" draw:type="line" svg:x1="7.946cm" svg:y1="4.464cm" svg:x2="7.946cm" svg:y2="5.215cm" svg:d="M7946 4464v751" svg:viewBox="0 0 1 752">
          <text:p/>
        </draw:connector>
        <draw:connector draw:style-name="gr14" draw:text-style-name="P5" draw:layer="layout" svg:x1="4.056cm" svg:y1="5.964cm" svg:x2="4.056cm" svg:y2="6.715cm" svg:d="M4056 5964v751" svg:viewBox="0 0 1 752">
          <text:p/>
        </draw:connector>
        <draw:connector draw:style-name="gr14" draw:text-style-name="P5" draw:layer="layout" draw:type="line" svg:x1="4.056cm" svg:y1="5.964cm" svg:x2="4.056cm" svg:y2="6.715cm" svg:d="M4056 5964v751" svg:viewBox="0 0 1 752">
          <text:p/>
        </draw:connector>
        <draw:connector draw:style-name="gr14" draw:text-style-name="P5" draw:layer="layout" svg:x1="4.056cm" svg:y1="5.965cm" svg:x2="4.056cm" svg:y2="6.715cm" svg:d="M4056 5965v750" svg:viewBox="0 0 1 751">
          <text:p/>
        </draw:connector>
        <draw:connector draw:style-name="gr14" draw:text-style-name="P5" draw:layer="layout" draw:type="line" svg:x1="6.001cm" svg:y1="7.464cm" svg:x2="6.001cm" svg:y2="8.215cm" svg:d="M6001 7464v751" svg:viewBox="0 0 1 752">
          <text:p/>
        </draw:connector>
        <draw:connector draw:style-name="gr14" draw:text-style-name="P5" draw:layer="layout" svg:x1="6.001cm" svg:y1="5.964cm" svg:x2="6.001cm" svg:y2="6.715cm" svg:d="M6001 5964v751" svg:viewBox="0 0 1 752">
          <text:p/>
        </draw:connector>
        <draw:connector draw:style-name="gr14" draw:text-style-name="P5" draw:layer="layout" draw:type="line" svg:x1="6.001cm" svg:y1="5.964cm" svg:x2="6.001cm" svg:y2="6.715cm" svg:d="M6001 5964v751" svg:viewBox="0 0 1 752">
          <text:p/>
        </draw:connector>
        <draw:connector draw:style-name="gr14" draw:text-style-name="P5" draw:layer="layout" svg:x1="6.001cm" svg:y1="5.965cm" svg:x2="6.001cm" svg:y2="6.715cm" svg:d="M6001 5965v750" svg:viewBox="0 0 1 751">
          <text:p/>
        </draw:connector>
        <draw:connector draw:style-name="gr14" draw:text-style-name="P5" draw:layer="layout" draw:type="line" svg:x1="6.001cm" svg:y1="5.965cm" svg:x2="6.001cm" svg:y2="6.715cm" svg:d="M6001 5965v750" svg:viewBox="0 0 1 751">
          <text:p/>
        </draw:connector>
        <draw:connector draw:style-name="gr14" draw:text-style-name="P5" draw:layer="layout" svg:x1="7.946cm" svg:y1="5.964cm" svg:x2="7.946cm" svg:y2="6.715cm" svg:d="M7946 5964v751" svg:viewBox="0 0 1 752">
          <text:p/>
        </draw:connector>
        <draw:connector draw:style-name="gr14" draw:text-style-name="P5" draw:layer="layout" draw:type="line" svg:x1="7.946cm" svg:y1="5.964cm" svg:x2="7.946cm" svg:y2="6.715cm" svg:d="M7946 5964v751" svg:viewBox="0 0 1 752">
          <text:p/>
        </draw:connector>
        <draw:connector draw:style-name="gr14" draw:text-style-name="P5" draw:layer="layout" svg:x1="7.946cm" svg:y1="5.965cm" svg:x2="7.946cm" svg:y2="6.715cm" svg:d="M7946 5965v750" svg:viewBox="0 0 1 751">
          <text:p/>
        </draw:connector>
        <draw:connector draw:style-name="gr14" draw:text-style-name="P5" draw:layer="layout" draw:type="line" svg:x1="7.946cm" svg:y1="5.965cm" svg:x2="7.946cm" svg:y2="6.715cm" svg:d="M7946 5965v750" svg:viewBox="0 0 1 751">
          <text:p/>
        </draw:connector>
        <draw:connector draw:style-name="gr14" draw:text-style-name="P5" draw:layer="layout" draw:type="line" svg:x1="4.445cm" svg:y1="5.59cm" svg:x2="5.613cm" svg:y2="5.589cm" draw:start-shape="id17" draw:start-glue-point="10" draw:end-shape="id18" draw:end-glue-point="6" svg:d="M4445 5590l1168-1" svg:viewBox="0 0 1169 2">
          <text:p/>
        </draw:connector>
        <draw:connector draw:style-name="gr14" draw:text-style-name="P5" draw:layer="layout" draw:type="line" svg:x1="4.445cm" svg:y1="5.59cm" svg:x2="5.613cm" svg:y2="5.589cm" draw:start-shape="id17" draw:start-glue-point="10" draw:end-shape="id18" draw:end-glue-point="6" svg:d="M4445 5590l1168-1" svg:viewBox="0 0 1169 2">
          <text:p/>
        </draw:connector>
        <draw:connector draw:style-name="gr14" draw:text-style-name="P5" draw:layer="layout" draw:type="line" svg:x1="6.39cm" svg:y1="5.59cm" svg:x2="7.557cm" svg:y2="5.589cm" svg:d="M6390 5590l1167-1" svg:viewBox="0 0 1168 2">
          <text:p/>
        </draw:connector>
        <draw:connector draw:style-name="gr14" draw:text-style-name="P5" draw:layer="layout" draw:type="line" svg:x1="6.39cm" svg:y1="5.59cm" svg:x2="7.557cm" svg:y2="5.589cm" svg:d="M6390 5590l1167-1" svg:viewBox="0 0 1168 2">
          <text:p/>
        </draw:connector>
        <draw:connector draw:style-name="gr14" draw:text-style-name="P5" draw:layer="layout" draw:type="line" svg:x1="4.445cm" svg:y1="7.09cm" svg:x2="5.613cm" svg:y2="7.089cm" svg:d="M4445 7090l1168-1" svg:viewBox="0 0 1169 2">
          <text:p/>
        </draw:connector>
        <draw:connector draw:style-name="gr14" draw:text-style-name="P5" draw:layer="layout" draw:type="line" svg:x1="4.445cm" svg:y1="7.09cm" svg:x2="5.613cm" svg:y2="7.089cm" svg:d="M4445 7090l1168-1" svg:viewBox="0 0 1169 2">
          <text:p/>
        </draw:connector>
        <draw:connector draw:style-name="gr14" draw:text-style-name="P5" draw:layer="layout" draw:type="line" svg:x1="6.39cm" svg:y1="7.089cm" svg:x2="7.557cm" svg:y2="7.088cm" svg:d="M6390 7089l1167-1" svg:viewBox="0 0 1168 2">
          <text:p/>
        </draw:connector>
        <draw:connector draw:style-name="gr14" draw:text-style-name="P5" draw:layer="layout" draw:type="line" svg:x1="6.39cm" svg:y1="7.089cm" svg:x2="7.557cm" svg:y2="7.088cm" svg:d="M6390 7089l1167-1" svg:viewBox="0 0 1168 2">
          <text:p/>
        </draw:connector>
        <draw:connector draw:style-name="gr14" draw:text-style-name="P5" draw:layer="layout" draw:type="line" svg:x1="4.056cm" svg:y1="7.464cm" svg:x2="4.056cm" svg:y2="8.215cm" svg:d="M4056 7464v751" svg:viewBox="0 0 1 752">
          <text:p/>
        </draw:connector>
        <draw:connector draw:style-name="gr14" draw:text-style-name="P5" draw:layer="layout" draw:type="line" svg:x1="4.056cm" svg:y1="7.465cm" svg:x2="4.056cm" svg:y2="8.215cm" svg:d="M4056 7465v750" svg:viewBox="0 0 1 751">
          <text:p/>
        </draw:connector>
        <draw:connector draw:style-name="gr14" draw:text-style-name="P5" draw:layer="layout" draw:type="line" svg:x1="7.946cm" svg:y1="7.464cm" svg:x2="7.946cm" svg:y2="8.215cm" svg:d="M7946 7464v751" svg:viewBox="0 0 1 752">
          <text:p/>
        </draw:connector>
        <draw:connector draw:style-name="gr14" draw:text-style-name="P5" draw:layer="layout" draw:type="line" svg:x1="8.334cm" svg:y1="7.09cm" svg:x2="9.502cm" svg:y2="7.089cm" svg:d="M8334 7090l1168-1" svg:viewBox="0 0 1169 2">
          <text:p/>
        </draw:connector>
        <draw:connector draw:style-name="gr14" draw:text-style-name="P5" draw:layer="layout" draw:type="line" svg:x1="8.334cm" svg:y1="7.09cm" svg:x2="9.502cm" svg:y2="7.089cm" svg:d="M8334 7090l1168-1" svg:viewBox="0 0 1169 2">
          <text:p/>
        </draw:connector>
        <draw:connector draw:style-name="gr14" draw:text-style-name="P5" draw:layer="layout" draw:type="line" svg:x1="8.334cm" svg:y1="5.59cm" svg:x2="9.501cm" svg:y2="5.589cm" svg:d="M8334 5590l1167-1" svg:viewBox="0 0 1168 2">
          <text:p/>
        </draw:connector>
        <draw:connector draw:style-name="gr14" draw:text-style-name="P5" draw:layer="layout" draw:type="line" svg:x1="8.334cm" svg:y1="5.59cm" svg:x2="9.501cm" svg:y2="5.589cm" svg:d="M8334 5590l1167-1" svg:viewBox="0 0 1168 2">
          <text:p/>
        </draw:connector>
        <draw:connector draw:style-name="gr14" draw:text-style-name="P5" draw:layer="layout" draw:type="line" svg:x1="2.5cm" svg:y1="5.59cm" svg:x2="3.668cm" svg:y2="5.589cm" svg:d="M2500 5590l1168-1" svg:viewBox="0 0 1169 2">
          <text:p/>
        </draw:connector>
        <draw:connector draw:style-name="gr14" draw:text-style-name="P5" draw:layer="layout" draw:type="line" svg:x1="2.5cm" svg:y1="5.59cm" svg:x2="3.668cm" svg:y2="5.589cm" svg:d="M2500 5590l1168-1" svg:viewBox="0 0 1169 2">
          <text:p/>
        </draw:connector>
        <draw:connector draw:style-name="gr14" draw:text-style-name="P5" draw:layer="layout" draw:type="line" svg:x1="2.5cm" svg:y1="7.09cm" svg:x2="3.668cm" svg:y2="7.089cm" svg:d="M2500 7090l1168-1" svg:viewBox="0 0 1169 2">
          <text:p/>
        </draw:connector>
        <draw:connector draw:style-name="gr14" draw:text-style-name="P5" draw:layer="layout" draw:type="line" svg:x1="2.5cm" svg:y1="7.09cm" svg:x2="3.668cm" svg:y2="7.089cm" svg:d="M2500 7090l1168-1" svg:viewBox="0 0 1169 2">
          <text:p/>
        </draw:connector>
        <draw:custom-shape draw:style-name="gr12" draw:text-style-name="P6" xml:id="id19" draw:id="id19" draw:layer="layout" svg:width="0.777cm" svg:height="0.749cm" svg:x="3.668cm" svg:y="3.7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20" draw:id="id20" draw:layer="layout" svg:width="0.777cm" svg:height="0.749cm" svg:x="3.668cm" svg:y="5.2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5.613cm" svg:y="3.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21" draw:id="id21" draw:layer="layout" svg:width="0.777cm" svg:height="0.749cm" svg:x="5.613cm" svg:y="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3.668cm" svg:y="6.7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5.612cm" svg:y="6.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7.557cm" svg:y="3.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7.557cm" svg:y="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7.557cm" svg:y="6.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3" draw:text-style-name="P5" draw:layer="layout" svg:x1="4.057cm" svg:y1="4.464cm" svg:x2="4.057cm" svg:y2="5.215cm" draw:start-shape="id19" draw:start-glue-point="8" draw:end-shape="id20" draw:end-glue-point="4" svg:d="M4057 4464v751" svg:viewBox="0 0 1 752">
          <text:p/>
        </draw:connector>
        <draw:connector draw:style-name="gr13" draw:text-style-name="P5" draw:layer="layout" draw:type="line" svg:x1="4.057cm" svg:y1="4.464cm" svg:x2="4.057cm" svg:y2="5.215cm" draw:start-shape="id19" draw:start-glue-point="8" draw:end-shape="id20" draw:end-glue-point="4" svg:d="M4057 4464v751" svg:viewBox="0 0 1 752">
          <text:p/>
        </draw:connector>
        <draw:connector draw:style-name="gr13" draw:text-style-name="P5" draw:layer="layout" svg:x1="6.001cm" svg:y1="4.464cm" svg:x2="6.001cm" svg:y2="5.215cm" svg:d="M6001 4464v751" svg:viewBox="0 0 1 752">
          <text:p/>
        </draw:connector>
        <draw:connector draw:style-name="gr13" draw:text-style-name="P5" draw:layer="layout" draw:type="line" svg:x1="6.001cm" svg:y1="4.464cm" svg:x2="6.001cm" svg:y2="5.215cm" svg:d="M6001 4464v751" svg:viewBox="0 0 1 752">
          <text:p/>
        </draw:connector>
        <draw:connector draw:style-name="gr13" draw:text-style-name="P5" draw:layer="layout" svg:x1="7.946cm" svg:y1="4.464cm" svg:x2="7.946cm" svg:y2="5.215cm" svg:d="M7946 4464v751" svg:viewBox="0 0 1 752">
          <text:p/>
        </draw:connector>
        <draw:connector draw:style-name="gr13" draw:text-style-name="P5" draw:layer="layout" draw:type="line" svg:x1="7.946cm" svg:y1="4.464cm" svg:x2="7.946cm" svg:y2="5.215cm" svg:d="M7946 4464v751" svg:viewBox="0 0 1 752">
          <text:p/>
        </draw:connector>
        <draw:connector draw:style-name="gr14" draw:text-style-name="P5" draw:layer="layout" svg:x1="4.056cm" svg:y1="5.964cm" svg:x2="4.056cm" svg:y2="6.715cm" svg:d="M4056 5964v751" svg:viewBox="0 0 1 752">
          <text:p/>
        </draw:connector>
        <draw:connector draw:style-name="gr14" draw:text-style-name="P5" draw:layer="layout" draw:type="line" svg:x1="4.056cm" svg:y1="5.964cm" svg:x2="4.056cm" svg:y2="6.715cm" svg:d="M4056 5964v751" svg:viewBox="0 0 1 752">
          <text:p/>
        </draw:connector>
        <draw:connector draw:style-name="gr14" draw:text-style-name="P5" draw:layer="layout" svg:x1="4.056cm" svg:y1="5.965cm" svg:x2="4.056cm" svg:y2="6.715cm" svg:d="M4056 5965v750" svg:viewBox="0 0 1 751">
          <text:p/>
        </draw:connector>
        <draw:connector draw:style-name="gr14" draw:text-style-name="P5" draw:layer="layout" draw:type="line" svg:x1="6.001cm" svg:y1="7.464cm" svg:x2="6.001cm" svg:y2="8.215cm" svg:d="M6001 7464v751" svg:viewBox="0 0 1 752">
          <text:p/>
        </draw:connector>
        <draw:connector draw:style-name="gr14" draw:text-style-name="P5" draw:layer="layout" svg:x1="6.001cm" svg:y1="5.964cm" svg:x2="6.001cm" svg:y2="6.715cm" svg:d="M6001 5964v751" svg:viewBox="0 0 1 752">
          <text:p/>
        </draw:connector>
        <draw:connector draw:style-name="gr14" draw:text-style-name="P5" draw:layer="layout" draw:type="line" svg:x1="6.001cm" svg:y1="5.964cm" svg:x2="6.001cm" svg:y2="6.715cm" svg:d="M6001 5964v751" svg:viewBox="0 0 1 752">
          <text:p/>
        </draw:connector>
        <draw:connector draw:style-name="gr14" draw:text-style-name="P5" draw:layer="layout" svg:x1="6.001cm" svg:y1="5.965cm" svg:x2="6.001cm" svg:y2="6.715cm" svg:d="M6001 5965v750" svg:viewBox="0 0 1 751">
          <text:p/>
        </draw:connector>
        <draw:connector draw:style-name="gr14" draw:text-style-name="P5" draw:layer="layout" draw:type="line" svg:x1="6.001cm" svg:y1="5.965cm" svg:x2="6.001cm" svg:y2="6.715cm" svg:d="M6001 5965v750" svg:viewBox="0 0 1 751">
          <text:p/>
        </draw:connector>
        <draw:connector draw:style-name="gr14" draw:text-style-name="P5" draw:layer="layout" svg:x1="7.946cm" svg:y1="5.964cm" svg:x2="7.946cm" svg:y2="6.715cm" svg:d="M7946 5964v751" svg:viewBox="0 0 1 752">
          <text:p/>
        </draw:connector>
        <draw:connector draw:style-name="gr14" draw:text-style-name="P5" draw:layer="layout" draw:type="line" svg:x1="7.946cm" svg:y1="5.964cm" svg:x2="7.946cm" svg:y2="6.715cm" svg:d="M7946 5964v751" svg:viewBox="0 0 1 752">
          <text:p/>
        </draw:connector>
        <draw:connector draw:style-name="gr14" draw:text-style-name="P5" draw:layer="layout" svg:x1="7.946cm" svg:y1="5.965cm" svg:x2="7.946cm" svg:y2="6.715cm" svg:d="M7946 5965v750" svg:viewBox="0 0 1 751">
          <text:p/>
        </draw:connector>
        <draw:connector draw:style-name="gr14" draw:text-style-name="P5" draw:layer="layout" draw:type="line" svg:x1="7.946cm" svg:y1="5.965cm" svg:x2="7.946cm" svg:y2="6.715cm" svg:d="M7946 5965v750" svg:viewBox="0 0 1 751">
          <text:p/>
        </draw:connector>
        <draw:connector draw:style-name="gr14" draw:text-style-name="P5" draw:layer="layout" draw:type="line" svg:x1="4.445cm" svg:y1="5.59cm" svg:x2="5.613cm" svg:y2="5.589cm" draw:start-shape="id20" draw:start-glue-point="10" draw:end-shape="id21" draw:end-glue-point="6" svg:d="M4445 5590l1168-1" svg:viewBox="0 0 1169 2">
          <text:p/>
        </draw:connector>
        <draw:connector draw:style-name="gr14" draw:text-style-name="P5" draw:layer="layout" draw:type="line" svg:x1="4.445cm" svg:y1="5.59cm" svg:x2="5.613cm" svg:y2="5.589cm" draw:start-shape="id20" draw:start-glue-point="10" draw:end-shape="id21" draw:end-glue-point="6" svg:d="M4445 5590l1168-1" svg:viewBox="0 0 1169 2">
          <text:p/>
        </draw:connector>
        <draw:connector draw:style-name="gr14" draw:text-style-name="P5" draw:layer="layout" draw:type="line" svg:x1="6.39cm" svg:y1="5.59cm" svg:x2="7.557cm" svg:y2="5.589cm" svg:d="M6390 5590l1167-1" svg:viewBox="0 0 1168 2">
          <text:p/>
        </draw:connector>
        <draw:connector draw:style-name="gr14" draw:text-style-name="P5" draw:layer="layout" draw:type="line" svg:x1="6.39cm" svg:y1="5.59cm" svg:x2="7.557cm" svg:y2="5.589cm" svg:d="M6390 5590l1167-1" svg:viewBox="0 0 1168 2">
          <text:p/>
        </draw:connector>
        <draw:connector draw:style-name="gr14" draw:text-style-name="P5" draw:layer="layout" draw:type="line" svg:x1="4.445cm" svg:y1="7.09cm" svg:x2="5.613cm" svg:y2="7.089cm" svg:d="M4445 7090l1168-1" svg:viewBox="0 0 1169 2">
          <text:p/>
        </draw:connector>
        <draw:connector draw:style-name="gr14" draw:text-style-name="P5" draw:layer="layout" draw:type="line" svg:x1="4.445cm" svg:y1="7.09cm" svg:x2="5.613cm" svg:y2="7.089cm" svg:d="M4445 7090l1168-1" svg:viewBox="0 0 1169 2">
          <text:p/>
        </draw:connector>
        <draw:connector draw:style-name="gr14" draw:text-style-name="P5" draw:layer="layout" draw:type="line" svg:x1="6.39cm" svg:y1="7.089cm" svg:x2="7.557cm" svg:y2="7.088cm" svg:d="M6390 7089l1167-1" svg:viewBox="0 0 1168 2">
          <text:p/>
        </draw:connector>
        <draw:connector draw:style-name="gr14" draw:text-style-name="P5" draw:layer="layout" draw:type="line" svg:x1="6.39cm" svg:y1="7.089cm" svg:x2="7.557cm" svg:y2="7.088cm" svg:d="M6390 7089l1167-1" svg:viewBox="0 0 1168 2">
          <text:p/>
        </draw:connector>
        <draw:connector draw:style-name="gr14" draw:text-style-name="P5" draw:layer="layout" draw:type="line" svg:x1="4.056cm" svg:y1="7.464cm" svg:x2="4.056cm" svg:y2="8.215cm" svg:d="M4056 7464v751" svg:viewBox="0 0 1 752">
          <text:p/>
        </draw:connector>
        <draw:connector draw:style-name="gr14" draw:text-style-name="P5" draw:layer="layout" draw:type="line" svg:x1="4.056cm" svg:y1="7.465cm" svg:x2="4.056cm" svg:y2="8.215cm" svg:d="M4056 7465v750" svg:viewBox="0 0 1 751">
          <text:p/>
        </draw:connector>
        <draw:connector draw:style-name="gr14" draw:text-style-name="P5" draw:layer="layout" draw:type="line" svg:x1="7.946cm" svg:y1="7.464cm" svg:x2="7.946cm" svg:y2="8.215cm" svg:d="M7946 7464v751" svg:viewBox="0 0 1 752">
          <text:p/>
        </draw:connector>
        <draw:connector draw:style-name="gr14" draw:text-style-name="P5" draw:layer="layout" draw:type="line" svg:x1="8.334cm" svg:y1="7.09cm" svg:x2="9.502cm" svg:y2="7.089cm" svg:d="M8334 7090l1168-1" svg:viewBox="0 0 1169 2">
          <text:p/>
        </draw:connector>
        <draw:connector draw:style-name="gr14" draw:text-style-name="P5" draw:layer="layout" draw:type="line" svg:x1="8.334cm" svg:y1="7.09cm" svg:x2="9.502cm" svg:y2="7.089cm" svg:d="M8334 7090l1168-1" svg:viewBox="0 0 1169 2">
          <text:p/>
        </draw:connector>
        <draw:connector draw:style-name="gr14" draw:text-style-name="P5" draw:layer="layout" draw:type="line" svg:x1="8.334cm" svg:y1="5.59cm" svg:x2="9.501cm" svg:y2="5.589cm" svg:d="M8334 5590l1167-1" svg:viewBox="0 0 1168 2">
          <text:p/>
        </draw:connector>
        <draw:connector draw:style-name="gr14" draw:text-style-name="P5" draw:layer="layout" draw:type="line" svg:x1="8.334cm" svg:y1="5.59cm" svg:x2="9.501cm" svg:y2="5.589cm" svg:d="M8334 5590l1167-1" svg:viewBox="0 0 1168 2">
          <text:p/>
        </draw:connector>
        <draw:connector draw:style-name="gr14" draw:text-style-name="P5" draw:layer="layout" draw:type="line" svg:x1="2.5cm" svg:y1="5.59cm" svg:x2="3.668cm" svg:y2="5.589cm" svg:d="M2500 5590l1168-1" svg:viewBox="0 0 1169 2">
          <text:p/>
        </draw:connector>
        <draw:connector draw:style-name="gr14" draw:text-style-name="P5" draw:layer="layout" draw:type="line" svg:x1="2.5cm" svg:y1="5.59cm" svg:x2="3.668cm" svg:y2="5.589cm" svg:d="M2500 5590l1168-1" svg:viewBox="0 0 1169 2">
          <text:p/>
        </draw:connector>
        <draw:connector draw:style-name="gr14" draw:text-style-name="P5" draw:layer="layout" draw:type="line" svg:x1="2.5cm" svg:y1="7.09cm" svg:x2="3.668cm" svg:y2="7.089cm" svg:d="M2500 7090l1168-1" svg:viewBox="0 0 1169 2">
          <text:p/>
        </draw:connector>
        <draw:connector draw:style-name="gr14" draw:text-style-name="P5" draw:layer="layout" draw:type="line" svg:x1="2.5cm" svg:y1="7.09cm" svg:x2="3.668cm" svg:y2="7.089cm" svg:d="M2500 7090l1168-1" svg:viewBox="0 0 1169 2">
          <text:p/>
        </draw:connector>
        <draw:custom-shape draw:style-name="gr12" draw:text-style-name="P6" xml:id="id22" draw:id="id22" draw:layer="layout" svg:width="0.777cm" svg:height="0.749cm" svg:x="3.668cm" svg:y="3.7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23" draw:id="id23" draw:layer="layout" svg:width="0.777cm" svg:height="0.749cm" svg:x="3.668cm" svg:y="5.2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5.613cm" svg:y="3.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24" draw:id="id24" draw:layer="layout" svg:width="0.777cm" svg:height="0.749cm" svg:x="5.613cm" svg:y="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3.668cm" svg:y="6.7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5.612cm" svg:y="6.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7.557cm" svg:y="3.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7.557cm" svg:y="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7.557cm" svg:y="6.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3" draw:text-style-name="P5" draw:layer="layout" svg:x1="4.057cm" svg:y1="4.464cm" svg:x2="4.057cm" svg:y2="5.215cm" draw:start-shape="id22" draw:start-glue-point="8" draw:end-shape="id23" draw:end-glue-point="4" svg:d="M4057 4464v751" svg:viewBox="0 0 1 752">
          <text:p/>
        </draw:connector>
        <draw:connector draw:style-name="gr13" draw:text-style-name="P5" draw:layer="layout" draw:type="line" svg:x1="4.057cm" svg:y1="4.464cm" svg:x2="4.057cm" svg:y2="5.215cm" draw:start-shape="id22" draw:start-glue-point="8" draw:end-shape="id23" draw:end-glue-point="4" svg:d="M4057 4464v751" svg:viewBox="0 0 1 752">
          <text:p/>
        </draw:connector>
        <draw:connector draw:style-name="gr13" draw:text-style-name="P5" draw:layer="layout" svg:x1="6.001cm" svg:y1="4.464cm" svg:x2="6.001cm" svg:y2="5.215cm" svg:d="M6001 4464v751" svg:viewBox="0 0 1 752">
          <text:p/>
        </draw:connector>
        <draw:connector draw:style-name="gr13" draw:text-style-name="P5" draw:layer="layout" draw:type="line" svg:x1="6.001cm" svg:y1="4.464cm" svg:x2="6.001cm" svg:y2="5.215cm" svg:d="M6001 4464v751" svg:viewBox="0 0 1 752">
          <text:p/>
        </draw:connector>
        <draw:connector draw:style-name="gr13" draw:text-style-name="P5" draw:layer="layout" svg:x1="7.946cm" svg:y1="4.464cm" svg:x2="7.946cm" svg:y2="5.215cm" svg:d="M7946 4464v751" svg:viewBox="0 0 1 752">
          <text:p/>
        </draw:connector>
        <draw:connector draw:style-name="gr13" draw:text-style-name="P5" draw:layer="layout" draw:type="line" svg:x1="7.946cm" svg:y1="4.464cm" svg:x2="7.946cm" svg:y2="5.215cm" svg:d="M7946 4464v751" svg:viewBox="0 0 1 752">
          <text:p/>
        </draw:connector>
        <draw:connector draw:style-name="gr14" draw:text-style-name="P5" draw:layer="layout" svg:x1="4.056cm" svg:y1="5.964cm" svg:x2="4.056cm" svg:y2="6.715cm" svg:d="M4056 5964v751" svg:viewBox="0 0 1 752">
          <text:p/>
        </draw:connector>
        <draw:connector draw:style-name="gr14" draw:text-style-name="P5" draw:layer="layout" draw:type="line" svg:x1="4.056cm" svg:y1="5.964cm" svg:x2="4.056cm" svg:y2="6.715cm" svg:d="M4056 5964v751" svg:viewBox="0 0 1 752">
          <text:p/>
        </draw:connector>
        <draw:connector draw:style-name="gr14" draw:text-style-name="P5" draw:layer="layout" svg:x1="4.056cm" svg:y1="5.965cm" svg:x2="4.056cm" svg:y2="6.715cm" svg:d="M4056 5965v750" svg:viewBox="0 0 1 751">
          <text:p/>
        </draw:connector>
        <draw:connector draw:style-name="gr14" draw:text-style-name="P5" draw:layer="layout" draw:type="line" svg:x1="6.001cm" svg:y1="7.464cm" svg:x2="6.001cm" svg:y2="8.215cm" svg:d="M6001 7464v751" svg:viewBox="0 0 1 752">
          <text:p/>
        </draw:connector>
        <draw:connector draw:style-name="gr14" draw:text-style-name="P5" draw:layer="layout" svg:x1="6.001cm" svg:y1="5.964cm" svg:x2="6.001cm" svg:y2="6.715cm" svg:d="M6001 5964v751" svg:viewBox="0 0 1 752">
          <text:p/>
        </draw:connector>
        <draw:connector draw:style-name="gr14" draw:text-style-name="P5" draw:layer="layout" draw:type="line" svg:x1="6.001cm" svg:y1="5.964cm" svg:x2="6.001cm" svg:y2="6.715cm" svg:d="M6001 5964v751" svg:viewBox="0 0 1 752">
          <text:p/>
        </draw:connector>
        <draw:connector draw:style-name="gr14" draw:text-style-name="P5" draw:layer="layout" svg:x1="6.001cm" svg:y1="5.965cm" svg:x2="6.001cm" svg:y2="6.715cm" svg:d="M6001 5965v750" svg:viewBox="0 0 1 751">
          <text:p/>
        </draw:connector>
        <draw:connector draw:style-name="gr14" draw:text-style-name="P5" draw:layer="layout" draw:type="line" svg:x1="6.001cm" svg:y1="5.965cm" svg:x2="6.001cm" svg:y2="6.715cm" svg:d="M6001 5965v750" svg:viewBox="0 0 1 751">
          <text:p/>
        </draw:connector>
        <draw:connector draw:style-name="gr14" draw:text-style-name="P5" draw:layer="layout" svg:x1="7.946cm" svg:y1="5.964cm" svg:x2="7.946cm" svg:y2="6.715cm" svg:d="M7946 5964v751" svg:viewBox="0 0 1 752">
          <text:p/>
        </draw:connector>
        <draw:connector draw:style-name="gr14" draw:text-style-name="P5" draw:layer="layout" draw:type="line" svg:x1="7.946cm" svg:y1="5.964cm" svg:x2="7.946cm" svg:y2="6.715cm" svg:d="M7946 5964v751" svg:viewBox="0 0 1 752">
          <text:p/>
        </draw:connector>
        <draw:connector draw:style-name="gr14" draw:text-style-name="P5" draw:layer="layout" svg:x1="7.946cm" svg:y1="5.965cm" svg:x2="7.946cm" svg:y2="6.715cm" svg:d="M7946 5965v750" svg:viewBox="0 0 1 751">
          <text:p/>
        </draw:connector>
        <draw:connector draw:style-name="gr14" draw:text-style-name="P5" draw:layer="layout" draw:type="line" svg:x1="7.946cm" svg:y1="5.965cm" svg:x2="7.946cm" svg:y2="6.715cm" svg:d="M7946 5965v750" svg:viewBox="0 0 1 751">
          <text:p/>
        </draw:connector>
        <draw:connector draw:style-name="gr14" draw:text-style-name="P5" draw:layer="layout" draw:type="line" svg:x1="4.445cm" svg:y1="5.59cm" svg:x2="5.613cm" svg:y2="5.589cm" draw:start-shape="id23" draw:start-glue-point="10" draw:end-shape="id24" draw:end-glue-point="6" svg:d="M4445 5590l1168-1" svg:viewBox="0 0 1169 2">
          <text:p/>
        </draw:connector>
        <draw:connector draw:style-name="gr14" draw:text-style-name="P5" draw:layer="layout" draw:type="line" svg:x1="4.445cm" svg:y1="5.59cm" svg:x2="5.613cm" svg:y2="5.589cm" draw:start-shape="id23" draw:start-glue-point="10" draw:end-shape="id24" draw:end-glue-point="6" svg:d="M4445 5590l1168-1" svg:viewBox="0 0 1169 2">
          <text:p/>
        </draw:connector>
        <draw:connector draw:style-name="gr14" draw:text-style-name="P5" draw:layer="layout" draw:type="line" svg:x1="6.39cm" svg:y1="5.59cm" svg:x2="7.557cm" svg:y2="5.589cm" svg:d="M6390 5590l1167-1" svg:viewBox="0 0 1168 2">
          <text:p/>
        </draw:connector>
        <draw:connector draw:style-name="gr14" draw:text-style-name="P5" draw:layer="layout" draw:type="line" svg:x1="6.39cm" svg:y1="5.59cm" svg:x2="7.557cm" svg:y2="5.589cm" svg:d="M6390 5590l1167-1" svg:viewBox="0 0 1168 2">
          <text:p/>
        </draw:connector>
        <draw:connector draw:style-name="gr14" draw:text-style-name="P5" draw:layer="layout" draw:type="line" svg:x1="4.445cm" svg:y1="7.09cm" svg:x2="5.613cm" svg:y2="7.089cm" svg:d="M4445 7090l1168-1" svg:viewBox="0 0 1169 2">
          <text:p/>
        </draw:connector>
        <draw:connector draw:style-name="gr14" draw:text-style-name="P5" draw:layer="layout" draw:type="line" svg:x1="4.445cm" svg:y1="7.09cm" svg:x2="5.613cm" svg:y2="7.089cm" svg:d="M4445 7090l1168-1" svg:viewBox="0 0 1169 2">
          <text:p/>
        </draw:connector>
        <draw:connector draw:style-name="gr14" draw:text-style-name="P5" draw:layer="layout" draw:type="line" svg:x1="6.39cm" svg:y1="7.089cm" svg:x2="7.557cm" svg:y2="7.088cm" svg:d="M6390 7089l1167-1" svg:viewBox="0 0 1168 2">
          <text:p/>
        </draw:connector>
        <draw:connector draw:style-name="gr14" draw:text-style-name="P5" draw:layer="layout" draw:type="line" svg:x1="6.39cm" svg:y1="7.089cm" svg:x2="7.557cm" svg:y2="7.088cm" svg:d="M6390 7089l1167-1" svg:viewBox="0 0 1168 2">
          <text:p/>
        </draw:connector>
        <draw:connector draw:style-name="gr14" draw:text-style-name="P5" draw:layer="layout" draw:type="line" svg:x1="4.056cm" svg:y1="7.464cm" svg:x2="4.056cm" svg:y2="8.215cm" svg:d="M4056 7464v751" svg:viewBox="0 0 1 752">
          <text:p/>
        </draw:connector>
        <draw:connector draw:style-name="gr14" draw:text-style-name="P5" draw:layer="layout" draw:type="line" svg:x1="4.057cm" svg:y1="7.465cm" svg:x2="4.057cm" svg:y2="8.216cm" svg:d="M4057 7465v751" svg:viewBox="0 0 1 752">
          <text:p/>
        </draw:connector>
        <draw:connector draw:style-name="gr14" draw:text-style-name="P5" draw:layer="layout" draw:type="line" svg:x1="7.946cm" svg:y1="7.464cm" svg:x2="7.946cm" svg:y2="8.215cm" svg:d="M7946 7464v751" svg:viewBox="0 0 1 752">
          <text:p/>
        </draw:connector>
        <draw:connector draw:style-name="gr14" draw:text-style-name="P5" draw:layer="layout" draw:type="line" svg:x1="8.334cm" svg:y1="7.09cm" svg:x2="9.502cm" svg:y2="7.089cm" svg:d="M8334 7090l1168-1" svg:viewBox="0 0 1169 2">
          <text:p/>
        </draw:connector>
        <draw:connector draw:style-name="gr14" draw:text-style-name="P5" draw:layer="layout" draw:type="line" svg:x1="8.334cm" svg:y1="7.09cm" svg:x2="9.502cm" svg:y2="7.089cm" svg:d="M8334 7090l1168-1" svg:viewBox="0 0 1169 2">
          <text:p/>
        </draw:connector>
        <draw:connector draw:style-name="gr14" draw:text-style-name="P5" draw:layer="layout" draw:type="line" svg:x1="8.334cm" svg:y1="5.59cm" svg:x2="9.501cm" svg:y2="5.589cm" svg:d="M8334 5590l1167-1" svg:viewBox="0 0 1168 2">
          <text:p/>
        </draw:connector>
        <draw:connector draw:style-name="gr14" draw:text-style-name="P5" draw:layer="layout" draw:type="line" svg:x1="8.334cm" svg:y1="5.59cm" svg:x2="9.501cm" svg:y2="5.589cm" svg:d="M8334 5590l1167-1" svg:viewBox="0 0 1168 2">
          <text:p/>
        </draw:connector>
        <draw:connector draw:style-name="gr14" draw:text-style-name="P5" draw:layer="layout" draw:type="line" svg:x1="2.5cm" svg:y1="5.59cm" svg:x2="3.668cm" svg:y2="5.589cm" svg:d="M2500 5590l1168-1" svg:viewBox="0 0 1169 2">
          <text:p/>
        </draw:connector>
        <draw:connector draw:style-name="gr14" draw:text-style-name="P5" draw:layer="layout" draw:type="line" svg:x1="2.5cm" svg:y1="5.59cm" svg:x2="3.668cm" svg:y2="5.589cm" svg:d="M2500 5590l1168-1" svg:viewBox="0 0 1169 2">
          <text:p/>
        </draw:connector>
        <draw:connector draw:style-name="gr14" draw:text-style-name="P5" draw:layer="layout" draw:type="line" svg:x1="2.5cm" svg:y1="7.09cm" svg:x2="3.668cm" svg:y2="7.089cm" svg:d="M2500 7090l1168-1" svg:viewBox="0 0 1169 2">
          <text:p/>
        </draw:connector>
        <draw:connector draw:style-name="gr14" draw:text-style-name="P5" draw:layer="layout" draw:type="line" svg:x1="2.5cm" svg:y1="7.09cm" svg:x2="3.668cm" svg:y2="7.089cm" svg:d="M2500 7090l1168-1" svg:viewBox="0 0 1169 2">
          <text:p/>
        </draw:connector>
        <draw:custom-shape draw:style-name="gr15" draw:text-style-name="P6" draw:layer="layout" svg:width="0.776cm" svg:height="0.75cm" svg:x="3.669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xml:id="id25" draw:id="id25" draw:layer="layout" svg:width="0.776cm" svg:height="0.749cm" svg:x="3.669cm" svg:y="12.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5.613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26" draw:id="id26" draw:layer="layout" svg:width="0.777cm" svg:height="0.749cm" svg:x="5.613cm" svg:y="12.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776cm" svg:height="0.749cm" svg:x="3.668cm" svg:y="13.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5.612cm" svg:y="13.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776cm" svg:height="0.749cm" svg:x="7.558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776cm" svg:height="0.749cm" svg:x="7.558cm" svg:y="12.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776cm" svg:height="0.749cm" svg:x="7.557cm" svg:y="13.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 draw:text-style-name="P5" draw:layer="layout" svg:x1="4.057cm" svg:y1="13.218cm" svg:x2="4.057cm" svg:y2="13.969cm" svg:d="M4057 13218v751" svg:viewBox="0 0 1 752">
          <text:p/>
        </draw:connector>
        <draw:connector draw:style-name="gr14" draw:text-style-name="P5" draw:layer="layout" draw:type="line" svg:x1="4.057cm" svg:y1="13.218cm" svg:x2="4.057cm" svg:y2="13.969cm" svg:d="M4057 13218v751" svg:viewBox="0 0 1 752">
          <text:p/>
        </draw:connector>
        <draw:connector draw:style-name="gr14" draw:text-style-name="P5" draw:layer="layout" svg:x1="4.057cm" svg:y1="13.219cm" svg:x2="4.057cm" svg:y2="13.969cm" svg:d="M4057 13219v750" svg:viewBox="0 0 1 751">
          <text:p/>
        </draw:connector>
        <draw:connector draw:style-name="gr14" draw:text-style-name="P5" draw:layer="layout" draw:type="line" svg:x1="6.002cm" svg:y1="11.716cm" svg:x2="6.002cm" svg:y2="12.467cm" svg:d="M6002 11716v751" svg:viewBox="0 0 1 752">
          <text:p/>
        </draw:connector>
        <draw:connector draw:style-name="gr14" draw:text-style-name="P5" draw:layer="layout" svg:x1="6.001cm" svg:y1="13.218cm" svg:x2="6.001cm" svg:y2="13.969cm" svg:d="M6001 13218v751" svg:viewBox="0 0 1 752">
          <text:p/>
        </draw:connector>
        <draw:connector draw:style-name="gr14" draw:text-style-name="P5" draw:layer="layout" draw:type="line" svg:x1="6.001cm" svg:y1="13.218cm" svg:x2="6.001cm" svg:y2="13.969cm" svg:d="M6001 13218v751" svg:viewBox="0 0 1 752">
          <text:p/>
        </draw:connector>
        <draw:connector draw:style-name="gr14" draw:text-style-name="P5" draw:layer="layout" svg:x1="6.001cm" svg:y1="13.219cm" svg:x2="6.001cm" svg:y2="13.969cm" svg:d="M6001 13219v750" svg:viewBox="0 0 1 751">
          <text:p/>
        </draw:connector>
        <draw:connector draw:style-name="gr14" draw:text-style-name="P5" draw:layer="layout" draw:type="line" svg:x1="6.001cm" svg:y1="13.219cm" svg:x2="6.001cm" svg:y2="13.969cm" svg:d="M6001 13219v750" svg:viewBox="0 0 1 751">
          <text:p/>
        </draw:connector>
        <draw:connector draw:style-name="gr14" draw:text-style-name="P5" draw:layer="layout" svg:x1="7.945cm" svg:y1="13.218cm" svg:x2="7.945cm" svg:y2="13.969cm" svg:d="M7945 13218v751" svg:viewBox="0 0 1 752">
          <text:p/>
        </draw:connector>
        <draw:connector draw:style-name="gr14" draw:text-style-name="P5" draw:layer="layout" draw:type="line" svg:x1="7.945cm" svg:y1="13.218cm" svg:x2="7.945cm" svg:y2="13.969cm" svg:d="M7945 13218v751" svg:viewBox="0 0 1 752">
          <text:p/>
        </draw:connector>
        <draw:connector draw:style-name="gr14" draw:text-style-name="P5" draw:layer="layout" svg:x1="7.945cm" svg:y1="13.219cm" svg:x2="7.945cm" svg:y2="13.969cm" svg:d="M7945 13219v750" svg:viewBox="0 0 1 751">
          <text:p/>
        </draw:connector>
        <draw:connector draw:style-name="gr14" draw:text-style-name="P5" draw:layer="layout" draw:type="line" svg:x1="7.945cm" svg:y1="13.219cm" svg:x2="7.945cm" svg:y2="13.969cm" svg:d="M7945 13219v750" svg:viewBox="0 0 1 751">
          <text:p/>
        </draw:connector>
        <draw:connector draw:style-name="gr14" draw:text-style-name="P5" draw:layer="layout" draw:type="line" svg:x1="4.445cm" svg:y1="12.844cm" svg:x2="5.613cm" svg:y2="12.843cm" draw:start-shape="id25" draw:start-glue-point="10" draw:end-shape="id26" draw:end-glue-point="6" svg:d="M4445 12844l1168-1" svg:viewBox="0 0 1169 2">
          <text:p/>
        </draw:connector>
        <draw:connector draw:style-name="gr14" draw:text-style-name="P5" draw:layer="layout" draw:type="line" svg:x1="4.445cm" svg:y1="12.844cm" svg:x2="5.613cm" svg:y2="12.843cm" draw:start-shape="id25" draw:start-glue-point="10" draw:end-shape="id26" draw:end-glue-point="6" svg:d="M4445 12844l1168-1" svg:viewBox="0 0 1169 2">
          <text:p/>
        </draw:connector>
        <draw:connector draw:style-name="gr14" draw:text-style-name="P5" draw:layer="layout" draw:type="line" svg:x1="6.39cm" svg:y1="12.844cm" svg:x2="7.558cm" svg:y2="12.843cm" svg:d="M6390 12844l1168-1" svg:viewBox="0 0 1169 2">
          <text:p/>
        </draw:connector>
        <draw:connector draw:style-name="gr14" draw:text-style-name="P5" draw:layer="layout" draw:type="line" svg:x1="6.39cm" svg:y1="12.844cm" svg:x2="7.558cm" svg:y2="12.843cm" svg:d="M6390 12844l1168-1" svg:viewBox="0 0 1169 2">
          <text:p/>
        </draw:connector>
        <draw:connector draw:style-name="gr14" draw:text-style-name="P5" draw:layer="layout" draw:type="line" svg:x1="4.446cm" svg:y1="11.37cm" svg:x2="5.614cm" svg:y2="11.369cm" svg:d="M4446 11370l1168-1" svg:viewBox="0 0 1169 2">
          <text:p/>
        </draw:connector>
        <draw:connector draw:style-name="gr14" draw:text-style-name="P5" draw:layer="layout" draw:type="line" svg:x1="4.446cm" svg:y1="11.37cm" svg:x2="5.614cm" svg:y2="11.369cm" svg:d="M4446 11370l1168-1" svg:viewBox="0 0 1169 2">
          <text:p/>
        </draw:connector>
        <draw:connector draw:style-name="gr14" draw:text-style-name="P5" draw:layer="layout" draw:type="line" svg:x1="6.391cm" svg:y1="11.37cm" svg:x2="7.558cm" svg:y2="11.37cm" svg:d="M6391 11370h1167" svg:viewBox="0 0 1168 1">
          <text:p/>
        </draw:connector>
        <draw:connector draw:style-name="gr14" draw:text-style-name="P5" draw:layer="layout" draw:type="line" svg:x1="6.391cm" svg:y1="11.37cm" svg:x2="7.558cm" svg:y2="11.37cm" svg:d="M6391 11370h1167" svg:viewBox="0 0 1168 1">
          <text:p/>
        </draw:connector>
        <draw:connector draw:style-name="gr14" draw:text-style-name="P5" draw:layer="layout" draw:type="line" svg:x1="4.057cm" svg:y1="11.716cm" svg:x2="4.057cm" svg:y2="12.467cm" svg:d="M4057 11716v751" svg:viewBox="0 0 1 752">
          <text:p/>
        </draw:connector>
        <draw:connector draw:style-name="gr14" draw:text-style-name="P5" draw:layer="layout" draw:type="line" svg:x1="4.057cm" svg:y1="11.717cm" svg:x2="4.057cm" svg:y2="12.468cm" svg:d="M4057 11717v751" svg:viewBox="0 0 1 752">
          <text:p/>
        </draw:connector>
        <draw:connector draw:style-name="gr14" draw:text-style-name="P5" draw:layer="layout" draw:type="line" svg:x1="7.946cm" svg:y1="11.716cm" svg:x2="7.946cm" svg:y2="12.467cm" svg:d="M7946 11716v751" svg:viewBox="0 0 1 752">
          <text:p/>
        </draw:connector>
        <draw:connector draw:style-name="gr14" draw:text-style-name="P5" draw:layer="layout" draw:type="line" svg:x1="8.334cm" svg:y1="11.37cm" svg:x2="9.502cm" svg:y2="11.369cm" svg:d="M8334 11370l1168-1" svg:viewBox="0 0 1169 2">
          <text:p/>
        </draw:connector>
        <draw:connector draw:style-name="gr14" draw:text-style-name="P5" draw:layer="layout" draw:type="line" svg:x1="8.334cm" svg:y1="11.37cm" svg:x2="9.502cm" svg:y2="11.369cm" svg:d="M8334 11370l1168-1" svg:viewBox="0 0 1169 2">
          <text:p/>
        </draw:connector>
        <draw:connector draw:style-name="gr14" draw:text-style-name="P5" draw:layer="layout" draw:type="line" svg:x1="8.333cm" svg:y1="12.844cm" svg:x2="9.501cm" svg:y2="12.843cm" svg:d="M8333 12844l1168-1" svg:viewBox="0 0 1169 2">
          <text:p/>
        </draw:connector>
        <draw:connector draw:style-name="gr14" draw:text-style-name="P5" draw:layer="layout" draw:type="line" svg:x1="8.333cm" svg:y1="12.844cm" svg:x2="9.501cm" svg:y2="12.843cm" svg:d="M8333 12844l1168-1" svg:viewBox="0 0 1169 2">
          <text:p/>
        </draw:connector>
        <draw:connector draw:style-name="gr14" draw:text-style-name="P5" draw:layer="layout" draw:type="line" svg:x1="2.5cm" svg:y1="12.844cm" svg:x2="3.668cm" svg:y2="12.843cm" svg:d="M2500 12844l1168-1" svg:viewBox="0 0 1169 2">
          <text:p/>
        </draw:connector>
        <draw:connector draw:style-name="gr14" draw:text-style-name="P5" draw:layer="layout" draw:type="line" svg:x1="2.5cm" svg:y1="12.844cm" svg:x2="3.668cm" svg:y2="12.843cm" svg:d="M2500 12844l1168-1" svg:viewBox="0 0 1169 2">
          <text:p/>
        </draw:connector>
        <draw:connector draw:style-name="gr14" draw:text-style-name="P5" draw:layer="layout" draw:type="line" svg:x1="2.501cm" svg:y1="11.37cm" svg:x2="3.669cm" svg:y2="11.37cm" svg:d="M2501 11370h1168" svg:viewBox="0 0 1169 1">
          <text:p/>
        </draw:connector>
        <draw:connector draw:style-name="gr14" draw:text-style-name="P5" draw:layer="layout" draw:type="line" svg:x1="2.501cm" svg:y1="11.37cm" svg:x2="3.669cm" svg:y2="11.37cm" svg:d="M2501 11370h1168" svg:viewBox="0 0 1169 1">
          <text:p/>
        </draw:connector>
        <draw:custom-shape draw:style-name="gr15" draw:text-style-name="P6" draw:layer="layout" svg:width="0.776cm" svg:height="0.75cm" svg:x="3.669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xml:id="id27" draw:id="id27" draw:layer="layout" svg:width="0.776cm" svg:height="0.749cm" svg:x="3.669cm" svg:y="12.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5.613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28" draw:id="id28" draw:layer="layout" svg:width="0.777cm" svg:height="0.749cm" svg:x="5.613cm" svg:y="12.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776cm" svg:height="0.749cm" svg:x="3.668cm" svg:y="13.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5.612cm" svg:y="13.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776cm" svg:height="0.749cm" svg:x="7.558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776cm" svg:height="0.749cm" svg:x="7.558cm" svg:y="12.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776cm" svg:height="0.749cm" svg:x="7.557cm" svg:y="13.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 draw:text-style-name="P5" draw:layer="layout" svg:x1="4.057cm" svg:y1="13.218cm" svg:x2="4.057cm" svg:y2="13.969cm" svg:d="M4057 13218v751" svg:viewBox="0 0 1 752">
          <text:p/>
        </draw:connector>
        <draw:connector draw:style-name="gr14" draw:text-style-name="P5" draw:layer="layout" draw:type="line" svg:x1="4.057cm" svg:y1="13.218cm" svg:x2="4.057cm" svg:y2="13.969cm" svg:d="M4057 13218v751" svg:viewBox="0 0 1 752">
          <text:p/>
        </draw:connector>
        <draw:connector draw:style-name="gr14" draw:text-style-name="P5" draw:layer="layout" svg:x1="4.057cm" svg:y1="13.219cm" svg:x2="4.057cm" svg:y2="13.969cm" svg:d="M4057 13219v750" svg:viewBox="0 0 1 751">
          <text:p/>
        </draw:connector>
        <draw:connector draw:style-name="gr14" draw:text-style-name="P5" draw:layer="layout" draw:type="line" svg:x1="6.002cm" svg:y1="11.716cm" svg:x2="6.002cm" svg:y2="12.467cm" svg:d="M6002 11716v751" svg:viewBox="0 0 1 752">
          <text:p/>
        </draw:connector>
        <draw:connector draw:style-name="gr14" draw:text-style-name="P5" draw:layer="layout" svg:x1="6.001cm" svg:y1="13.218cm" svg:x2="6.001cm" svg:y2="13.969cm" svg:d="M6001 13218v751" svg:viewBox="0 0 1 752">
          <text:p/>
        </draw:connector>
        <draw:connector draw:style-name="gr14" draw:text-style-name="P5" draw:layer="layout" draw:type="line" svg:x1="6.001cm" svg:y1="13.218cm" svg:x2="6.001cm" svg:y2="13.969cm" svg:d="M6001 13218v751" svg:viewBox="0 0 1 752">
          <text:p/>
        </draw:connector>
        <draw:connector draw:style-name="gr14" draw:text-style-name="P5" draw:layer="layout" svg:x1="6.001cm" svg:y1="13.219cm" svg:x2="6.001cm" svg:y2="13.969cm" svg:d="M6001 13219v750" svg:viewBox="0 0 1 751">
          <text:p/>
        </draw:connector>
        <draw:connector draw:style-name="gr14" draw:text-style-name="P5" draw:layer="layout" draw:type="line" svg:x1="6.001cm" svg:y1="13.219cm" svg:x2="6.001cm" svg:y2="13.969cm" svg:d="M6001 13219v750" svg:viewBox="0 0 1 751">
          <text:p/>
        </draw:connector>
        <draw:connector draw:style-name="gr14" draw:text-style-name="P5" draw:layer="layout" svg:x1="7.945cm" svg:y1="13.218cm" svg:x2="7.945cm" svg:y2="13.969cm" svg:d="M7945 13218v751" svg:viewBox="0 0 1 752">
          <text:p/>
        </draw:connector>
        <draw:connector draw:style-name="gr14" draw:text-style-name="P5" draw:layer="layout" draw:type="line" svg:x1="7.945cm" svg:y1="13.218cm" svg:x2="7.945cm" svg:y2="13.969cm" svg:d="M7945 13218v751" svg:viewBox="0 0 1 752">
          <text:p/>
        </draw:connector>
        <draw:connector draw:style-name="gr14" draw:text-style-name="P5" draw:layer="layout" svg:x1="7.945cm" svg:y1="13.219cm" svg:x2="7.945cm" svg:y2="13.969cm" svg:d="M7945 13219v750" svg:viewBox="0 0 1 751">
          <text:p/>
        </draw:connector>
        <draw:connector draw:style-name="gr14" draw:text-style-name="P5" draw:layer="layout" draw:type="line" svg:x1="7.945cm" svg:y1="13.219cm" svg:x2="7.945cm" svg:y2="13.969cm" svg:d="M7945 13219v750" svg:viewBox="0 0 1 751">
          <text:p/>
        </draw:connector>
        <draw:connector draw:style-name="gr14" draw:text-style-name="P5" draw:layer="layout" draw:type="line" svg:x1="4.445cm" svg:y1="12.844cm" svg:x2="5.613cm" svg:y2="12.843cm" draw:start-shape="id27" draw:start-glue-point="10" draw:end-shape="id28" draw:end-glue-point="6" svg:d="M4445 12844l1168-1" svg:viewBox="0 0 1169 2">
          <text:p/>
        </draw:connector>
        <draw:connector draw:style-name="gr14" draw:text-style-name="P5" draw:layer="layout" draw:type="line" svg:x1="4.445cm" svg:y1="12.844cm" svg:x2="5.613cm" svg:y2="12.843cm" draw:start-shape="id27" draw:start-glue-point="10" draw:end-shape="id28" draw:end-glue-point="6" svg:d="M4445 12844l1168-1" svg:viewBox="0 0 1169 2">
          <text:p/>
        </draw:connector>
        <draw:connector draw:style-name="gr14" draw:text-style-name="P5" draw:layer="layout" draw:type="line" svg:x1="6.39cm" svg:y1="12.844cm" svg:x2="7.558cm" svg:y2="12.843cm" svg:d="M6390 12844l1168-1" svg:viewBox="0 0 1169 2">
          <text:p/>
        </draw:connector>
        <draw:connector draw:style-name="gr14" draw:text-style-name="P5" draw:layer="layout" draw:type="line" svg:x1="6.39cm" svg:y1="12.844cm" svg:x2="7.558cm" svg:y2="12.843cm" svg:d="M6390 12844l1168-1" svg:viewBox="0 0 1169 2">
          <text:p/>
        </draw:connector>
        <draw:connector draw:style-name="gr14" draw:text-style-name="P5" draw:layer="layout" draw:type="line" svg:x1="4.446cm" svg:y1="11.37cm" svg:x2="5.614cm" svg:y2="11.369cm" svg:d="M4446 11370l1168-1" svg:viewBox="0 0 1169 2">
          <text:p/>
        </draw:connector>
        <draw:connector draw:style-name="gr14" draw:text-style-name="P5" draw:layer="layout" draw:type="line" svg:x1="4.446cm" svg:y1="11.37cm" svg:x2="5.614cm" svg:y2="11.369cm" svg:d="M4446 11370l1168-1" svg:viewBox="0 0 1169 2">
          <text:p/>
        </draw:connector>
        <draw:connector draw:style-name="gr14" draw:text-style-name="P5" draw:layer="layout" draw:type="line" svg:x1="6.391cm" svg:y1="11.37cm" svg:x2="7.558cm" svg:y2="11.37cm" svg:d="M6391 11370h1167" svg:viewBox="0 0 1168 1">
          <text:p/>
        </draw:connector>
        <draw:connector draw:style-name="gr14" draw:text-style-name="P5" draw:layer="layout" draw:type="line" svg:x1="6.391cm" svg:y1="11.37cm" svg:x2="7.558cm" svg:y2="11.37cm" svg:d="M6391 11370h1167" svg:viewBox="0 0 1168 1">
          <text:p/>
        </draw:connector>
        <draw:connector draw:style-name="gr14" draw:text-style-name="P5" draw:layer="layout" draw:type="line" svg:x1="4.057cm" svg:y1="11.716cm" svg:x2="4.057cm" svg:y2="12.467cm" svg:d="M4057 11716v751" svg:viewBox="0 0 1 752">
          <text:p/>
        </draw:connector>
        <draw:connector draw:style-name="gr14" draw:text-style-name="P5" draw:layer="layout" draw:type="line" svg:x1="4.057cm" svg:y1="11.717cm" svg:x2="4.057cm" svg:y2="12.468cm" svg:d="M4057 11717v751" svg:viewBox="0 0 1 752">
          <text:p/>
        </draw:connector>
        <draw:connector draw:style-name="gr14" draw:text-style-name="P5" draw:layer="layout" draw:type="line" svg:x1="7.946cm" svg:y1="11.716cm" svg:x2="7.946cm" svg:y2="12.467cm" svg:d="M7946 11716v751" svg:viewBox="0 0 1 752">
          <text:p/>
        </draw:connector>
        <draw:connector draw:style-name="gr14" draw:text-style-name="P5" draw:layer="layout" draw:type="line" svg:x1="8.334cm" svg:y1="11.37cm" svg:x2="9.502cm" svg:y2="11.369cm" svg:d="M8334 11370l1168-1" svg:viewBox="0 0 1169 2">
          <text:p/>
        </draw:connector>
        <draw:connector draw:style-name="gr14" draw:text-style-name="P5" draw:layer="layout" draw:type="line" svg:x1="8.334cm" svg:y1="11.37cm" svg:x2="9.502cm" svg:y2="11.369cm" svg:d="M8334 11370l1168-1" svg:viewBox="0 0 1169 2">
          <text:p/>
        </draw:connector>
        <draw:connector draw:style-name="gr14" draw:text-style-name="P5" draw:layer="layout" draw:type="line" svg:x1="8.333cm" svg:y1="12.844cm" svg:x2="9.501cm" svg:y2="12.843cm" svg:d="M8333 12844l1168-1" svg:viewBox="0 0 1169 2">
          <text:p/>
        </draw:connector>
        <draw:connector draw:style-name="gr14" draw:text-style-name="P5" draw:layer="layout" draw:type="line" svg:x1="8.333cm" svg:y1="12.844cm" svg:x2="9.501cm" svg:y2="12.843cm" svg:d="M8333 12844l1168-1" svg:viewBox="0 0 1169 2">
          <text:p/>
        </draw:connector>
        <draw:connector draw:style-name="gr14" draw:text-style-name="P5" draw:layer="layout" draw:type="line" svg:x1="2.5cm" svg:y1="12.844cm" svg:x2="3.668cm" svg:y2="12.843cm" svg:d="M2500 12844l1168-1" svg:viewBox="0 0 1169 2">
          <text:p/>
        </draw:connector>
        <draw:connector draw:style-name="gr14" draw:text-style-name="P5" draw:layer="layout" draw:type="line" svg:x1="2.5cm" svg:y1="12.844cm" svg:x2="3.668cm" svg:y2="12.843cm" svg:d="M2500 12844l1168-1" svg:viewBox="0 0 1169 2">
          <text:p/>
        </draw:connector>
        <draw:connector draw:style-name="gr14" draw:text-style-name="P5" draw:layer="layout" draw:type="line" svg:x1="2.501cm" svg:y1="11.37cm" svg:x2="3.669cm" svg:y2="11.37cm" svg:d="M2501 11370h1168" svg:viewBox="0 0 1169 1">
          <text:p/>
        </draw:connector>
        <draw:connector draw:style-name="gr14" draw:text-style-name="P5" draw:layer="layout" draw:type="line" svg:x1="2.501cm" svg:y1="11.37cm" svg:x2="3.669cm" svg:y2="11.37cm" svg:d="M2501 11370h1168" svg:viewBox="0 0 1169 1">
          <text:p/>
        </draw:connector>
        <draw:custom-shape draw:style-name="gr15" draw:text-style-name="P6" draw:layer="layout" svg:width="0.776cm" svg:height="0.75cm" svg:x="3.669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xml:id="id29" draw:id="id29" draw:layer="layout" svg:width="0.776cm" svg:height="0.749cm" svg:x="3.669cm" svg:y="12.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5.613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30" draw:id="id30" draw:layer="layout" svg:width="0.777cm" svg:height="0.749cm" svg:x="5.613cm" svg:y="12.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776cm" svg:height="0.749cm" svg:x="3.668cm" svg:y="13.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5.612cm" svg:y="13.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776cm" svg:height="0.749cm" svg:x="7.558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776cm" svg:height="0.749cm" svg:x="7.558cm" svg:y="12.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776cm" svg:height="0.749cm" svg:x="7.557cm" svg:y="13.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 draw:text-style-name="P5" draw:layer="layout" svg:x1="4.057cm" svg:y1="13.218cm" svg:x2="4.057cm" svg:y2="13.969cm" svg:d="M4057 13218v751" svg:viewBox="0 0 1 752">
          <text:p/>
        </draw:connector>
        <draw:connector draw:style-name="gr14" draw:text-style-name="P5" draw:layer="layout" draw:type="line" svg:x1="4.057cm" svg:y1="13.218cm" svg:x2="4.057cm" svg:y2="13.969cm" svg:d="M4057 13218v751" svg:viewBox="0 0 1 752">
          <text:p/>
        </draw:connector>
        <draw:connector draw:style-name="gr14" draw:text-style-name="P5" draw:layer="layout" svg:x1="4.057cm" svg:y1="13.219cm" svg:x2="4.057cm" svg:y2="13.969cm" svg:d="M4057 13219v750" svg:viewBox="0 0 1 751">
          <text:p/>
        </draw:connector>
        <draw:connector draw:style-name="gr14" draw:text-style-name="P5" draw:layer="layout" draw:type="line" svg:x1="6.002cm" svg:y1="11.716cm" svg:x2="6.002cm" svg:y2="12.467cm" svg:d="M6002 11716v751" svg:viewBox="0 0 1 752">
          <text:p/>
        </draw:connector>
        <draw:connector draw:style-name="gr14" draw:text-style-name="P5" draw:layer="layout" svg:x1="6.001cm" svg:y1="13.218cm" svg:x2="6.001cm" svg:y2="13.969cm" svg:d="M6001 13218v751" svg:viewBox="0 0 1 752">
          <text:p/>
        </draw:connector>
        <draw:connector draw:style-name="gr14" draw:text-style-name="P5" draw:layer="layout" draw:type="line" svg:x1="6.001cm" svg:y1="13.218cm" svg:x2="6.001cm" svg:y2="13.969cm" svg:d="M6001 13218v751" svg:viewBox="0 0 1 752">
          <text:p/>
        </draw:connector>
        <draw:connector draw:style-name="gr14" draw:text-style-name="P5" draw:layer="layout" svg:x1="6.001cm" svg:y1="13.219cm" svg:x2="6.001cm" svg:y2="13.969cm" svg:d="M6001 13219v750" svg:viewBox="0 0 1 751">
          <text:p/>
        </draw:connector>
        <draw:connector draw:style-name="gr14" draw:text-style-name="P5" draw:layer="layout" draw:type="line" svg:x1="6.001cm" svg:y1="13.219cm" svg:x2="6.001cm" svg:y2="13.969cm" svg:d="M6001 13219v750" svg:viewBox="0 0 1 751">
          <text:p/>
        </draw:connector>
        <draw:connector draw:style-name="gr14" draw:text-style-name="P5" draw:layer="layout" svg:x1="7.945cm" svg:y1="13.218cm" svg:x2="7.945cm" svg:y2="13.969cm" svg:d="M7945 13218v751" svg:viewBox="0 0 1 752">
          <text:p/>
        </draw:connector>
        <draw:connector draw:style-name="gr14" draw:text-style-name="P5" draw:layer="layout" draw:type="line" svg:x1="7.945cm" svg:y1="13.218cm" svg:x2="7.945cm" svg:y2="13.969cm" svg:d="M7945 13218v751" svg:viewBox="0 0 1 752">
          <text:p/>
        </draw:connector>
        <draw:connector draw:style-name="gr14" draw:text-style-name="P5" draw:layer="layout" svg:x1="7.945cm" svg:y1="13.219cm" svg:x2="7.945cm" svg:y2="13.969cm" svg:d="M7945 13219v750" svg:viewBox="0 0 1 751">
          <text:p/>
        </draw:connector>
        <draw:connector draw:style-name="gr14" draw:text-style-name="P5" draw:layer="layout" draw:type="line" svg:x1="7.945cm" svg:y1="13.219cm" svg:x2="7.945cm" svg:y2="13.969cm" svg:d="M7945 13219v750" svg:viewBox="0 0 1 751">
          <text:p/>
        </draw:connector>
        <draw:connector draw:style-name="gr14" draw:text-style-name="P5" draw:layer="layout" draw:type="line" svg:x1="4.445cm" svg:y1="12.844cm" svg:x2="5.613cm" svg:y2="12.843cm" draw:start-shape="id29" draw:start-glue-point="10" draw:end-shape="id30" draw:end-glue-point="6" svg:d="M4445 12844l1168-1" svg:viewBox="0 0 1169 2">
          <text:p/>
        </draw:connector>
        <draw:connector draw:style-name="gr14" draw:text-style-name="P5" draw:layer="layout" draw:type="line" svg:x1="4.445cm" svg:y1="12.844cm" svg:x2="5.613cm" svg:y2="12.843cm" draw:start-shape="id29" draw:start-glue-point="10" draw:end-shape="id30" draw:end-glue-point="6" svg:d="M4445 12844l1168-1" svg:viewBox="0 0 1169 2">
          <text:p/>
        </draw:connector>
        <draw:connector draw:style-name="gr14" draw:text-style-name="P5" draw:layer="layout" draw:type="line" svg:x1="6.39cm" svg:y1="12.844cm" svg:x2="7.558cm" svg:y2="12.843cm" svg:d="M6390 12844l1168-1" svg:viewBox="0 0 1169 2">
          <text:p/>
        </draw:connector>
        <draw:connector draw:style-name="gr14" draw:text-style-name="P5" draw:layer="layout" draw:type="line" svg:x1="6.39cm" svg:y1="12.844cm" svg:x2="7.558cm" svg:y2="12.843cm" svg:d="M6390 12844l1168-1" svg:viewBox="0 0 1169 2">
          <text:p/>
        </draw:connector>
        <draw:connector draw:style-name="gr14" draw:text-style-name="P5" draw:layer="layout" draw:type="line" svg:x1="4.446cm" svg:y1="11.37cm" svg:x2="5.614cm" svg:y2="11.369cm" svg:d="M4446 11370l1168-1" svg:viewBox="0 0 1169 2">
          <text:p/>
        </draw:connector>
        <draw:connector draw:style-name="gr14" draw:text-style-name="P5" draw:layer="layout" draw:type="line" svg:x1="4.446cm" svg:y1="11.37cm" svg:x2="5.614cm" svg:y2="11.369cm" svg:d="M4446 11370l1168-1" svg:viewBox="0 0 1169 2">
          <text:p/>
        </draw:connector>
        <draw:connector draw:style-name="gr14" draw:text-style-name="P5" draw:layer="layout" draw:type="line" svg:x1="6.391cm" svg:y1="11.37cm" svg:x2="7.558cm" svg:y2="11.37cm" svg:d="M6391 11370h1167" svg:viewBox="0 0 1168 1">
          <text:p/>
        </draw:connector>
        <draw:connector draw:style-name="gr14" draw:text-style-name="P5" draw:layer="layout" draw:type="line" svg:x1="6.391cm" svg:y1="11.37cm" svg:x2="7.558cm" svg:y2="11.37cm" svg:d="M6391 11370h1167" svg:viewBox="0 0 1168 1">
          <text:p/>
        </draw:connector>
        <draw:connector draw:style-name="gr14" draw:text-style-name="P5" draw:layer="layout" draw:type="line" svg:x1="4.057cm" svg:y1="11.716cm" svg:x2="4.057cm" svg:y2="12.467cm" svg:d="M4057 11716v751" svg:viewBox="0 0 1 752">
          <text:p/>
        </draw:connector>
        <draw:connector draw:style-name="gr14" draw:text-style-name="P5" draw:layer="layout" draw:type="line" svg:x1="4.057cm" svg:y1="11.717cm" svg:x2="4.057cm" svg:y2="12.468cm" svg:d="M4057 11717v751" svg:viewBox="0 0 1 752">
          <text:p/>
        </draw:connector>
        <draw:connector draw:style-name="gr14" draw:text-style-name="P5" draw:layer="layout" draw:type="line" svg:x1="7.946cm" svg:y1="11.716cm" svg:x2="7.946cm" svg:y2="12.467cm" svg:d="M7946 11716v751" svg:viewBox="0 0 1 752">
          <text:p/>
        </draw:connector>
        <draw:connector draw:style-name="gr14" draw:text-style-name="P5" draw:layer="layout" draw:type="line" svg:x1="8.334cm" svg:y1="11.37cm" svg:x2="9.502cm" svg:y2="11.369cm" svg:d="M8334 11370l1168-1" svg:viewBox="0 0 1169 2">
          <text:p/>
        </draw:connector>
        <draw:connector draw:style-name="gr14" draw:text-style-name="P5" draw:layer="layout" draw:type="line" svg:x1="8.334cm" svg:y1="11.37cm" svg:x2="9.502cm" svg:y2="11.369cm" svg:d="M8334 11370l1168-1" svg:viewBox="0 0 1169 2">
          <text:p/>
        </draw:connector>
        <draw:connector draw:style-name="gr14" draw:text-style-name="P5" draw:layer="layout" draw:type="line" svg:x1="8.333cm" svg:y1="12.844cm" svg:x2="9.501cm" svg:y2="12.843cm" svg:d="M8333 12844l1168-1" svg:viewBox="0 0 1169 2">
          <text:p/>
        </draw:connector>
        <draw:connector draw:style-name="gr14" draw:text-style-name="P5" draw:layer="layout" draw:type="line" svg:x1="8.333cm" svg:y1="12.844cm" svg:x2="9.501cm" svg:y2="12.843cm" svg:d="M8333 12844l1168-1" svg:viewBox="0 0 1169 2">
          <text:p/>
        </draw:connector>
        <draw:connector draw:style-name="gr14" draw:text-style-name="P5" draw:layer="layout" draw:type="line" svg:x1="2.5cm" svg:y1="12.844cm" svg:x2="3.668cm" svg:y2="12.843cm" svg:d="M2500 12844l1168-1" svg:viewBox="0 0 1169 2">
          <text:p/>
        </draw:connector>
        <draw:connector draw:style-name="gr14" draw:text-style-name="P5" draw:layer="layout" draw:type="line" svg:x1="2.5cm" svg:y1="12.844cm" svg:x2="3.668cm" svg:y2="12.843cm" svg:d="M2500 12844l1168-1" svg:viewBox="0 0 1169 2">
          <text:p/>
        </draw:connector>
        <draw:connector draw:style-name="gr14" draw:text-style-name="P5" draw:layer="layout" draw:type="line" svg:x1="2.501cm" svg:y1="11.37cm" svg:x2="3.669cm" svg:y2="11.37cm" svg:d="M2501 11370h1168" svg:viewBox="0 0 1169 1">
          <text:p/>
        </draw:connector>
        <draw:connector draw:style-name="gr14" draw:text-style-name="P5" draw:layer="layout" draw:type="line" svg:x1="2.501cm" svg:y1="11.37cm" svg:x2="3.669cm" svg:y2="11.37cm" svg:d="M2501 11370h1168" svg:viewBox="0 0 1169 1">
          <text:p/>
        </draw:connector>
        <draw:custom-shape draw:style-name="gr15" draw:text-style-name="P6" draw:layer="layout" svg:width="0.776cm" svg:height="0.75cm" svg:x="3.669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xml:id="id31" draw:id="id31" draw:layer="layout" svg:width="0.776cm" svg:height="0.749cm" svg:x="3.669cm" svg:y="12.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5.613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32" draw:id="id32" draw:layer="layout" svg:width="0.777cm" svg:height="0.749cm" svg:x="5.613cm" svg:y="12.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776cm" svg:height="0.749cm" svg:x="3.668cm" svg:y="13.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5.612cm" svg:y="13.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776cm" svg:height="0.749cm" svg:x="7.558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776cm" svg:height="0.749cm" svg:x="7.558cm" svg:y="12.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776cm" svg:height="0.749cm" svg:x="7.557cm" svg:y="13.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 draw:text-style-name="P5" draw:layer="layout" svg:x1="4.057cm" svg:y1="13.218cm" svg:x2="4.057cm" svg:y2="13.969cm" svg:d="M4057 13218v751" svg:viewBox="0 0 1 752">
          <text:p/>
        </draw:connector>
        <draw:connector draw:style-name="gr14" draw:text-style-name="P5" draw:layer="layout" draw:type="line" svg:x1="4.057cm" svg:y1="13.218cm" svg:x2="4.057cm" svg:y2="13.969cm" svg:d="M4057 13218v751" svg:viewBox="0 0 1 752">
          <text:p/>
        </draw:connector>
        <draw:connector draw:style-name="gr14" draw:text-style-name="P5" draw:layer="layout" svg:x1="4.057cm" svg:y1="13.219cm" svg:x2="4.057cm" svg:y2="13.969cm" svg:d="M4057 13219v750" svg:viewBox="0 0 1 751">
          <text:p/>
        </draw:connector>
        <draw:connector draw:style-name="gr14" draw:text-style-name="P5" draw:layer="layout" draw:type="line" svg:x1="6.002cm" svg:y1="11.716cm" svg:x2="6.002cm" svg:y2="12.467cm" svg:d="M6002 11716v751" svg:viewBox="0 0 1 752">
          <text:p/>
        </draw:connector>
        <draw:connector draw:style-name="gr14" draw:text-style-name="P5" draw:layer="layout" svg:x1="6.001cm" svg:y1="13.218cm" svg:x2="6.001cm" svg:y2="13.969cm" svg:d="M6001 13218v751" svg:viewBox="0 0 1 752">
          <text:p/>
        </draw:connector>
        <draw:connector draw:style-name="gr14" draw:text-style-name="P5" draw:layer="layout" draw:type="line" svg:x1="6.001cm" svg:y1="13.218cm" svg:x2="6.001cm" svg:y2="13.969cm" svg:d="M6001 13218v751" svg:viewBox="0 0 1 752">
          <text:p/>
        </draw:connector>
        <draw:connector draw:style-name="gr14" draw:text-style-name="P5" draw:layer="layout" svg:x1="6.001cm" svg:y1="13.219cm" svg:x2="6.001cm" svg:y2="13.969cm" svg:d="M6001 13219v750" svg:viewBox="0 0 1 751">
          <text:p/>
        </draw:connector>
        <draw:connector draw:style-name="gr14" draw:text-style-name="P5" draw:layer="layout" draw:type="line" svg:x1="6.001cm" svg:y1="13.219cm" svg:x2="6.001cm" svg:y2="13.969cm" svg:d="M6001 13219v750" svg:viewBox="0 0 1 751">
          <text:p/>
        </draw:connector>
        <draw:connector draw:style-name="gr14" draw:text-style-name="P5" draw:layer="layout" svg:x1="7.945cm" svg:y1="13.218cm" svg:x2="7.945cm" svg:y2="13.969cm" svg:d="M7945 13218v751" svg:viewBox="0 0 1 752">
          <text:p/>
        </draw:connector>
        <draw:connector draw:style-name="gr14" draw:text-style-name="P5" draw:layer="layout" draw:type="line" svg:x1="7.945cm" svg:y1="13.218cm" svg:x2="7.945cm" svg:y2="13.969cm" svg:d="M7945 13218v751" svg:viewBox="0 0 1 752">
          <text:p/>
        </draw:connector>
        <draw:connector draw:style-name="gr14" draw:text-style-name="P5" draw:layer="layout" svg:x1="7.945cm" svg:y1="13.219cm" svg:x2="7.945cm" svg:y2="13.969cm" svg:d="M7945 13219v750" svg:viewBox="0 0 1 751">
          <text:p/>
        </draw:connector>
        <draw:connector draw:style-name="gr14" draw:text-style-name="P5" draw:layer="layout" draw:type="line" svg:x1="7.945cm" svg:y1="13.219cm" svg:x2="7.945cm" svg:y2="13.969cm" svg:d="M7945 13219v750" svg:viewBox="0 0 1 751">
          <text:p/>
        </draw:connector>
        <draw:connector draw:style-name="gr14" draw:text-style-name="P5" draw:layer="layout" draw:type="line" svg:x1="4.445cm" svg:y1="12.844cm" svg:x2="5.613cm" svg:y2="12.843cm" draw:start-shape="id31" draw:start-glue-point="10" draw:end-shape="id32" draw:end-glue-point="6" svg:d="M4445 12844l1168-1" svg:viewBox="0 0 1169 2">
          <text:p/>
        </draw:connector>
        <draw:connector draw:style-name="gr14" draw:text-style-name="P5" draw:layer="layout" draw:type="line" svg:x1="4.445cm" svg:y1="12.844cm" svg:x2="5.613cm" svg:y2="12.843cm" draw:start-shape="id31" draw:start-glue-point="10" draw:end-shape="id32" draw:end-glue-point="6" svg:d="M4445 12844l1168-1" svg:viewBox="0 0 1169 2">
          <text:p/>
        </draw:connector>
        <draw:connector draw:style-name="gr14" draw:text-style-name="P5" draw:layer="layout" draw:type="line" svg:x1="6.39cm" svg:y1="12.844cm" svg:x2="7.558cm" svg:y2="12.843cm" svg:d="M6390 12844l1168-1" svg:viewBox="0 0 1169 2">
          <text:p/>
        </draw:connector>
        <draw:connector draw:style-name="gr14" draw:text-style-name="P5" draw:layer="layout" draw:type="line" svg:x1="6.39cm" svg:y1="12.844cm" svg:x2="7.558cm" svg:y2="12.843cm" svg:d="M6390 12844l1168-1" svg:viewBox="0 0 1169 2">
          <text:p/>
        </draw:connector>
        <draw:connector draw:style-name="gr14" draw:text-style-name="P5" draw:layer="layout" draw:type="line" svg:x1="4.446cm" svg:y1="11.37cm" svg:x2="5.614cm" svg:y2="11.369cm" svg:d="M4446 11370l1168-1" svg:viewBox="0 0 1169 2">
          <text:p/>
        </draw:connector>
        <draw:connector draw:style-name="gr14" draw:text-style-name="P5" draw:layer="layout" draw:type="line" svg:x1="4.446cm" svg:y1="11.37cm" svg:x2="5.614cm" svg:y2="11.369cm" svg:d="M4446 11370l1168-1" svg:viewBox="0 0 1169 2">
          <text:p/>
        </draw:connector>
        <draw:connector draw:style-name="gr14" draw:text-style-name="P5" draw:layer="layout" draw:type="line" svg:x1="6.391cm" svg:y1="11.37cm" svg:x2="7.558cm" svg:y2="11.37cm" svg:d="M6391 11370h1167" svg:viewBox="0 0 1168 1">
          <text:p/>
        </draw:connector>
        <draw:connector draw:style-name="gr14" draw:text-style-name="P5" draw:layer="layout" draw:type="line" svg:x1="6.391cm" svg:y1="11.37cm" svg:x2="7.558cm" svg:y2="11.37cm" svg:d="M6391 11370h1167" svg:viewBox="0 0 1168 1">
          <text:p/>
        </draw:connector>
        <draw:connector draw:style-name="gr14" draw:text-style-name="P5" draw:layer="layout" draw:type="line" svg:x1="4.057cm" svg:y1="11.716cm" svg:x2="4.057cm" svg:y2="12.467cm" svg:d="M4057 11716v751" svg:viewBox="0 0 1 752">
          <text:p/>
        </draw:connector>
        <draw:connector draw:style-name="gr14" draw:text-style-name="P5" draw:layer="layout" draw:type="line" svg:x1="4.057cm" svg:y1="11.717cm" svg:x2="4.057cm" svg:y2="12.468cm" svg:d="M4057 11717v751" svg:viewBox="0 0 1 752">
          <text:p/>
        </draw:connector>
        <draw:connector draw:style-name="gr14" draw:text-style-name="P5" draw:layer="layout" draw:type="line" svg:x1="7.946cm" svg:y1="11.716cm" svg:x2="7.946cm" svg:y2="12.467cm" svg:d="M7946 11716v751" svg:viewBox="0 0 1 752">
          <text:p/>
        </draw:connector>
        <draw:connector draw:style-name="gr14" draw:text-style-name="P5" draw:layer="layout" draw:type="line" svg:x1="8.334cm" svg:y1="11.37cm" svg:x2="9.502cm" svg:y2="11.369cm" svg:d="M8334 11370l1168-1" svg:viewBox="0 0 1169 2">
          <text:p/>
        </draw:connector>
        <draw:connector draw:style-name="gr14" draw:text-style-name="P5" draw:layer="layout" draw:type="line" svg:x1="8.334cm" svg:y1="11.37cm" svg:x2="9.502cm" svg:y2="11.369cm" svg:d="M8334 11370l1168-1" svg:viewBox="0 0 1169 2">
          <text:p/>
        </draw:connector>
        <draw:connector draw:style-name="gr14" draw:text-style-name="P5" draw:layer="layout" draw:type="line" svg:x1="8.333cm" svg:y1="12.844cm" svg:x2="9.501cm" svg:y2="12.843cm" svg:d="M8333 12844l1168-1" svg:viewBox="0 0 1169 2">
          <text:p/>
        </draw:connector>
        <draw:connector draw:style-name="gr14" draw:text-style-name="P5" draw:layer="layout" draw:type="line" svg:x1="8.333cm" svg:y1="12.844cm" svg:x2="9.501cm" svg:y2="12.843cm" svg:d="M8333 12844l1168-1" svg:viewBox="0 0 1169 2">
          <text:p/>
        </draw:connector>
        <draw:connector draw:style-name="gr14" draw:text-style-name="P5" draw:layer="layout" draw:type="line" svg:x1="2.5cm" svg:y1="12.844cm" svg:x2="3.668cm" svg:y2="12.843cm" svg:d="M2500 12844l1168-1" svg:viewBox="0 0 1169 2">
          <text:p/>
        </draw:connector>
        <draw:connector draw:style-name="gr14" draw:text-style-name="P5" draw:layer="layout" draw:type="line" svg:x1="2.5cm" svg:y1="12.844cm" svg:x2="3.668cm" svg:y2="12.843cm" svg:d="M2500 12844l1168-1" svg:viewBox="0 0 1169 2">
          <text:p/>
        </draw:connector>
        <draw:connector draw:style-name="gr14" draw:text-style-name="P5" draw:layer="layout" draw:type="line" svg:x1="2.501cm" svg:y1="11.37cm" svg:x2="3.669cm" svg:y2="11.37cm" svg:d="M2501 11370h1168" svg:viewBox="0 0 1169 1">
          <text:p/>
        </draw:connector>
        <draw:connector draw:style-name="gr14" draw:text-style-name="P5" draw:layer="layout" draw:type="line" svg:x1="2.501cm" svg:y1="11.37cm" svg:x2="3.669cm" svg:y2="11.37cm" svg:d="M2501 11370h1168" svg:viewBox="0 0 1169 1">
          <text:p/>
        </draw:connector>
        <draw:custom-shape draw:style-name="gr15" draw:text-style-name="P6" draw:layer="layout" svg:width="0.776cm" svg:height="0.75cm" svg:x="3.669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xml:id="id33" draw:id="id33" draw:layer="layout" svg:width="0.776cm" svg:height="0.749cm" svg:x="3.669cm" svg:y="12.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5.613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34" draw:id="id34" draw:layer="layout" svg:width="0.777cm" svg:height="0.749cm" svg:x="5.613cm" svg:y="12.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776cm" svg:height="0.749cm" svg:x="3.668cm" svg:y="13.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5.612cm" svg:y="13.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776cm" svg:height="0.749cm" svg:x="7.558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776cm" svg:height="0.749cm" svg:x="7.558cm" svg:y="12.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776cm" svg:height="0.749cm" svg:x="7.557cm" svg:y="13.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 draw:text-style-name="P5" draw:layer="layout" svg:x1="4.057cm" svg:y1="13.218cm" svg:x2="4.057cm" svg:y2="13.969cm" svg:d="M4057 13218v751" svg:viewBox="0 0 1 752">
          <text:p/>
        </draw:connector>
        <draw:connector draw:style-name="gr14" draw:text-style-name="P5" draw:layer="layout" draw:type="line" svg:x1="4.057cm" svg:y1="13.218cm" svg:x2="4.057cm" svg:y2="13.969cm" svg:d="M4057 13218v751" svg:viewBox="0 0 1 752">
          <text:p/>
        </draw:connector>
        <draw:connector draw:style-name="gr14" draw:text-style-name="P5" draw:layer="layout" svg:x1="4.057cm" svg:y1="13.219cm" svg:x2="4.057cm" svg:y2="13.969cm" svg:d="M4057 13219v750" svg:viewBox="0 0 1 751">
          <text:p/>
        </draw:connector>
        <draw:connector draw:style-name="gr14" draw:text-style-name="P5" draw:layer="layout" draw:type="line" svg:x1="6.002cm" svg:y1="11.716cm" svg:x2="6.002cm" svg:y2="12.467cm" svg:d="M6002 11716v751" svg:viewBox="0 0 1 752">
          <text:p/>
        </draw:connector>
        <draw:connector draw:style-name="gr14" draw:text-style-name="P5" draw:layer="layout" svg:x1="6.001cm" svg:y1="13.218cm" svg:x2="6.001cm" svg:y2="13.969cm" svg:d="M6001 13218v751" svg:viewBox="0 0 1 752">
          <text:p/>
        </draw:connector>
        <draw:connector draw:style-name="gr14" draw:text-style-name="P5" draw:layer="layout" draw:type="line" svg:x1="6.001cm" svg:y1="13.218cm" svg:x2="6.001cm" svg:y2="13.969cm" svg:d="M6001 13218v751" svg:viewBox="0 0 1 752">
          <text:p/>
        </draw:connector>
        <draw:connector draw:style-name="gr14" draw:text-style-name="P5" draw:layer="layout" svg:x1="6.001cm" svg:y1="13.219cm" svg:x2="6.001cm" svg:y2="13.969cm" svg:d="M6001 13219v750" svg:viewBox="0 0 1 751">
          <text:p/>
        </draw:connector>
        <draw:connector draw:style-name="gr14" draw:text-style-name="P5" draw:layer="layout" draw:type="line" svg:x1="6.001cm" svg:y1="13.219cm" svg:x2="6.001cm" svg:y2="13.969cm" svg:d="M6001 13219v750" svg:viewBox="0 0 1 751">
          <text:p/>
        </draw:connector>
        <draw:connector draw:style-name="gr14" draw:text-style-name="P5" draw:layer="layout" svg:x1="7.945cm" svg:y1="13.218cm" svg:x2="7.945cm" svg:y2="13.969cm" svg:d="M7945 13218v751" svg:viewBox="0 0 1 752">
          <text:p/>
        </draw:connector>
        <draw:connector draw:style-name="gr14" draw:text-style-name="P5" draw:layer="layout" draw:type="line" svg:x1="7.945cm" svg:y1="13.218cm" svg:x2="7.945cm" svg:y2="13.969cm" svg:d="M7945 13218v751" svg:viewBox="0 0 1 752">
          <text:p/>
        </draw:connector>
        <draw:connector draw:style-name="gr14" draw:text-style-name="P5" draw:layer="layout" svg:x1="7.945cm" svg:y1="13.219cm" svg:x2="7.945cm" svg:y2="13.969cm" svg:d="M7945 13219v750" svg:viewBox="0 0 1 751">
          <text:p/>
        </draw:connector>
        <draw:connector draw:style-name="gr14" draw:text-style-name="P5" draw:layer="layout" draw:type="line" svg:x1="7.945cm" svg:y1="13.219cm" svg:x2="7.945cm" svg:y2="13.969cm" svg:d="M7945 13219v750" svg:viewBox="0 0 1 751">
          <text:p/>
        </draw:connector>
        <draw:connector draw:style-name="gr14" draw:text-style-name="P5" draw:layer="layout" draw:type="line" svg:x1="4.445cm" svg:y1="12.844cm" svg:x2="5.613cm" svg:y2="12.843cm" draw:start-shape="id33" draw:start-glue-point="10" draw:end-shape="id34" draw:end-glue-point="6" svg:d="M4445 12844l1168-1" svg:viewBox="0 0 1169 2">
          <text:p/>
        </draw:connector>
        <draw:connector draw:style-name="gr14" draw:text-style-name="P5" draw:layer="layout" draw:type="line" svg:x1="4.445cm" svg:y1="12.844cm" svg:x2="5.613cm" svg:y2="12.843cm" draw:start-shape="id33" draw:start-glue-point="10" draw:end-shape="id34" draw:end-glue-point="6" svg:d="M4445 12844l1168-1" svg:viewBox="0 0 1169 2">
          <text:p/>
        </draw:connector>
        <draw:connector draw:style-name="gr14" draw:text-style-name="P5" draw:layer="layout" draw:type="line" svg:x1="6.39cm" svg:y1="12.844cm" svg:x2="7.558cm" svg:y2="12.843cm" svg:d="M6390 12844l1168-1" svg:viewBox="0 0 1169 2">
          <text:p/>
        </draw:connector>
        <draw:connector draw:style-name="gr14" draw:text-style-name="P5" draw:layer="layout" draw:type="line" svg:x1="6.39cm" svg:y1="12.844cm" svg:x2="7.558cm" svg:y2="12.843cm" svg:d="M6390 12844l1168-1" svg:viewBox="0 0 1169 2">
          <text:p/>
        </draw:connector>
        <draw:connector draw:style-name="gr14" draw:text-style-name="P5" draw:layer="layout" draw:type="line" svg:x1="4.446cm" svg:y1="11.37cm" svg:x2="5.614cm" svg:y2="11.369cm" svg:d="M4446 11370l1168-1" svg:viewBox="0 0 1169 2">
          <text:p/>
        </draw:connector>
        <draw:connector draw:style-name="gr14" draw:text-style-name="P5" draw:layer="layout" draw:type="line" svg:x1="4.446cm" svg:y1="11.37cm" svg:x2="5.614cm" svg:y2="11.369cm" svg:d="M4446 11370l1168-1" svg:viewBox="0 0 1169 2">
          <text:p/>
        </draw:connector>
        <draw:connector draw:style-name="gr14" draw:text-style-name="P5" draw:layer="layout" draw:type="line" svg:x1="6.391cm" svg:y1="11.37cm" svg:x2="7.558cm" svg:y2="11.37cm" svg:d="M6391 11370h1167" svg:viewBox="0 0 1168 1">
          <text:p/>
        </draw:connector>
        <draw:connector draw:style-name="gr14" draw:text-style-name="P5" draw:layer="layout" draw:type="line" svg:x1="6.391cm" svg:y1="11.37cm" svg:x2="7.558cm" svg:y2="11.37cm" svg:d="M6391 11370h1167" svg:viewBox="0 0 1168 1">
          <text:p/>
        </draw:connector>
        <draw:connector draw:style-name="gr14" draw:text-style-name="P5" draw:layer="layout" draw:type="line" svg:x1="4.057cm" svg:y1="11.716cm" svg:x2="4.057cm" svg:y2="12.467cm" svg:d="M4057 11716v751" svg:viewBox="0 0 1 752">
          <text:p/>
        </draw:connector>
        <draw:connector draw:style-name="gr14" draw:text-style-name="P5" draw:layer="layout" draw:type="line" svg:x1="4.057cm" svg:y1="11.717cm" svg:x2="4.057cm" svg:y2="12.468cm" svg:d="M4057 11717v751" svg:viewBox="0 0 1 752">
          <text:p/>
        </draw:connector>
        <draw:connector draw:style-name="gr14" draw:text-style-name="P5" draw:layer="layout" draw:type="line" svg:x1="7.946cm" svg:y1="11.716cm" svg:x2="7.946cm" svg:y2="12.467cm" svg:d="M7946 11716v751" svg:viewBox="0 0 1 752">
          <text:p/>
        </draw:connector>
        <draw:connector draw:style-name="gr14" draw:text-style-name="P5" draw:layer="layout" draw:type="line" svg:x1="8.334cm" svg:y1="11.37cm" svg:x2="9.502cm" svg:y2="11.369cm" svg:d="M8334 11370l1168-1" svg:viewBox="0 0 1169 2">
          <text:p/>
        </draw:connector>
        <draw:connector draw:style-name="gr14" draw:text-style-name="P5" draw:layer="layout" draw:type="line" svg:x1="8.334cm" svg:y1="11.37cm" svg:x2="9.502cm" svg:y2="11.369cm" svg:d="M8334 11370l1168-1" svg:viewBox="0 0 1169 2">
          <text:p/>
        </draw:connector>
        <draw:connector draw:style-name="gr14" draw:text-style-name="P5" draw:layer="layout" draw:type="line" svg:x1="8.333cm" svg:y1="12.844cm" svg:x2="9.501cm" svg:y2="12.843cm" svg:d="M8333 12844l1168-1" svg:viewBox="0 0 1169 2">
          <text:p/>
        </draw:connector>
        <draw:connector draw:style-name="gr14" draw:text-style-name="P5" draw:layer="layout" draw:type="line" svg:x1="8.333cm" svg:y1="12.844cm" svg:x2="9.501cm" svg:y2="12.843cm" svg:d="M8333 12844l1168-1" svg:viewBox="0 0 1169 2">
          <text:p/>
        </draw:connector>
        <draw:connector draw:style-name="gr14" draw:text-style-name="P5" draw:layer="layout" draw:type="line" svg:x1="2.5cm" svg:y1="12.844cm" svg:x2="3.668cm" svg:y2="12.843cm" svg:d="M2500 12844l1168-1" svg:viewBox="0 0 1169 2">
          <text:p/>
        </draw:connector>
        <draw:connector draw:style-name="gr14" draw:text-style-name="P5" draw:layer="layout" draw:type="line" svg:x1="2.5cm" svg:y1="12.844cm" svg:x2="3.668cm" svg:y2="12.843cm" svg:d="M2500 12844l1168-1" svg:viewBox="0 0 1169 2">
          <text:p/>
        </draw:connector>
        <draw:connector draw:style-name="gr14" draw:text-style-name="P5" draw:layer="layout" draw:type="line" svg:x1="2.501cm" svg:y1="11.37cm" svg:x2="3.669cm" svg:y2="11.37cm" svg:d="M2501 11370h1168" svg:viewBox="0 0 1169 1">
          <text:p/>
        </draw:connector>
        <draw:connector draw:style-name="gr14" draw:text-style-name="P5" draw:layer="layout" draw:type="line" svg:x1="2.501cm" svg:y1="11.37cm" svg:x2="3.669cm" svg:y2="11.37cm" svg:d="M2501 11370h1168" svg:viewBox="0 0 1169 1">
          <text:p/>
        </draw:connector>
        <draw:custom-shape draw:style-name="gr15" draw:text-style-name="P6" draw:layer="layout" svg:width="0.776cm" svg:height="0.75cm" svg:x="3.669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xml:id="id35" draw:id="id35" draw:layer="layout" svg:width="0.776cm" svg:height="0.749cm" svg:x="3.669cm" svg:y="12.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5.613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36" draw:id="id36" draw:layer="layout" svg:width="0.777cm" svg:height="0.749cm" svg:x="5.613cm" svg:y="12.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776cm" svg:height="0.749cm" svg:x="3.668cm" svg:y="13.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5.612cm" svg:y="13.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776cm" svg:height="0.749cm" svg:x="7.558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776cm" svg:height="0.749cm" svg:x="7.558cm" svg:y="12.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776cm" svg:height="0.749cm" svg:x="7.557cm" svg:y="13.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 draw:text-style-name="P5" draw:layer="layout" svg:x1="4.057cm" svg:y1="13.218cm" svg:x2="4.057cm" svg:y2="13.969cm" svg:d="M4057 13218v751" svg:viewBox="0 0 1 752">
          <text:p/>
        </draw:connector>
        <draw:connector draw:style-name="gr14" draw:text-style-name="P5" draw:layer="layout" draw:type="line" svg:x1="4.057cm" svg:y1="13.218cm" svg:x2="4.057cm" svg:y2="13.969cm" svg:d="M4057 13218v751" svg:viewBox="0 0 1 752">
          <text:p/>
        </draw:connector>
        <draw:connector draw:style-name="gr14" draw:text-style-name="P5" draw:layer="layout" svg:x1="4.057cm" svg:y1="13.219cm" svg:x2="4.057cm" svg:y2="13.969cm" svg:d="M4057 13219v750" svg:viewBox="0 0 1 751">
          <text:p/>
        </draw:connector>
        <draw:connector draw:style-name="gr14" draw:text-style-name="P5" draw:layer="layout" draw:type="line" svg:x1="6.002cm" svg:y1="11.716cm" svg:x2="6.002cm" svg:y2="12.467cm" svg:d="M6002 11716v751" svg:viewBox="0 0 1 752">
          <text:p/>
        </draw:connector>
        <draw:connector draw:style-name="gr14" draw:text-style-name="P5" draw:layer="layout" svg:x1="6.001cm" svg:y1="13.218cm" svg:x2="6.001cm" svg:y2="13.969cm" svg:d="M6001 13218v751" svg:viewBox="0 0 1 752">
          <text:p/>
        </draw:connector>
        <draw:connector draw:style-name="gr14" draw:text-style-name="P5" draw:layer="layout" draw:type="line" svg:x1="6.001cm" svg:y1="13.218cm" svg:x2="6.001cm" svg:y2="13.969cm" svg:d="M6001 13218v751" svg:viewBox="0 0 1 752">
          <text:p/>
        </draw:connector>
        <draw:connector draw:style-name="gr14" draw:text-style-name="P5" draw:layer="layout" svg:x1="6.001cm" svg:y1="13.219cm" svg:x2="6.001cm" svg:y2="13.969cm" svg:d="M6001 13219v750" svg:viewBox="0 0 1 751">
          <text:p/>
        </draw:connector>
        <draw:connector draw:style-name="gr14" draw:text-style-name="P5" draw:layer="layout" draw:type="line" svg:x1="6.001cm" svg:y1="13.219cm" svg:x2="6.001cm" svg:y2="13.969cm" svg:d="M6001 13219v750" svg:viewBox="0 0 1 751">
          <text:p/>
        </draw:connector>
        <draw:connector draw:style-name="gr14" draw:text-style-name="P5" draw:layer="layout" svg:x1="7.945cm" svg:y1="13.218cm" svg:x2="7.945cm" svg:y2="13.969cm" svg:d="M7945 13218v751" svg:viewBox="0 0 1 752">
          <text:p/>
        </draw:connector>
        <draw:connector draw:style-name="gr14" draw:text-style-name="P5" draw:layer="layout" draw:type="line" svg:x1="7.945cm" svg:y1="13.218cm" svg:x2="7.945cm" svg:y2="13.969cm" svg:d="M7945 13218v751" svg:viewBox="0 0 1 752">
          <text:p/>
        </draw:connector>
        <draw:connector draw:style-name="gr14" draw:text-style-name="P5" draw:layer="layout" svg:x1="7.945cm" svg:y1="13.219cm" svg:x2="7.945cm" svg:y2="13.969cm" svg:d="M7945 13219v750" svg:viewBox="0 0 1 751">
          <text:p/>
        </draw:connector>
        <draw:connector draw:style-name="gr14" draw:text-style-name="P5" draw:layer="layout" draw:type="line" svg:x1="7.945cm" svg:y1="13.219cm" svg:x2="7.945cm" svg:y2="13.969cm" svg:d="M7945 13219v750" svg:viewBox="0 0 1 751">
          <text:p/>
        </draw:connector>
        <draw:connector draw:style-name="gr14" draw:text-style-name="P5" draw:layer="layout" draw:type="line" svg:x1="4.445cm" svg:y1="12.844cm" svg:x2="5.613cm" svg:y2="12.843cm" draw:start-shape="id35" draw:start-glue-point="10" draw:end-shape="id36" draw:end-glue-point="6" svg:d="M4445 12844l1168-1" svg:viewBox="0 0 1169 2">
          <text:p/>
        </draw:connector>
        <draw:connector draw:style-name="gr14" draw:text-style-name="P5" draw:layer="layout" draw:type="line" svg:x1="4.445cm" svg:y1="12.844cm" svg:x2="5.613cm" svg:y2="12.843cm" draw:start-shape="id35" draw:start-glue-point="10" draw:end-shape="id36" draw:end-glue-point="6" svg:d="M4445 12844l1168-1" svg:viewBox="0 0 1169 2">
          <text:p/>
        </draw:connector>
        <draw:connector draw:style-name="gr14" draw:text-style-name="P5" draw:layer="layout" draw:type="line" svg:x1="6.39cm" svg:y1="12.844cm" svg:x2="7.558cm" svg:y2="12.843cm" svg:d="M6390 12844l1168-1" svg:viewBox="0 0 1169 2">
          <text:p/>
        </draw:connector>
        <draw:connector draw:style-name="gr14" draw:text-style-name="P5" draw:layer="layout" draw:type="line" svg:x1="6.39cm" svg:y1="12.844cm" svg:x2="7.558cm" svg:y2="12.843cm" svg:d="M6390 12844l1168-1" svg:viewBox="0 0 1169 2">
          <text:p/>
        </draw:connector>
        <draw:connector draw:style-name="gr14" draw:text-style-name="P5" draw:layer="layout" draw:type="line" svg:x1="4.446cm" svg:y1="11.37cm" svg:x2="5.614cm" svg:y2="11.369cm" svg:d="M4446 11370l1168-1" svg:viewBox="0 0 1169 2">
          <text:p/>
        </draw:connector>
        <draw:connector draw:style-name="gr14" draw:text-style-name="P5" draw:layer="layout" draw:type="line" svg:x1="4.446cm" svg:y1="11.37cm" svg:x2="5.614cm" svg:y2="11.369cm" svg:d="M4446 11370l1168-1" svg:viewBox="0 0 1169 2">
          <text:p/>
        </draw:connector>
        <draw:connector draw:style-name="gr14" draw:text-style-name="P5" draw:layer="layout" draw:type="line" svg:x1="6.391cm" svg:y1="11.37cm" svg:x2="7.558cm" svg:y2="11.37cm" svg:d="M6391 11370h1167" svg:viewBox="0 0 1168 1">
          <text:p/>
        </draw:connector>
        <draw:connector draw:style-name="gr14" draw:text-style-name="P5" draw:layer="layout" draw:type="line" svg:x1="6.391cm" svg:y1="11.37cm" svg:x2="7.558cm" svg:y2="11.37cm" svg:d="M6391 11370h1167" svg:viewBox="0 0 1168 1">
          <text:p/>
        </draw:connector>
        <draw:connector draw:style-name="gr14" draw:text-style-name="P5" draw:layer="layout" draw:type="line" svg:x1="4.057cm" svg:y1="11.716cm" svg:x2="4.057cm" svg:y2="12.467cm" svg:d="M4057 11716v751" svg:viewBox="0 0 1 752">
          <text:p/>
        </draw:connector>
        <draw:connector draw:style-name="gr14" draw:text-style-name="P5" draw:layer="layout" draw:type="line" svg:x1="4.057cm" svg:y1="11.717cm" svg:x2="4.057cm" svg:y2="12.468cm" svg:d="M4057 11717v751" svg:viewBox="0 0 1 752">
          <text:p/>
        </draw:connector>
        <draw:connector draw:style-name="gr14" draw:text-style-name="P5" draw:layer="layout" draw:type="line" svg:x1="7.946cm" svg:y1="11.716cm" svg:x2="7.946cm" svg:y2="12.467cm" svg:d="M7946 11716v751" svg:viewBox="0 0 1 752">
          <text:p/>
        </draw:connector>
        <draw:connector draw:style-name="gr14" draw:text-style-name="P5" draw:layer="layout" draw:type="line" svg:x1="8.334cm" svg:y1="11.37cm" svg:x2="9.502cm" svg:y2="11.369cm" svg:d="M8334 11370l1168-1" svg:viewBox="0 0 1169 2">
          <text:p/>
        </draw:connector>
        <draw:connector draw:style-name="gr14" draw:text-style-name="P5" draw:layer="layout" draw:type="line" svg:x1="8.334cm" svg:y1="11.37cm" svg:x2="9.502cm" svg:y2="11.369cm" svg:d="M8334 11370l1168-1" svg:viewBox="0 0 1169 2">
          <text:p/>
        </draw:connector>
        <draw:connector draw:style-name="gr14" draw:text-style-name="P5" draw:layer="layout" draw:type="line" svg:x1="8.333cm" svg:y1="12.844cm" svg:x2="9.501cm" svg:y2="12.843cm" svg:d="M8333 12844l1168-1" svg:viewBox="0 0 1169 2">
          <text:p/>
        </draw:connector>
        <draw:connector draw:style-name="gr14" draw:text-style-name="P5" draw:layer="layout" draw:type="line" svg:x1="8.333cm" svg:y1="12.844cm" svg:x2="9.501cm" svg:y2="12.843cm" svg:d="M8333 12844l1168-1" svg:viewBox="0 0 1169 2">
          <text:p/>
        </draw:connector>
        <draw:connector draw:style-name="gr14" draw:text-style-name="P5" draw:layer="layout" draw:type="line" svg:x1="2.5cm" svg:y1="12.844cm" svg:x2="3.668cm" svg:y2="12.843cm" svg:d="M2500 12844l1168-1" svg:viewBox="0 0 1169 2">
          <text:p/>
        </draw:connector>
        <draw:connector draw:style-name="gr14" draw:text-style-name="P5" draw:layer="layout" draw:type="line" svg:x1="2.5cm" svg:y1="12.844cm" svg:x2="3.668cm" svg:y2="12.843cm" svg:d="M2500 12844l1168-1" svg:viewBox="0 0 1169 2">
          <text:p/>
        </draw:connector>
        <draw:connector draw:style-name="gr14" draw:text-style-name="P5" draw:layer="layout" draw:type="line" svg:x1="2.501cm" svg:y1="11.37cm" svg:x2="3.669cm" svg:y2="11.37cm" svg:d="M2501 11370h1168" svg:viewBox="0 0 1169 1">
          <text:p/>
        </draw:connector>
        <draw:connector draw:style-name="gr14" draw:text-style-name="P5" draw:layer="layout" draw:type="line" svg:x1="2.501cm" svg:y1="11.37cm" svg:x2="3.669cm" svg:y2="11.37cm" svg:d="M2501 11370h1168" svg:viewBox="0 0 1169 1">
          <text:p/>
        </draw:connector>
        <draw:custom-shape draw:style-name="gr15" draw:text-style-name="P6" draw:layer="layout" svg:width="0.776cm" svg:height="0.75cm" svg:x="3.669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xml:id="id37" draw:id="id37" draw:layer="layout" svg:width="0.776cm" svg:height="0.749cm" svg:x="3.669cm" svg:y="12.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5.613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38" draw:id="id38" draw:layer="layout" svg:width="0.777cm" svg:height="0.749cm" svg:x="5.613cm" svg:y="12.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776cm" svg:height="0.749cm" svg:x="3.668cm" svg:y="13.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5.612cm" svg:y="13.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776cm" svg:height="0.749cm" svg:x="7.558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776cm" svg:height="0.749cm" svg:x="7.558cm" svg:y="12.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776cm" svg:height="0.749cm" svg:x="7.557cm" svg:y="13.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 draw:text-style-name="P5" draw:layer="layout" svg:x1="4.057cm" svg:y1="13.218cm" svg:x2="4.057cm" svg:y2="13.969cm" svg:d="M4057 13218v751" svg:viewBox="0 0 1 752">
          <text:p/>
        </draw:connector>
        <draw:connector draw:style-name="gr14" draw:text-style-name="P5" draw:layer="layout" draw:type="line" svg:x1="4.057cm" svg:y1="13.218cm" svg:x2="4.057cm" svg:y2="13.969cm" svg:d="M4057 13218v751" svg:viewBox="0 0 1 752">
          <text:p/>
        </draw:connector>
        <draw:connector draw:style-name="gr14" draw:text-style-name="P5" draw:layer="layout" svg:x1="4.057cm" svg:y1="13.219cm" svg:x2="4.057cm" svg:y2="13.969cm" svg:d="M4057 13219v750" svg:viewBox="0 0 1 751">
          <text:p/>
        </draw:connector>
        <draw:connector draw:style-name="gr14" draw:text-style-name="P5" draw:layer="layout" draw:type="line" svg:x1="6.002cm" svg:y1="11.716cm" svg:x2="6.002cm" svg:y2="12.467cm" svg:d="M6002 11716v751" svg:viewBox="0 0 1 752">
          <text:p/>
        </draw:connector>
        <draw:connector draw:style-name="gr14" draw:text-style-name="P5" draw:layer="layout" svg:x1="6.001cm" svg:y1="13.218cm" svg:x2="6.001cm" svg:y2="13.969cm" svg:d="M6001 13218v751" svg:viewBox="0 0 1 752">
          <text:p/>
        </draw:connector>
        <draw:connector draw:style-name="gr14" draw:text-style-name="P5" draw:layer="layout" draw:type="line" svg:x1="6.001cm" svg:y1="13.218cm" svg:x2="6.001cm" svg:y2="13.969cm" svg:d="M6001 13218v751" svg:viewBox="0 0 1 752">
          <text:p/>
        </draw:connector>
        <draw:connector draw:style-name="gr14" draw:text-style-name="P5" draw:layer="layout" svg:x1="6.001cm" svg:y1="13.219cm" svg:x2="6.001cm" svg:y2="13.969cm" svg:d="M6001 13219v750" svg:viewBox="0 0 1 751">
          <text:p/>
        </draw:connector>
        <draw:connector draw:style-name="gr14" draw:text-style-name="P5" draw:layer="layout" draw:type="line" svg:x1="6.001cm" svg:y1="13.219cm" svg:x2="6.001cm" svg:y2="13.969cm" svg:d="M6001 13219v750" svg:viewBox="0 0 1 751">
          <text:p/>
        </draw:connector>
        <draw:connector draw:style-name="gr14" draw:text-style-name="P5" draw:layer="layout" svg:x1="7.945cm" svg:y1="13.218cm" svg:x2="7.945cm" svg:y2="13.969cm" svg:d="M7945 13218v751" svg:viewBox="0 0 1 752">
          <text:p/>
        </draw:connector>
        <draw:connector draw:style-name="gr14" draw:text-style-name="P5" draw:layer="layout" draw:type="line" svg:x1="7.945cm" svg:y1="13.218cm" svg:x2="7.945cm" svg:y2="13.969cm" svg:d="M7945 13218v751" svg:viewBox="0 0 1 752">
          <text:p/>
        </draw:connector>
        <draw:connector draw:style-name="gr14" draw:text-style-name="P5" draw:layer="layout" svg:x1="7.945cm" svg:y1="13.219cm" svg:x2="7.945cm" svg:y2="13.969cm" svg:d="M7945 13219v750" svg:viewBox="0 0 1 751">
          <text:p/>
        </draw:connector>
        <draw:connector draw:style-name="gr14" draw:text-style-name="P5" draw:layer="layout" draw:type="line" svg:x1="7.945cm" svg:y1="13.219cm" svg:x2="7.945cm" svg:y2="13.969cm" svg:d="M7945 13219v750" svg:viewBox="0 0 1 751">
          <text:p/>
        </draw:connector>
        <draw:connector draw:style-name="gr14" draw:text-style-name="P5" draw:layer="layout" draw:type="line" svg:x1="4.445cm" svg:y1="12.844cm" svg:x2="5.613cm" svg:y2="12.843cm" draw:start-shape="id37" draw:start-glue-point="10" draw:end-shape="id38" draw:end-glue-point="6" svg:d="M4445 12844l1168-1" svg:viewBox="0 0 1169 2">
          <text:p/>
        </draw:connector>
        <draw:connector draw:style-name="gr14" draw:text-style-name="P5" draw:layer="layout" draw:type="line" svg:x1="4.445cm" svg:y1="12.844cm" svg:x2="5.613cm" svg:y2="12.843cm" draw:start-shape="id37" draw:start-glue-point="10" draw:end-shape="id38" draw:end-glue-point="6" svg:d="M4445 12844l1168-1" svg:viewBox="0 0 1169 2">
          <text:p/>
        </draw:connector>
        <draw:connector draw:style-name="gr14" draw:text-style-name="P5" draw:layer="layout" draw:type="line" svg:x1="6.39cm" svg:y1="12.844cm" svg:x2="7.558cm" svg:y2="12.843cm" svg:d="M6390 12844l1168-1" svg:viewBox="0 0 1169 2">
          <text:p/>
        </draw:connector>
        <draw:connector draw:style-name="gr14" draw:text-style-name="P5" draw:layer="layout" draw:type="line" svg:x1="6.39cm" svg:y1="12.844cm" svg:x2="7.558cm" svg:y2="12.843cm" svg:d="M6390 12844l1168-1" svg:viewBox="0 0 1169 2">
          <text:p/>
        </draw:connector>
        <draw:connector draw:style-name="gr14" draw:text-style-name="P5" draw:layer="layout" draw:type="line" svg:x1="4.446cm" svg:y1="11.37cm" svg:x2="5.614cm" svg:y2="11.369cm" svg:d="M4446 11370l1168-1" svg:viewBox="0 0 1169 2">
          <text:p/>
        </draw:connector>
        <draw:connector draw:style-name="gr14" draw:text-style-name="P5" draw:layer="layout" draw:type="line" svg:x1="4.446cm" svg:y1="11.37cm" svg:x2="5.614cm" svg:y2="11.369cm" svg:d="M4446 11370l1168-1" svg:viewBox="0 0 1169 2">
          <text:p/>
        </draw:connector>
        <draw:connector draw:style-name="gr14" draw:text-style-name="P5" draw:layer="layout" draw:type="line" svg:x1="6.391cm" svg:y1="11.37cm" svg:x2="7.558cm" svg:y2="11.37cm" svg:d="M6391 11370h1167" svg:viewBox="0 0 1168 1">
          <text:p/>
        </draw:connector>
        <draw:connector draw:style-name="gr14" draw:text-style-name="P5" draw:layer="layout" draw:type="line" svg:x1="6.391cm" svg:y1="11.37cm" svg:x2="7.558cm" svg:y2="11.37cm" svg:d="M6391 11370h1167" svg:viewBox="0 0 1168 1">
          <text:p/>
        </draw:connector>
        <draw:connector draw:style-name="gr14" draw:text-style-name="P5" draw:layer="layout" draw:type="line" svg:x1="4.057cm" svg:y1="11.716cm" svg:x2="4.057cm" svg:y2="12.467cm" svg:d="M4057 11716v751" svg:viewBox="0 0 1 752">
          <text:p/>
        </draw:connector>
        <draw:connector draw:style-name="gr14" draw:text-style-name="P5" draw:layer="layout" draw:type="line" svg:x1="4.057cm" svg:y1="11.717cm" svg:x2="4.057cm" svg:y2="12.468cm" svg:d="M4057 11717v751" svg:viewBox="0 0 1 752">
          <text:p/>
        </draw:connector>
        <draw:connector draw:style-name="gr14" draw:text-style-name="P5" draw:layer="layout" draw:type="line" svg:x1="7.946cm" svg:y1="11.716cm" svg:x2="7.946cm" svg:y2="12.467cm" svg:d="M7946 11716v751" svg:viewBox="0 0 1 752">
          <text:p/>
        </draw:connector>
        <draw:connector draw:style-name="gr14" draw:text-style-name="P5" draw:layer="layout" draw:type="line" svg:x1="8.334cm" svg:y1="11.37cm" svg:x2="9.502cm" svg:y2="11.369cm" svg:d="M8334 11370l1168-1" svg:viewBox="0 0 1169 2">
          <text:p/>
        </draw:connector>
        <draw:connector draw:style-name="gr14" draw:text-style-name="P5" draw:layer="layout" draw:type="line" svg:x1="8.334cm" svg:y1="11.37cm" svg:x2="9.502cm" svg:y2="11.369cm" svg:d="M8334 11370l1168-1" svg:viewBox="0 0 1169 2">
          <text:p/>
        </draw:connector>
        <draw:connector draw:style-name="gr14" draw:text-style-name="P5" draw:layer="layout" draw:type="line" svg:x1="8.333cm" svg:y1="12.844cm" svg:x2="9.501cm" svg:y2="12.843cm" svg:d="M8333 12844l1168-1" svg:viewBox="0 0 1169 2">
          <text:p/>
        </draw:connector>
        <draw:connector draw:style-name="gr14" draw:text-style-name="P5" draw:layer="layout" draw:type="line" svg:x1="8.333cm" svg:y1="12.844cm" svg:x2="9.501cm" svg:y2="12.843cm" svg:d="M8333 12844l1168-1" svg:viewBox="0 0 1169 2">
          <text:p/>
        </draw:connector>
        <draw:connector draw:style-name="gr14" draw:text-style-name="P5" draw:layer="layout" draw:type="line" svg:x1="2.5cm" svg:y1="12.844cm" svg:x2="3.668cm" svg:y2="12.843cm" svg:d="M2500 12844l1168-1" svg:viewBox="0 0 1169 2">
          <text:p/>
        </draw:connector>
        <draw:connector draw:style-name="gr14" draw:text-style-name="P5" draw:layer="layout" draw:type="line" svg:x1="2.5cm" svg:y1="12.844cm" svg:x2="3.668cm" svg:y2="12.843cm" svg:d="M2500 12844l1168-1" svg:viewBox="0 0 1169 2">
          <text:p/>
        </draw:connector>
        <draw:connector draw:style-name="gr14" draw:text-style-name="P5" draw:layer="layout" draw:type="line" svg:x1="2.501cm" svg:y1="11.37cm" svg:x2="3.669cm" svg:y2="11.37cm" svg:d="M2501 11370h1168" svg:viewBox="0 0 1169 1">
          <text:p/>
        </draw:connector>
        <draw:connector draw:style-name="gr14" draw:text-style-name="P5" draw:layer="layout" draw:type="line" svg:x1="2.501cm" svg:y1="11.37cm" svg:x2="3.669cm" svg:y2="11.37cm" svg:d="M2501 11370h1168" svg:viewBox="0 0 1169 1">
          <text:p/>
        </draw:connector>
        <draw:custom-shape draw:style-name="gr15" draw:text-style-name="P6" draw:layer="layout" svg:width="0.776cm" svg:height="0.75cm" svg:x="3.669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xml:id="id39" draw:id="id39" draw:layer="layout" svg:width="0.776cm" svg:height="0.749cm" svg:x="3.669cm" svg:y="12.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5.613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40" draw:id="id40" draw:layer="layout" svg:width="0.777cm" svg:height="0.749cm" svg:x="5.613cm" svg:y="12.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776cm" svg:height="0.749cm" svg:x="3.668cm" svg:y="13.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5.612cm" svg:y="13.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776cm" svg:height="0.749cm" svg:x="7.558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776cm" svg:height="0.749cm" svg:x="7.558cm" svg:y="12.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776cm" svg:height="0.749cm" svg:x="7.557cm" svg:y="13.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 draw:text-style-name="P5" draw:layer="layout" svg:x1="4.057cm" svg:y1="13.218cm" svg:x2="4.057cm" svg:y2="13.969cm" svg:d="M4057 13218v751" svg:viewBox="0 0 1 752">
          <text:p/>
        </draw:connector>
        <draw:connector draw:style-name="gr14" draw:text-style-name="P5" draw:layer="layout" draw:type="line" svg:x1="4.057cm" svg:y1="13.218cm" svg:x2="4.057cm" svg:y2="13.969cm" svg:d="M4057 13218v751" svg:viewBox="0 0 1 752">
          <text:p/>
        </draw:connector>
        <draw:connector draw:style-name="gr14" draw:text-style-name="P5" draw:layer="layout" svg:x1="4.057cm" svg:y1="13.219cm" svg:x2="4.057cm" svg:y2="13.969cm" svg:d="M4057 13219v750" svg:viewBox="0 0 1 751">
          <text:p/>
        </draw:connector>
        <draw:connector draw:style-name="gr14" draw:text-style-name="P5" draw:layer="layout" draw:type="line" svg:x1="6.002cm" svg:y1="11.716cm" svg:x2="6.002cm" svg:y2="12.467cm" svg:d="M6002 11716v751" svg:viewBox="0 0 1 752">
          <text:p/>
        </draw:connector>
        <draw:connector draw:style-name="gr14" draw:text-style-name="P5" draw:layer="layout" svg:x1="6.001cm" svg:y1="13.218cm" svg:x2="6.001cm" svg:y2="13.969cm" svg:d="M6001 13218v751" svg:viewBox="0 0 1 752">
          <text:p/>
        </draw:connector>
        <draw:connector draw:style-name="gr14" draw:text-style-name="P5" draw:layer="layout" draw:type="line" svg:x1="6.001cm" svg:y1="13.218cm" svg:x2="6.001cm" svg:y2="13.969cm" svg:d="M6001 13218v751" svg:viewBox="0 0 1 752">
          <text:p/>
        </draw:connector>
        <draw:connector draw:style-name="gr14" draw:text-style-name="P5" draw:layer="layout" svg:x1="6.001cm" svg:y1="13.219cm" svg:x2="6.001cm" svg:y2="13.969cm" svg:d="M6001 13219v750" svg:viewBox="0 0 1 751">
          <text:p/>
        </draw:connector>
        <draw:connector draw:style-name="gr14" draw:text-style-name="P5" draw:layer="layout" draw:type="line" svg:x1="6.001cm" svg:y1="13.219cm" svg:x2="6.001cm" svg:y2="13.969cm" svg:d="M6001 13219v750" svg:viewBox="0 0 1 751">
          <text:p/>
        </draw:connector>
        <draw:connector draw:style-name="gr14" draw:text-style-name="P5" draw:layer="layout" svg:x1="7.945cm" svg:y1="13.218cm" svg:x2="7.945cm" svg:y2="13.969cm" svg:d="M7945 13218v751" svg:viewBox="0 0 1 752">
          <text:p/>
        </draw:connector>
        <draw:connector draw:style-name="gr14" draw:text-style-name="P5" draw:layer="layout" draw:type="line" svg:x1="7.945cm" svg:y1="13.218cm" svg:x2="7.945cm" svg:y2="13.969cm" svg:d="M7945 13218v751" svg:viewBox="0 0 1 752">
          <text:p/>
        </draw:connector>
        <draw:connector draw:style-name="gr14" draw:text-style-name="P5" draw:layer="layout" svg:x1="7.945cm" svg:y1="13.219cm" svg:x2="7.945cm" svg:y2="13.969cm" svg:d="M7945 13219v750" svg:viewBox="0 0 1 751">
          <text:p/>
        </draw:connector>
        <draw:connector draw:style-name="gr14" draw:text-style-name="P5" draw:layer="layout" draw:type="line" svg:x1="7.945cm" svg:y1="13.219cm" svg:x2="7.945cm" svg:y2="13.969cm" svg:d="M7945 13219v750" svg:viewBox="0 0 1 751">
          <text:p/>
        </draw:connector>
        <draw:connector draw:style-name="gr14" draw:text-style-name="P5" draw:layer="layout" draw:type="line" svg:x1="4.445cm" svg:y1="12.844cm" svg:x2="5.613cm" svg:y2="12.843cm" draw:start-shape="id39" draw:start-glue-point="10" draw:end-shape="id40" draw:end-glue-point="6" svg:d="M4445 12844l1168-1" svg:viewBox="0 0 1169 2">
          <text:p/>
        </draw:connector>
        <draw:connector draw:style-name="gr14" draw:text-style-name="P5" draw:layer="layout" draw:type="line" svg:x1="4.445cm" svg:y1="12.844cm" svg:x2="5.613cm" svg:y2="12.843cm" draw:start-shape="id39" draw:start-glue-point="10" draw:end-shape="id40" draw:end-glue-point="6" svg:d="M4445 12844l1168-1" svg:viewBox="0 0 1169 2">
          <text:p/>
        </draw:connector>
        <draw:connector draw:style-name="gr14" draw:text-style-name="P5" draw:layer="layout" draw:type="line" svg:x1="6.39cm" svg:y1="12.844cm" svg:x2="7.558cm" svg:y2="12.843cm" svg:d="M6390 12844l1168-1" svg:viewBox="0 0 1169 2">
          <text:p/>
        </draw:connector>
        <draw:connector draw:style-name="gr14" draw:text-style-name="P5" draw:layer="layout" draw:type="line" svg:x1="6.39cm" svg:y1="12.844cm" svg:x2="7.558cm" svg:y2="12.843cm" svg:d="M6390 12844l1168-1" svg:viewBox="0 0 1169 2">
          <text:p/>
        </draw:connector>
        <draw:connector draw:style-name="gr14" draw:text-style-name="P5" draw:layer="layout" draw:type="line" svg:x1="4.446cm" svg:y1="11.37cm" svg:x2="5.614cm" svg:y2="11.369cm" svg:d="M4446 11370l1168-1" svg:viewBox="0 0 1169 2">
          <text:p/>
        </draw:connector>
        <draw:connector draw:style-name="gr14" draw:text-style-name="P5" draw:layer="layout" draw:type="line" svg:x1="4.446cm" svg:y1="11.37cm" svg:x2="5.614cm" svg:y2="11.369cm" svg:d="M4446 11370l1168-1" svg:viewBox="0 0 1169 2">
          <text:p/>
        </draw:connector>
        <draw:connector draw:style-name="gr14" draw:text-style-name="P5" draw:layer="layout" draw:type="line" svg:x1="6.391cm" svg:y1="11.37cm" svg:x2="7.558cm" svg:y2="11.37cm" svg:d="M6391 11370h1167" svg:viewBox="0 0 1168 1">
          <text:p/>
        </draw:connector>
        <draw:connector draw:style-name="gr14" draw:text-style-name="P5" draw:layer="layout" draw:type="line" svg:x1="6.391cm" svg:y1="11.37cm" svg:x2="7.558cm" svg:y2="11.37cm" svg:d="M6391 11370h1167" svg:viewBox="0 0 1168 1">
          <text:p/>
        </draw:connector>
        <draw:connector draw:style-name="gr14" draw:text-style-name="P5" draw:layer="layout" draw:type="line" svg:x1="4.057cm" svg:y1="11.716cm" svg:x2="4.057cm" svg:y2="12.467cm" svg:d="M4057 11716v751" svg:viewBox="0 0 1 752">
          <text:p/>
        </draw:connector>
        <draw:connector draw:style-name="gr14" draw:text-style-name="P5" draw:layer="layout" draw:type="line" svg:x1="4.057cm" svg:y1="11.717cm" svg:x2="4.057cm" svg:y2="12.468cm" svg:d="M4057 11717v751" svg:viewBox="0 0 1 752">
          <text:p/>
        </draw:connector>
        <draw:connector draw:style-name="gr14" draw:text-style-name="P5" draw:layer="layout" draw:type="line" svg:x1="7.946cm" svg:y1="11.716cm" svg:x2="7.946cm" svg:y2="12.467cm" svg:d="M7946 11716v751" svg:viewBox="0 0 1 752">
          <text:p/>
        </draw:connector>
        <draw:connector draw:style-name="gr14" draw:text-style-name="P5" draw:layer="layout" draw:type="line" svg:x1="8.334cm" svg:y1="11.37cm" svg:x2="9.502cm" svg:y2="11.369cm" svg:d="M8334 11370l1168-1" svg:viewBox="0 0 1169 2">
          <text:p/>
        </draw:connector>
        <draw:connector draw:style-name="gr14" draw:text-style-name="P5" draw:layer="layout" draw:type="line" svg:x1="8.334cm" svg:y1="11.37cm" svg:x2="9.502cm" svg:y2="11.369cm" svg:d="M8334 11370l1168-1" svg:viewBox="0 0 1169 2">
          <text:p/>
        </draw:connector>
        <draw:connector draw:style-name="gr14" draw:text-style-name="P5" draw:layer="layout" draw:type="line" svg:x1="8.333cm" svg:y1="12.844cm" svg:x2="9.501cm" svg:y2="12.843cm" svg:d="M8333 12844l1168-1" svg:viewBox="0 0 1169 2">
          <text:p/>
        </draw:connector>
        <draw:connector draw:style-name="gr14" draw:text-style-name="P5" draw:layer="layout" draw:type="line" svg:x1="8.333cm" svg:y1="12.844cm" svg:x2="9.501cm" svg:y2="12.843cm" svg:d="M8333 12844l1168-1" svg:viewBox="0 0 1169 2">
          <text:p/>
        </draw:connector>
        <draw:connector draw:style-name="gr14" draw:text-style-name="P5" draw:layer="layout" draw:type="line" svg:x1="2.5cm" svg:y1="12.844cm" svg:x2="3.668cm" svg:y2="12.843cm" svg:d="M2500 12844l1168-1" svg:viewBox="0 0 1169 2">
          <text:p/>
        </draw:connector>
        <draw:connector draw:style-name="gr14" draw:text-style-name="P5" draw:layer="layout" draw:type="line" svg:x1="2.5cm" svg:y1="12.844cm" svg:x2="3.668cm" svg:y2="12.843cm" svg:d="M2500 12844l1168-1" svg:viewBox="0 0 1169 2">
          <text:p/>
        </draw:connector>
        <draw:connector draw:style-name="gr14" draw:text-style-name="P5" draw:layer="layout" draw:type="line" svg:x1="2.501cm" svg:y1="11.37cm" svg:x2="3.669cm" svg:y2="11.37cm" svg:d="M2501 11370h1168" svg:viewBox="0 0 1169 1">
          <text:p/>
        </draw:connector>
        <draw:connector draw:style-name="gr14" draw:text-style-name="P5" draw:layer="layout" draw:type="line" svg:x1="2.501cm" svg:y1="11.37cm" svg:x2="3.669cm" svg:y2="11.37cm" svg:d="M2501 11370h1168" svg:viewBox="0 0 1169 1">
          <text:p/>
        </draw:connector>
        <draw:connector draw:style-name="gr14" draw:text-style-name="P5" draw:layer="layout" draw:type="line" svg:x1="6.002cm" svg:y1="10.216cm" svg:x2="6.002cm" svg:y2="10.967cm" svg:d="M6002 10216v751" svg:viewBox="0 0 1 752">
          <text:p/>
        </draw:connector>
        <draw:connector draw:style-name="gr14" draw:text-style-name="P5" draw:layer="layout" draw:type="line" svg:x1="4.057cm" svg:y1="10.216cm" svg:x2="4.057cm" svg:y2="10.967cm" svg:d="M4057 10216v751" svg:viewBox="0 0 1 752">
          <text:p/>
        </draw:connector>
        <draw:connector draw:style-name="gr14" draw:text-style-name="P5" draw:layer="layout" draw:type="line" svg:x1="4.057cm" svg:y1="10.217cm" svg:x2="4.057cm" svg:y2="10.968cm" svg:d="M4057 10217v751" svg:viewBox="0 0 1 752">
          <text:p/>
        </draw:connector>
        <draw:connector draw:style-name="gr14" draw:text-style-name="P5" draw:layer="layout" draw:type="line" svg:x1="7.946cm" svg:y1="10.216cm" svg:x2="7.946cm" svg:y2="10.967cm" svg:d="M7946 10216v751" svg:viewBox="0 0 1 752">
          <text:p/>
        </draw:connector>
        <draw:connector draw:style-name="gr14" draw:text-style-name="P5" draw:layer="layout" draw:type="line" svg:x1="6.002cm" svg:y1="10.216cm" svg:x2="6.002cm" svg:y2="10.967cm" svg:d="M6002 10216v751" svg:viewBox="0 0 1 752">
          <text:p/>
        </draw:connector>
        <draw:connector draw:style-name="gr14" draw:text-style-name="P5" draw:layer="layout" draw:type="line" svg:x1="4.057cm" svg:y1="10.216cm" svg:x2="4.057cm" svg:y2="10.967cm" svg:d="M4057 10216v751" svg:viewBox="0 0 1 752">
          <text:p/>
        </draw:connector>
        <draw:connector draw:style-name="gr14" draw:text-style-name="P5" draw:layer="layout" draw:type="line" svg:x1="4.057cm" svg:y1="10.217cm" svg:x2="4.057cm" svg:y2="10.968cm" svg:d="M4057 10217v751" svg:viewBox="0 0 1 752">
          <text:p/>
        </draw:connector>
        <draw:connector draw:style-name="gr14" draw:text-style-name="P5" draw:layer="layout" draw:type="line" svg:x1="7.946cm" svg:y1="10.216cm" svg:x2="7.946cm" svg:y2="10.967cm" svg:d="M7946 10216v751" svg:viewBox="0 0 1 752">
          <text:p/>
        </draw:connector>
        <draw:connector draw:style-name="gr14" draw:text-style-name="P5" draw:layer="layout" draw:type="line" svg:x1="6.002cm" svg:y1="10.216cm" svg:x2="6.002cm" svg:y2="10.967cm" svg:d="M6002 10216v751" svg:viewBox="0 0 1 752">
          <text:p/>
        </draw:connector>
        <draw:connector draw:style-name="gr14" draw:text-style-name="P5" draw:layer="layout" draw:type="line" svg:x1="4.057cm" svg:y1="10.216cm" svg:x2="4.057cm" svg:y2="10.967cm" svg:d="M4057 10216v751" svg:viewBox="0 0 1 752">
          <text:p/>
        </draw:connector>
        <draw:connector draw:style-name="gr14" draw:text-style-name="P5" draw:layer="layout" draw:type="line" svg:x1="4.057cm" svg:y1="10.217cm" svg:x2="4.057cm" svg:y2="10.968cm" svg:d="M4057 10217v751" svg:viewBox="0 0 1 752">
          <text:p/>
        </draw:connector>
        <draw:connector draw:style-name="gr14" draw:text-style-name="P5" draw:layer="layout" draw:type="line" svg:x1="7.946cm" svg:y1="10.216cm" svg:x2="7.946cm" svg:y2="10.967cm" svg:d="M7946 10216v751" svg:viewBox="0 0 1 752">
          <text:p/>
        </draw:connector>
        <draw:connector draw:style-name="gr14" draw:text-style-name="P5" draw:layer="layout" draw:type="line" svg:x1="6.002cm" svg:y1="10.216cm" svg:x2="6.002cm" svg:y2="10.967cm" svg:d="M6002 10216v751" svg:viewBox="0 0 1 752">
          <text:p/>
        </draw:connector>
        <draw:connector draw:style-name="gr14" draw:text-style-name="P5" draw:layer="layout" draw:type="line" svg:x1="4.057cm" svg:y1="10.216cm" svg:x2="4.057cm" svg:y2="10.967cm" svg:d="M4057 10216v751" svg:viewBox="0 0 1 752">
          <text:p/>
        </draw:connector>
        <draw:connector draw:style-name="gr14" draw:text-style-name="P5" draw:layer="layout" draw:type="line" svg:x1="4.057cm" svg:y1="10.217cm" svg:x2="4.057cm" svg:y2="10.968cm" svg:d="M4057 10217v751" svg:viewBox="0 0 1 752">
          <text:p/>
        </draw:connector>
        <draw:connector draw:style-name="gr14" draw:text-style-name="P5" draw:layer="layout" draw:type="line" svg:x1="7.946cm" svg:y1="10.216cm" svg:x2="7.946cm" svg:y2="10.967cm" svg:d="M7946 10216v751" svg:viewBox="0 0 1 752">
          <text:p/>
        </draw:connector>
        <draw:connector draw:style-name="gr14" draw:text-style-name="P5" draw:layer="layout" draw:type="line" svg:x1="6.002cm" svg:y1="10.216cm" svg:x2="6.002cm" svg:y2="10.967cm" svg:d="M6002 10216v751" svg:viewBox="0 0 1 752">
          <text:p/>
        </draw:connector>
        <draw:connector draw:style-name="gr14" draw:text-style-name="P5" draw:layer="layout" draw:type="line" svg:x1="4.057cm" svg:y1="10.216cm" svg:x2="4.057cm" svg:y2="10.967cm" svg:d="M4057 10216v751" svg:viewBox="0 0 1 752">
          <text:p/>
        </draw:connector>
        <draw:connector draw:style-name="gr14" draw:text-style-name="P5" draw:layer="layout" draw:type="line" svg:x1="4.057cm" svg:y1="10.217cm" svg:x2="4.057cm" svg:y2="10.968cm" svg:d="M4057 10217v751" svg:viewBox="0 0 1 752">
          <text:p/>
        </draw:connector>
        <draw:connector draw:style-name="gr14" draw:text-style-name="P5" draw:layer="layout" draw:type="line" svg:x1="7.946cm" svg:y1="10.216cm" svg:x2="7.946cm" svg:y2="10.967cm" svg:d="M7946 10216v751" svg:viewBox="0 0 1 752">
          <text:p/>
        </draw:connector>
        <draw:connector draw:style-name="gr14" draw:text-style-name="P5" draw:layer="layout" draw:type="line" svg:x1="6.002cm" svg:y1="10.216cm" svg:x2="6.002cm" svg:y2="10.967cm" svg:d="M6002 10216v751" svg:viewBox="0 0 1 752">
          <text:p/>
        </draw:connector>
        <draw:connector draw:style-name="gr14" draw:text-style-name="P5" draw:layer="layout" draw:type="line" svg:x1="4.057cm" svg:y1="10.216cm" svg:x2="4.057cm" svg:y2="10.967cm" svg:d="M4057 10216v751" svg:viewBox="0 0 1 752">
          <text:p/>
        </draw:connector>
        <draw:connector draw:style-name="gr14" draw:text-style-name="P5" draw:layer="layout" draw:type="line" svg:x1="4.057cm" svg:y1="10.217cm" svg:x2="4.057cm" svg:y2="10.968cm" svg:d="M4057 10217v751" svg:viewBox="0 0 1 752">
          <text:p/>
        </draw:connector>
        <draw:connector draw:style-name="gr14" draw:text-style-name="P5" draw:layer="layout" draw:type="line" svg:x1="7.946cm" svg:y1="10.216cm" svg:x2="7.946cm" svg:y2="10.967cm" svg:d="M7946 10216v751" svg:viewBox="0 0 1 752">
          <text:p/>
        </draw:connector>
        <draw:connector draw:style-name="gr14" draw:text-style-name="P5" draw:layer="layout" draw:type="line" svg:x1="6.002cm" svg:y1="10.216cm" svg:x2="6.002cm" svg:y2="10.967cm" svg:d="M6002 10216v751" svg:viewBox="0 0 1 752">
          <text:p/>
        </draw:connector>
        <draw:connector draw:style-name="gr14" draw:text-style-name="P5" draw:layer="layout" draw:type="line" svg:x1="4.057cm" svg:y1="10.216cm" svg:x2="4.057cm" svg:y2="10.967cm" svg:d="M4057 10216v751" svg:viewBox="0 0 1 752">
          <text:p/>
        </draw:connector>
        <draw:connector draw:style-name="gr14" draw:text-style-name="P5" draw:layer="layout" draw:type="line" svg:x1="4.057cm" svg:y1="10.217cm" svg:x2="4.057cm" svg:y2="10.968cm" svg:d="M4057 10217v751" svg:viewBox="0 0 1 752">
          <text:p/>
        </draw:connector>
        <draw:connector draw:style-name="gr14" draw:text-style-name="P5" draw:layer="layout" draw:type="line" svg:x1="7.946cm" svg:y1="10.216cm" svg:x2="7.946cm" svg:y2="10.967cm" svg:d="M7946 10216v751" svg:viewBox="0 0 1 752">
          <text:p/>
        </draw:connector>
        <draw:connector draw:style-name="gr14" draw:text-style-name="P5" draw:layer="layout" draw:type="line" svg:x1="6.002cm" svg:y1="10.216cm" svg:x2="6.002cm" svg:y2="10.967cm" svg:d="M6002 10216v751" svg:viewBox="0 0 1 752">
          <text:p/>
        </draw:connector>
        <draw:connector draw:style-name="gr14" draw:text-style-name="P5" draw:layer="layout" draw:type="line" svg:x1="4.057cm" svg:y1="10.216cm" svg:x2="4.057cm" svg:y2="10.967cm" svg:d="M4057 10216v751" svg:viewBox="0 0 1 752">
          <text:p/>
        </draw:connector>
        <draw:connector draw:style-name="gr14" draw:text-style-name="P5" draw:layer="layout" draw:type="line" svg:x1="4.057cm" svg:y1="10.217cm" svg:x2="4.057cm" svg:y2="10.968cm" svg:d="M4057 10217v751" svg:viewBox="0 0 1 752">
          <text:p/>
        </draw:connector>
        <draw:connector draw:style-name="gr14" draw:text-style-name="P5" draw:layer="layout" draw:type="line" svg:x1="7.946cm" svg:y1="10.216cm" svg:x2="7.946cm" svg:y2="10.967cm" svg:d="M7946 10216v751" svg:viewBox="0 0 1 752">
          <text:p/>
        </draw:connector>
        <draw:custom-shape draw:style-name="gr12" draw:text-style-name="P6" xml:id="id41" draw:id="id41" draw:layer="layout" svg:width="0.777cm" svg:height="0.749cm" svg:x="12.73cm" svg:y="3.7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42" draw:id="id42" draw:layer="layout" svg:width="0.777cm" svg:height="0.749cm" svg:x="12.73cm" svg:y="5.2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4.675cm" svg:y="3.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43" draw:id="id43" draw:layer="layout" svg:width="0.777cm" svg:height="0.749cm" svg:x="14.675cm" svg:y="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2.73cm" svg:y="6.7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4.674cm" svg:y="6.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9cm" svg:y="3.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9cm" svg:y="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9cm" svg:y="6.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3" draw:text-style-name="P5" draw:layer="layout" svg:x1="13.119cm" svg:y1="4.466cm" svg:x2="13.119cm" svg:y2="5.217cm" draw:start-shape="id41" draw:start-glue-point="8" draw:end-shape="id42" draw:end-glue-point="4" svg:d="M13119 4466v751" svg:viewBox="0 0 1 752">
          <text:p/>
        </draw:connector>
        <draw:connector draw:style-name="gr13" draw:text-style-name="P5" draw:layer="layout" draw:type="line" svg:x1="13.119cm" svg:y1="4.466cm" svg:x2="13.119cm" svg:y2="5.217cm" draw:start-shape="id41" draw:start-glue-point="8" draw:end-shape="id42" draw:end-glue-point="4" svg:d="M13119 4466v751" svg:viewBox="0 0 1 752">
          <text:p/>
        </draw:connector>
        <draw:connector draw:style-name="gr13" draw:text-style-name="P5" draw:layer="layout" svg:x1="15.063cm" svg:y1="4.466cm" svg:x2="15.063cm" svg:y2="5.217cm" svg:d="M15063 4466v751" svg:viewBox="0 0 1 752">
          <text:p/>
        </draw:connector>
        <draw:connector draw:style-name="gr13" draw:text-style-name="P5" draw:layer="layout" draw:type="line" svg:x1="15.063cm" svg:y1="4.466cm" svg:x2="15.063cm" svg:y2="5.217cm" svg:d="M15063 4466v751" svg:viewBox="0 0 1 752">
          <text:p/>
        </draw:connector>
        <draw:connector draw:style-name="gr13" draw:text-style-name="P5" draw:layer="layout" svg:x1="17.008cm" svg:y1="4.466cm" svg:x2="17.008cm" svg:y2="5.217cm" svg:d="M17008 4466v751" svg:viewBox="0 0 1 752">
          <text:p/>
        </draw:connector>
        <draw:connector draw:style-name="gr13" draw:text-style-name="P5" draw:layer="layout" draw:type="line" svg:x1="17.008cm" svg:y1="4.466cm" svg:x2="17.008cm" svg:y2="5.217cm" svg:d="M17008 4466v751" svg:viewBox="0 0 1 752">
          <text:p/>
        </draw:connector>
        <draw:connector draw:style-name="gr14" draw:text-style-name="P5" draw:layer="layout" svg:x1="13.118cm" svg:y1="5.966cm" svg:x2="13.118cm" svg:y2="6.717cm" svg:d="M13118 5966v751" svg:viewBox="0 0 1 752">
          <text:p/>
        </draw:connector>
        <draw:connector draw:style-name="gr14" draw:text-style-name="P5" draw:layer="layout" draw:type="line" svg:x1="13.118cm" svg:y1="5.966cm" svg:x2="13.118cm" svg:y2="6.717cm" svg:d="M13118 5966v751" svg:viewBox="0 0 1 752">
          <text:p/>
        </draw:connector>
        <draw:connector draw:style-name="gr14" draw:text-style-name="P5" draw:layer="layout" svg:x1="13.118cm" svg:y1="5.967cm" svg:x2="13.118cm" svg:y2="6.717cm" svg:d="M13118 5967v750" svg:viewBox="0 0 1 751">
          <text:p/>
        </draw:connector>
        <draw:connector draw:style-name="gr14" draw:text-style-name="P5" draw:layer="layout" draw:type="line" svg:x1="15.063cm" svg:y1="7.466cm" svg:x2="15.063cm" svg:y2="8.217cm" svg:d="M15063 7466v751" svg:viewBox="0 0 1 752">
          <text:p/>
        </draw:connector>
        <draw:connector draw:style-name="gr14" draw:text-style-name="P5" draw:layer="layout" svg:x1="15.063cm" svg:y1="5.966cm" svg:x2="15.063cm" svg:y2="6.717cm" svg:d="M15063 5966v751" svg:viewBox="0 0 1 752">
          <text:p/>
        </draw:connector>
        <draw:connector draw:style-name="gr14" draw:text-style-name="P5" draw:layer="layout" draw:type="line" svg:x1="15.063cm" svg:y1="5.966cm" svg:x2="15.063cm" svg:y2="6.717cm" svg:d="M15063 5966v751" svg:viewBox="0 0 1 752">
          <text:p/>
        </draw:connector>
        <draw:connector draw:style-name="gr14" draw:text-style-name="P5" draw:layer="layout" svg:x1="15.063cm" svg:y1="5.967cm" svg:x2="15.063cm" svg:y2="6.717cm" svg:d="M15063 5967v750" svg:viewBox="0 0 1 751">
          <text:p/>
        </draw:connector>
        <draw:connector draw:style-name="gr14" draw:text-style-name="P5" draw:layer="layout" draw:type="line" svg:x1="15.063cm" svg:y1="5.967cm" svg:x2="15.063cm" svg:y2="6.717cm" svg:d="M15063 5967v750" svg:viewBox="0 0 1 751">
          <text:p/>
        </draw:connector>
        <draw:connector draw:style-name="gr14" draw:text-style-name="P5" draw:layer="layout" svg:x1="17.008cm" svg:y1="5.966cm" svg:x2="17.008cm" svg:y2="6.717cm" svg:d="M17008 5966v751" svg:viewBox="0 0 1 752">
          <text:p/>
        </draw:connector>
        <draw:connector draw:style-name="gr14" draw:text-style-name="P5" draw:layer="layout" draw:type="line" svg:x1="17.008cm" svg:y1="5.966cm" svg:x2="17.008cm" svg:y2="6.717cm" svg:d="M17008 5966v751" svg:viewBox="0 0 1 752">
          <text:p/>
        </draw:connector>
        <draw:connector draw:style-name="gr14" draw:text-style-name="P5" draw:layer="layout" svg:x1="17.008cm" svg:y1="5.967cm" svg:x2="17.008cm" svg:y2="6.717cm" svg:d="M17008 5967v750" svg:viewBox="0 0 1 751">
          <text:p/>
        </draw:connector>
        <draw:connector draw:style-name="gr14" draw:text-style-name="P5" draw:layer="layout" draw:type="line" svg:x1="17.008cm" svg:y1="5.967cm" svg:x2="17.008cm" svg:y2="6.717cm" svg:d="M17008 5967v750" svg:viewBox="0 0 1 751">
          <text:p/>
        </draw:connector>
        <draw:connector draw:style-name="gr14" draw:text-style-name="P5" draw:layer="layout" draw:type="line" svg:x1="13.507cm" svg:y1="5.592cm" svg:x2="14.675cm" svg:y2="5.591cm" draw:start-shape="id42" draw:start-glue-point="10" draw:end-shape="id43" draw:end-glue-point="6" svg:d="M13507 5592l1168-1" svg:viewBox="0 0 1169 2">
          <text:p/>
        </draw:connector>
        <draw:connector draw:style-name="gr14" draw:text-style-name="P5" draw:layer="layout" draw:type="line" svg:x1="13.507cm" svg:y1="5.592cm" svg:x2="14.675cm" svg:y2="5.591cm" draw:start-shape="id42" draw:start-glue-point="10" draw:end-shape="id43" draw:end-glue-point="6" svg:d="M13507 5592l1168-1" svg:viewBox="0 0 1169 2">
          <text:p/>
        </draw:connector>
        <draw:connector draw:style-name="gr14" draw:text-style-name="P5" draw:layer="layout" draw:type="line" svg:x1="15.452cm" svg:y1="5.592cm" svg:x2="16.619cm" svg:y2="5.591cm" svg:d="M15452 5592l1167-1" svg:viewBox="0 0 1168 2">
          <text:p/>
        </draw:connector>
        <draw:connector draw:style-name="gr14" draw:text-style-name="P5" draw:layer="layout" draw:type="line" svg:x1="15.452cm" svg:y1="5.592cm" svg:x2="16.619cm" svg:y2="5.591cm" svg:d="M15452 5592l1167-1" svg:viewBox="0 0 1168 2">
          <text:p/>
        </draw:connector>
        <draw:connector draw:style-name="gr14" draw:text-style-name="P5" draw:layer="layout" draw:type="line" svg:x1="13.507cm" svg:y1="7.092cm" svg:x2="14.675cm" svg:y2="7.091cm" svg:d="M13507 7092l1168-1" svg:viewBox="0 0 1169 2">
          <text:p/>
        </draw:connector>
        <draw:connector draw:style-name="gr14" draw:text-style-name="P5" draw:layer="layout" draw:type="line" svg:x1="13.507cm" svg:y1="7.092cm" svg:x2="14.675cm" svg:y2="7.091cm" svg:d="M13507 7092l1168-1" svg:viewBox="0 0 1169 2">
          <text:p/>
        </draw:connector>
        <draw:connector draw:style-name="gr14" draw:text-style-name="P5" draw:layer="layout" draw:type="line" svg:x1="15.452cm" svg:y1="7.091cm" svg:x2="16.619cm" svg:y2="7.09cm" svg:d="M15452 7091l1167-1" svg:viewBox="0 0 1168 2">
          <text:p/>
        </draw:connector>
        <draw:connector draw:style-name="gr14" draw:text-style-name="P5" draw:layer="layout" draw:type="line" svg:x1="15.452cm" svg:y1="7.091cm" svg:x2="16.619cm" svg:y2="7.09cm" svg:d="M15452 7091l1167-1" svg:viewBox="0 0 1168 2">
          <text:p/>
        </draw:connector>
        <draw:connector draw:style-name="gr14" draw:text-style-name="P5" draw:layer="layout" draw:type="line" svg:x1="13.118cm" svg:y1="7.466cm" svg:x2="13.118cm" svg:y2="8.217cm" svg:d="M13118 7466v751" svg:viewBox="0 0 1 752">
          <text:p/>
        </draw:connector>
        <draw:connector draw:style-name="gr14" draw:text-style-name="P5" draw:layer="layout" draw:type="line" svg:x1="13.118cm" svg:y1="7.467cm" svg:x2="13.118cm" svg:y2="8.217cm" svg:d="M13118 7467v750" svg:viewBox="0 0 1 751">
          <text:p/>
        </draw:connector>
        <draw:connector draw:style-name="gr14" draw:text-style-name="P5" draw:layer="layout" draw:type="line" svg:x1="17.008cm" svg:y1="7.466cm" svg:x2="17.008cm" svg:y2="8.217cm" svg:d="M17008 7466v751" svg:viewBox="0 0 1 752">
          <text:p/>
        </draw:connector>
        <draw:connector draw:style-name="gr14" draw:text-style-name="P5" draw:layer="layout" draw:type="line" svg:x1="17.396cm" svg:y1="7.092cm" svg:x2="18.564cm" svg:y2="7.091cm" svg:d="M17396 7092l1168-1" svg:viewBox="0 0 1169 2">
          <text:p/>
        </draw:connector>
        <draw:connector draw:style-name="gr14" draw:text-style-name="P5" draw:layer="layout" draw:type="line" svg:x1="17.396cm" svg:y1="7.092cm" svg:x2="18.564cm" svg:y2="7.091cm" svg:d="M17396 7092l1168-1" svg:viewBox="0 0 1169 2">
          <text:p/>
        </draw:connector>
        <draw:connector draw:style-name="gr14" draw:text-style-name="P5" draw:layer="layout" draw:type="line" svg:x1="17.396cm" svg:y1="5.592cm" svg:x2="18.563cm" svg:y2="5.591cm" svg:d="M17396 5592l1167-1" svg:viewBox="0 0 1168 2">
          <text:p/>
        </draw:connector>
        <draw:connector draw:style-name="gr14" draw:text-style-name="P5" draw:layer="layout" draw:type="line" svg:x1="17.396cm" svg:y1="5.592cm" svg:x2="18.563cm" svg:y2="5.591cm" svg:d="M17396 5592l1167-1" svg:viewBox="0 0 1168 2">
          <text:p/>
        </draw:connector>
        <draw:connector draw:style-name="gr14" draw:text-style-name="P5" draw:layer="layout" draw:type="line" svg:x1="11.562cm" svg:y1="5.592cm" svg:x2="12.73cm" svg:y2="5.591cm" svg:d="M11562 5592l1168-1" svg:viewBox="0 0 1169 2">
          <text:p/>
        </draw:connector>
        <draw:connector draw:style-name="gr14" draw:text-style-name="P5" draw:layer="layout" draw:type="line" svg:x1="11.562cm" svg:y1="5.592cm" svg:x2="12.73cm" svg:y2="5.591cm" svg:d="M11562 5592l1168-1" svg:viewBox="0 0 1169 2">
          <text:p/>
        </draw:connector>
        <draw:connector draw:style-name="gr14" draw:text-style-name="P5" draw:layer="layout" draw:type="line" svg:x1="11.562cm" svg:y1="7.092cm" svg:x2="12.73cm" svg:y2="7.091cm" svg:d="M11562 7092l1168-1" svg:viewBox="0 0 1169 2">
          <text:p/>
        </draw:connector>
        <draw:connector draw:style-name="gr14" draw:text-style-name="P5" draw:layer="layout" draw:type="line" svg:x1="11.562cm" svg:y1="7.092cm" svg:x2="12.73cm" svg:y2="7.091cm" svg:d="M11562 7092l1168-1" svg:viewBox="0 0 1169 2">
          <text:p/>
        </draw:connector>
        <draw:custom-shape draw:style-name="gr12" draw:text-style-name="P6" xml:id="id44" draw:id="id44" draw:layer="layout" svg:width="0.777cm" svg:height="0.749cm" svg:x="12.73cm" svg:y="3.7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45" draw:id="id45" draw:layer="layout" svg:width="0.777cm" svg:height="0.749cm" svg:x="12.73cm" svg:y="5.2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4.675cm" svg:y="3.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46" draw:id="id46" draw:layer="layout" svg:width="0.777cm" svg:height="0.749cm" svg:x="14.675cm" svg:y="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2.73cm" svg:y="6.7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4.674cm" svg:y="6.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9cm" svg:y="3.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9cm" svg:y="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9cm" svg:y="6.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3" draw:text-style-name="P5" draw:layer="layout" svg:x1="13.119cm" svg:y1="4.466cm" svg:x2="13.119cm" svg:y2="5.217cm" draw:start-shape="id44" draw:start-glue-point="8" draw:end-shape="id45" draw:end-glue-point="4" svg:d="M13119 4466v751" svg:viewBox="0 0 1 752">
          <text:p/>
        </draw:connector>
        <draw:connector draw:style-name="gr13" draw:text-style-name="P5" draw:layer="layout" draw:type="line" svg:x1="13.119cm" svg:y1="4.466cm" svg:x2="13.119cm" svg:y2="5.217cm" draw:start-shape="id44" draw:start-glue-point="8" draw:end-shape="id45" draw:end-glue-point="4" svg:d="M13119 4466v751" svg:viewBox="0 0 1 752">
          <text:p/>
        </draw:connector>
        <draw:connector draw:style-name="gr13" draw:text-style-name="P5" draw:layer="layout" svg:x1="15.063cm" svg:y1="4.466cm" svg:x2="15.063cm" svg:y2="5.217cm" svg:d="M15063 4466v751" svg:viewBox="0 0 1 752">
          <text:p/>
        </draw:connector>
        <draw:connector draw:style-name="gr13" draw:text-style-name="P5" draw:layer="layout" draw:type="line" svg:x1="15.063cm" svg:y1="4.466cm" svg:x2="15.063cm" svg:y2="5.217cm" svg:d="M15063 4466v751" svg:viewBox="0 0 1 752">
          <text:p/>
        </draw:connector>
        <draw:connector draw:style-name="gr13" draw:text-style-name="P5" draw:layer="layout" svg:x1="17.008cm" svg:y1="4.466cm" svg:x2="17.008cm" svg:y2="5.217cm" svg:d="M17008 4466v751" svg:viewBox="0 0 1 752">
          <text:p/>
        </draw:connector>
        <draw:connector draw:style-name="gr13" draw:text-style-name="P5" draw:layer="layout" draw:type="line" svg:x1="17.008cm" svg:y1="4.466cm" svg:x2="17.008cm" svg:y2="5.217cm" svg:d="M17008 4466v751" svg:viewBox="0 0 1 752">
          <text:p/>
        </draw:connector>
        <draw:connector draw:style-name="gr14" draw:text-style-name="P5" draw:layer="layout" svg:x1="13.118cm" svg:y1="5.966cm" svg:x2="13.118cm" svg:y2="6.717cm" svg:d="M13118 5966v751" svg:viewBox="0 0 1 752">
          <text:p/>
        </draw:connector>
        <draw:connector draw:style-name="gr14" draw:text-style-name="P5" draw:layer="layout" draw:type="line" svg:x1="13.118cm" svg:y1="5.966cm" svg:x2="13.118cm" svg:y2="6.717cm" svg:d="M13118 5966v751" svg:viewBox="0 0 1 752">
          <text:p/>
        </draw:connector>
        <draw:connector draw:style-name="gr14" draw:text-style-name="P5" draw:layer="layout" svg:x1="13.118cm" svg:y1="5.967cm" svg:x2="13.118cm" svg:y2="6.717cm" svg:d="M13118 5967v750" svg:viewBox="0 0 1 751">
          <text:p/>
        </draw:connector>
        <draw:connector draw:style-name="gr14" draw:text-style-name="P5" draw:layer="layout" draw:type="line" svg:x1="15.063cm" svg:y1="7.466cm" svg:x2="15.063cm" svg:y2="8.217cm" svg:d="M15063 7466v751" svg:viewBox="0 0 1 752">
          <text:p/>
        </draw:connector>
        <draw:connector draw:style-name="gr14" draw:text-style-name="P5" draw:layer="layout" svg:x1="15.063cm" svg:y1="5.966cm" svg:x2="15.063cm" svg:y2="6.717cm" svg:d="M15063 5966v751" svg:viewBox="0 0 1 752">
          <text:p/>
        </draw:connector>
        <draw:connector draw:style-name="gr14" draw:text-style-name="P5" draw:layer="layout" draw:type="line" svg:x1="15.063cm" svg:y1="5.966cm" svg:x2="15.063cm" svg:y2="6.717cm" svg:d="M15063 5966v751" svg:viewBox="0 0 1 752">
          <text:p/>
        </draw:connector>
        <draw:connector draw:style-name="gr14" draw:text-style-name="P5" draw:layer="layout" svg:x1="15.063cm" svg:y1="5.967cm" svg:x2="15.063cm" svg:y2="6.717cm" svg:d="M15063 5967v750" svg:viewBox="0 0 1 751">
          <text:p/>
        </draw:connector>
        <draw:connector draw:style-name="gr14" draw:text-style-name="P5" draw:layer="layout" draw:type="line" svg:x1="15.063cm" svg:y1="5.967cm" svg:x2="15.063cm" svg:y2="6.717cm" svg:d="M15063 5967v750" svg:viewBox="0 0 1 751">
          <text:p/>
        </draw:connector>
        <draw:connector draw:style-name="gr14" draw:text-style-name="P5" draw:layer="layout" svg:x1="17.008cm" svg:y1="5.966cm" svg:x2="17.008cm" svg:y2="6.717cm" svg:d="M17008 5966v751" svg:viewBox="0 0 1 752">
          <text:p/>
        </draw:connector>
        <draw:connector draw:style-name="gr14" draw:text-style-name="P5" draw:layer="layout" draw:type="line" svg:x1="17.008cm" svg:y1="5.966cm" svg:x2="17.008cm" svg:y2="6.717cm" svg:d="M17008 5966v751" svg:viewBox="0 0 1 752">
          <text:p/>
        </draw:connector>
        <draw:connector draw:style-name="gr14" draw:text-style-name="P5" draw:layer="layout" svg:x1="17.008cm" svg:y1="5.967cm" svg:x2="17.008cm" svg:y2="6.717cm" svg:d="M17008 5967v750" svg:viewBox="0 0 1 751">
          <text:p/>
        </draw:connector>
        <draw:connector draw:style-name="gr14" draw:text-style-name="P5" draw:layer="layout" draw:type="line" svg:x1="17.008cm" svg:y1="5.967cm" svg:x2="17.008cm" svg:y2="6.717cm" svg:d="M17008 5967v750" svg:viewBox="0 0 1 751">
          <text:p/>
        </draw:connector>
        <draw:connector draw:style-name="gr14" draw:text-style-name="P5" draw:layer="layout" draw:type="line" svg:x1="13.507cm" svg:y1="5.592cm" svg:x2="14.675cm" svg:y2="5.591cm" draw:start-shape="id45" draw:start-glue-point="10" draw:end-shape="id46" draw:end-glue-point="6" svg:d="M13507 5592l1168-1" svg:viewBox="0 0 1169 2">
          <text:p/>
        </draw:connector>
        <draw:connector draw:style-name="gr14" draw:text-style-name="P5" draw:layer="layout" draw:type="line" svg:x1="13.507cm" svg:y1="5.592cm" svg:x2="14.675cm" svg:y2="5.591cm" draw:start-shape="id45" draw:start-glue-point="10" draw:end-shape="id46" draw:end-glue-point="6" svg:d="M13507 5592l1168-1" svg:viewBox="0 0 1169 2">
          <text:p/>
        </draw:connector>
        <draw:connector draw:style-name="gr14" draw:text-style-name="P5" draw:layer="layout" draw:type="line" svg:x1="15.452cm" svg:y1="5.592cm" svg:x2="16.619cm" svg:y2="5.591cm" svg:d="M15452 5592l1167-1" svg:viewBox="0 0 1168 2">
          <text:p/>
        </draw:connector>
        <draw:connector draw:style-name="gr14" draw:text-style-name="P5" draw:layer="layout" draw:type="line" svg:x1="15.452cm" svg:y1="5.592cm" svg:x2="16.619cm" svg:y2="5.591cm" svg:d="M15452 5592l1167-1" svg:viewBox="0 0 1168 2">
          <text:p/>
        </draw:connector>
        <draw:connector draw:style-name="gr14" draw:text-style-name="P5" draw:layer="layout" draw:type="line" svg:x1="13.507cm" svg:y1="7.092cm" svg:x2="14.675cm" svg:y2="7.091cm" svg:d="M13507 7092l1168-1" svg:viewBox="0 0 1169 2">
          <text:p/>
        </draw:connector>
        <draw:connector draw:style-name="gr14" draw:text-style-name="P5" draw:layer="layout" draw:type="line" svg:x1="13.507cm" svg:y1="7.092cm" svg:x2="14.675cm" svg:y2="7.091cm" svg:d="M13507 7092l1168-1" svg:viewBox="0 0 1169 2">
          <text:p/>
        </draw:connector>
        <draw:connector draw:style-name="gr14" draw:text-style-name="P5" draw:layer="layout" draw:type="line" svg:x1="15.452cm" svg:y1="7.091cm" svg:x2="16.619cm" svg:y2="7.09cm" svg:d="M15452 7091l1167-1" svg:viewBox="0 0 1168 2">
          <text:p/>
        </draw:connector>
        <draw:connector draw:style-name="gr14" draw:text-style-name="P5" draw:layer="layout" draw:type="line" svg:x1="15.452cm" svg:y1="7.091cm" svg:x2="16.619cm" svg:y2="7.09cm" svg:d="M15452 7091l1167-1" svg:viewBox="0 0 1168 2">
          <text:p/>
        </draw:connector>
        <draw:connector draw:style-name="gr14" draw:text-style-name="P5" draw:layer="layout" draw:type="line" svg:x1="13.118cm" svg:y1="7.466cm" svg:x2="13.118cm" svg:y2="8.217cm" svg:d="M13118 7466v751" svg:viewBox="0 0 1 752">
          <text:p/>
        </draw:connector>
        <draw:connector draw:style-name="gr14" draw:text-style-name="P5" draw:layer="layout" draw:type="line" svg:x1="13.118cm" svg:y1="7.467cm" svg:x2="13.118cm" svg:y2="8.217cm" svg:d="M13118 7467v750" svg:viewBox="0 0 1 751">
          <text:p/>
        </draw:connector>
        <draw:connector draw:style-name="gr14" draw:text-style-name="P5" draw:layer="layout" draw:type="line" svg:x1="17.008cm" svg:y1="7.466cm" svg:x2="17.008cm" svg:y2="8.217cm" svg:d="M17008 7466v751" svg:viewBox="0 0 1 752">
          <text:p/>
        </draw:connector>
        <draw:connector draw:style-name="gr14" draw:text-style-name="P5" draw:layer="layout" draw:type="line" svg:x1="17.396cm" svg:y1="7.092cm" svg:x2="18.564cm" svg:y2="7.091cm" svg:d="M17396 7092l1168-1" svg:viewBox="0 0 1169 2">
          <text:p/>
        </draw:connector>
        <draw:connector draw:style-name="gr14" draw:text-style-name="P5" draw:layer="layout" draw:type="line" svg:x1="17.396cm" svg:y1="7.092cm" svg:x2="18.564cm" svg:y2="7.091cm" svg:d="M17396 7092l1168-1" svg:viewBox="0 0 1169 2">
          <text:p/>
        </draw:connector>
        <draw:connector draw:style-name="gr14" draw:text-style-name="P5" draw:layer="layout" draw:type="line" svg:x1="17.396cm" svg:y1="5.592cm" svg:x2="18.563cm" svg:y2="5.591cm" svg:d="M17396 5592l1167-1" svg:viewBox="0 0 1168 2">
          <text:p/>
        </draw:connector>
        <draw:connector draw:style-name="gr14" draw:text-style-name="P5" draw:layer="layout" draw:type="line" svg:x1="17.396cm" svg:y1="5.592cm" svg:x2="18.563cm" svg:y2="5.591cm" svg:d="M17396 5592l1167-1" svg:viewBox="0 0 1168 2">
          <text:p/>
        </draw:connector>
        <draw:connector draw:style-name="gr14" draw:text-style-name="P5" draw:layer="layout" draw:type="line" svg:x1="11.562cm" svg:y1="5.592cm" svg:x2="12.73cm" svg:y2="5.591cm" svg:d="M11562 5592l1168-1" svg:viewBox="0 0 1169 2">
          <text:p/>
        </draw:connector>
        <draw:connector draw:style-name="gr14" draw:text-style-name="P5" draw:layer="layout" draw:type="line" svg:x1="11.562cm" svg:y1="5.592cm" svg:x2="12.73cm" svg:y2="5.591cm" svg:d="M11562 5592l1168-1" svg:viewBox="0 0 1169 2">
          <text:p/>
        </draw:connector>
        <draw:connector draw:style-name="gr14" draw:text-style-name="P5" draw:layer="layout" draw:type="line" svg:x1="11.562cm" svg:y1="7.092cm" svg:x2="12.73cm" svg:y2="7.091cm" svg:d="M11562 7092l1168-1" svg:viewBox="0 0 1169 2">
          <text:p/>
        </draw:connector>
        <draw:connector draw:style-name="gr14" draw:text-style-name="P5" draw:layer="layout" draw:type="line" svg:x1="11.562cm" svg:y1="7.092cm" svg:x2="12.73cm" svg:y2="7.091cm" svg:d="M11562 7092l1168-1" svg:viewBox="0 0 1169 2">
          <text:p/>
        </draw:connector>
        <draw:custom-shape draw:style-name="gr12" draw:text-style-name="P6" xml:id="id47" draw:id="id47" draw:layer="layout" svg:width="0.777cm" svg:height="0.749cm" svg:x="12.73cm" svg:y="3.7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48" draw:id="id48" draw:layer="layout" svg:width="0.777cm" svg:height="0.749cm" svg:x="12.73cm" svg:y="5.2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4.675cm" svg:y="3.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49" draw:id="id49" draw:layer="layout" svg:width="0.777cm" svg:height="0.749cm" svg:x="14.675cm" svg:y="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2.73cm" svg:y="6.7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4.674cm" svg:y="6.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9cm" svg:y="3.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9cm" svg:y="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9cm" svg:y="6.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3" draw:text-style-name="P5" draw:layer="layout" svg:x1="13.119cm" svg:y1="4.466cm" svg:x2="13.119cm" svg:y2="5.217cm" draw:start-shape="id47" draw:start-glue-point="8" draw:end-shape="id48" draw:end-glue-point="4" svg:d="M13119 4466v751" svg:viewBox="0 0 1 752">
          <text:p/>
        </draw:connector>
        <draw:connector draw:style-name="gr13" draw:text-style-name="P5" draw:layer="layout" draw:type="line" svg:x1="13.119cm" svg:y1="4.466cm" svg:x2="13.119cm" svg:y2="5.217cm" draw:start-shape="id47" draw:start-glue-point="8" draw:end-shape="id48" draw:end-glue-point="4" svg:d="M13119 4466v751" svg:viewBox="0 0 1 752">
          <text:p/>
        </draw:connector>
        <draw:connector draw:style-name="gr13" draw:text-style-name="P5" draw:layer="layout" svg:x1="15.063cm" svg:y1="4.466cm" svg:x2="15.063cm" svg:y2="5.217cm" svg:d="M15063 4466v751" svg:viewBox="0 0 1 752">
          <text:p/>
        </draw:connector>
        <draw:connector draw:style-name="gr13" draw:text-style-name="P5" draw:layer="layout" draw:type="line" svg:x1="15.063cm" svg:y1="4.466cm" svg:x2="15.063cm" svg:y2="5.217cm" svg:d="M15063 4466v751" svg:viewBox="0 0 1 752">
          <text:p/>
        </draw:connector>
        <draw:connector draw:style-name="gr13" draw:text-style-name="P5" draw:layer="layout" svg:x1="17.008cm" svg:y1="4.466cm" svg:x2="17.008cm" svg:y2="5.217cm" svg:d="M17008 4466v751" svg:viewBox="0 0 1 752">
          <text:p/>
        </draw:connector>
        <draw:connector draw:style-name="gr13" draw:text-style-name="P5" draw:layer="layout" draw:type="line" svg:x1="17.008cm" svg:y1="4.466cm" svg:x2="17.008cm" svg:y2="5.217cm" svg:d="M17008 4466v751" svg:viewBox="0 0 1 752">
          <text:p/>
        </draw:connector>
        <draw:connector draw:style-name="gr14" draw:text-style-name="P5" draw:layer="layout" svg:x1="13.118cm" svg:y1="5.966cm" svg:x2="13.118cm" svg:y2="6.717cm" svg:d="M13118 5966v751" svg:viewBox="0 0 1 752">
          <text:p/>
        </draw:connector>
        <draw:connector draw:style-name="gr14" draw:text-style-name="P5" draw:layer="layout" draw:type="line" svg:x1="13.118cm" svg:y1="5.966cm" svg:x2="13.118cm" svg:y2="6.717cm" svg:d="M13118 5966v751" svg:viewBox="0 0 1 752">
          <text:p/>
        </draw:connector>
        <draw:connector draw:style-name="gr14" draw:text-style-name="P5" draw:layer="layout" svg:x1="13.118cm" svg:y1="5.967cm" svg:x2="13.118cm" svg:y2="6.717cm" svg:d="M13118 5967v750" svg:viewBox="0 0 1 751">
          <text:p/>
        </draw:connector>
        <draw:connector draw:style-name="gr14" draw:text-style-name="P5" draw:layer="layout" draw:type="line" svg:x1="15.063cm" svg:y1="7.466cm" svg:x2="15.063cm" svg:y2="8.217cm" svg:d="M15063 7466v751" svg:viewBox="0 0 1 752">
          <text:p/>
        </draw:connector>
        <draw:connector draw:style-name="gr14" draw:text-style-name="P5" draw:layer="layout" svg:x1="15.063cm" svg:y1="5.966cm" svg:x2="15.063cm" svg:y2="6.717cm" svg:d="M15063 5966v751" svg:viewBox="0 0 1 752">
          <text:p/>
        </draw:connector>
        <draw:connector draw:style-name="gr14" draw:text-style-name="P5" draw:layer="layout" draw:type="line" svg:x1="15.063cm" svg:y1="5.966cm" svg:x2="15.063cm" svg:y2="6.717cm" svg:d="M15063 5966v751" svg:viewBox="0 0 1 752">
          <text:p/>
        </draw:connector>
        <draw:connector draw:style-name="gr14" draw:text-style-name="P5" draw:layer="layout" svg:x1="15.063cm" svg:y1="5.967cm" svg:x2="15.063cm" svg:y2="6.717cm" svg:d="M15063 5967v750" svg:viewBox="0 0 1 751">
          <text:p/>
        </draw:connector>
        <draw:connector draw:style-name="gr14" draw:text-style-name="P5" draw:layer="layout" draw:type="line" svg:x1="15.063cm" svg:y1="5.967cm" svg:x2="15.063cm" svg:y2="6.717cm" svg:d="M15063 5967v750" svg:viewBox="0 0 1 751">
          <text:p/>
        </draw:connector>
        <draw:connector draw:style-name="gr14" draw:text-style-name="P5" draw:layer="layout" svg:x1="17.008cm" svg:y1="5.966cm" svg:x2="17.008cm" svg:y2="6.717cm" svg:d="M17008 5966v751" svg:viewBox="0 0 1 752">
          <text:p/>
        </draw:connector>
        <draw:connector draw:style-name="gr14" draw:text-style-name="P5" draw:layer="layout" draw:type="line" svg:x1="17.008cm" svg:y1="5.966cm" svg:x2="17.008cm" svg:y2="6.717cm" svg:d="M17008 5966v751" svg:viewBox="0 0 1 752">
          <text:p/>
        </draw:connector>
        <draw:connector draw:style-name="gr14" draw:text-style-name="P5" draw:layer="layout" svg:x1="17.008cm" svg:y1="5.967cm" svg:x2="17.008cm" svg:y2="6.717cm" svg:d="M17008 5967v750" svg:viewBox="0 0 1 751">
          <text:p/>
        </draw:connector>
        <draw:connector draw:style-name="gr14" draw:text-style-name="P5" draw:layer="layout" draw:type="line" svg:x1="17.008cm" svg:y1="5.967cm" svg:x2="17.008cm" svg:y2="6.717cm" svg:d="M17008 5967v750" svg:viewBox="0 0 1 751">
          <text:p/>
        </draw:connector>
        <draw:connector draw:style-name="gr14" draw:text-style-name="P5" draw:layer="layout" draw:type="line" svg:x1="13.507cm" svg:y1="5.592cm" svg:x2="14.675cm" svg:y2="5.591cm" draw:start-shape="id48" draw:start-glue-point="10" draw:end-shape="id49" draw:end-glue-point="6" svg:d="M13507 5592l1168-1" svg:viewBox="0 0 1169 2">
          <text:p/>
        </draw:connector>
        <draw:connector draw:style-name="gr14" draw:text-style-name="P5" draw:layer="layout" draw:type="line" svg:x1="13.507cm" svg:y1="5.592cm" svg:x2="14.675cm" svg:y2="5.591cm" draw:start-shape="id48" draw:start-glue-point="10" draw:end-shape="id49" draw:end-glue-point="6" svg:d="M13507 5592l1168-1" svg:viewBox="0 0 1169 2">
          <text:p/>
        </draw:connector>
        <draw:connector draw:style-name="gr14" draw:text-style-name="P5" draw:layer="layout" draw:type="line" svg:x1="15.452cm" svg:y1="5.592cm" svg:x2="16.619cm" svg:y2="5.591cm" svg:d="M15452 5592l1167-1" svg:viewBox="0 0 1168 2">
          <text:p/>
        </draw:connector>
        <draw:connector draw:style-name="gr14" draw:text-style-name="P5" draw:layer="layout" draw:type="line" svg:x1="15.452cm" svg:y1="5.592cm" svg:x2="16.619cm" svg:y2="5.591cm" svg:d="M15452 5592l1167-1" svg:viewBox="0 0 1168 2">
          <text:p/>
        </draw:connector>
        <draw:connector draw:style-name="gr14" draw:text-style-name="P5" draw:layer="layout" draw:type="line" svg:x1="13.507cm" svg:y1="7.092cm" svg:x2="14.675cm" svg:y2="7.091cm" svg:d="M13507 7092l1168-1" svg:viewBox="0 0 1169 2">
          <text:p/>
        </draw:connector>
        <draw:connector draw:style-name="gr14" draw:text-style-name="P5" draw:layer="layout" draw:type="line" svg:x1="13.507cm" svg:y1="7.092cm" svg:x2="14.675cm" svg:y2="7.091cm" svg:d="M13507 7092l1168-1" svg:viewBox="0 0 1169 2">
          <text:p/>
        </draw:connector>
        <draw:connector draw:style-name="gr14" draw:text-style-name="P5" draw:layer="layout" draw:type="line" svg:x1="15.452cm" svg:y1="7.091cm" svg:x2="16.619cm" svg:y2="7.09cm" svg:d="M15452 7091l1167-1" svg:viewBox="0 0 1168 2">
          <text:p/>
        </draw:connector>
        <draw:connector draw:style-name="gr14" draw:text-style-name="P5" draw:layer="layout" draw:type="line" svg:x1="15.452cm" svg:y1="7.091cm" svg:x2="16.619cm" svg:y2="7.09cm" svg:d="M15452 7091l1167-1" svg:viewBox="0 0 1168 2">
          <text:p/>
        </draw:connector>
        <draw:connector draw:style-name="gr14" draw:text-style-name="P5" draw:layer="layout" draw:type="line" svg:x1="13.118cm" svg:y1="7.466cm" svg:x2="13.118cm" svg:y2="8.217cm" svg:d="M13118 7466v751" svg:viewBox="0 0 1 752">
          <text:p/>
        </draw:connector>
        <draw:connector draw:style-name="gr14" draw:text-style-name="P5" draw:layer="layout" draw:type="line" svg:x1="13.118cm" svg:y1="7.467cm" svg:x2="13.118cm" svg:y2="8.217cm" svg:d="M13118 7467v750" svg:viewBox="0 0 1 751">
          <text:p/>
        </draw:connector>
        <draw:connector draw:style-name="gr14" draw:text-style-name="P5" draw:layer="layout" draw:type="line" svg:x1="17.008cm" svg:y1="7.466cm" svg:x2="17.008cm" svg:y2="8.217cm" svg:d="M17008 7466v751" svg:viewBox="0 0 1 752">
          <text:p/>
        </draw:connector>
        <draw:connector draw:style-name="gr14" draw:text-style-name="P5" draw:layer="layout" draw:type="line" svg:x1="17.396cm" svg:y1="7.092cm" svg:x2="18.564cm" svg:y2="7.091cm" svg:d="M17396 7092l1168-1" svg:viewBox="0 0 1169 2">
          <text:p/>
        </draw:connector>
        <draw:connector draw:style-name="gr14" draw:text-style-name="P5" draw:layer="layout" draw:type="line" svg:x1="17.396cm" svg:y1="7.092cm" svg:x2="18.564cm" svg:y2="7.091cm" svg:d="M17396 7092l1168-1" svg:viewBox="0 0 1169 2">
          <text:p/>
        </draw:connector>
        <draw:connector draw:style-name="gr14" draw:text-style-name="P5" draw:layer="layout" draw:type="line" svg:x1="17.396cm" svg:y1="5.592cm" svg:x2="18.563cm" svg:y2="5.591cm" svg:d="M17396 5592l1167-1" svg:viewBox="0 0 1168 2">
          <text:p/>
        </draw:connector>
        <draw:connector draw:style-name="gr14" draw:text-style-name="P5" draw:layer="layout" draw:type="line" svg:x1="17.396cm" svg:y1="5.592cm" svg:x2="18.563cm" svg:y2="5.591cm" svg:d="M17396 5592l1167-1" svg:viewBox="0 0 1168 2">
          <text:p/>
        </draw:connector>
        <draw:connector draw:style-name="gr14" draw:text-style-name="P5" draw:layer="layout" draw:type="line" svg:x1="11.562cm" svg:y1="5.592cm" svg:x2="12.73cm" svg:y2="5.591cm" svg:d="M11562 5592l1168-1" svg:viewBox="0 0 1169 2">
          <text:p/>
        </draw:connector>
        <draw:connector draw:style-name="gr14" draw:text-style-name="P5" draw:layer="layout" draw:type="line" svg:x1="11.562cm" svg:y1="5.592cm" svg:x2="12.73cm" svg:y2="5.591cm" svg:d="M11562 5592l1168-1" svg:viewBox="0 0 1169 2">
          <text:p/>
        </draw:connector>
        <draw:connector draw:style-name="gr14" draw:text-style-name="P5" draw:layer="layout" draw:type="line" svg:x1="11.562cm" svg:y1="7.092cm" svg:x2="12.73cm" svg:y2="7.091cm" svg:d="M11562 7092l1168-1" svg:viewBox="0 0 1169 2">
          <text:p/>
        </draw:connector>
        <draw:connector draw:style-name="gr14" draw:text-style-name="P5" draw:layer="layout" draw:type="line" svg:x1="11.562cm" svg:y1="7.092cm" svg:x2="12.73cm" svg:y2="7.091cm" svg:d="M11562 7092l1168-1" svg:viewBox="0 0 1169 2">
          <text:p/>
        </draw:connector>
        <draw:custom-shape draw:style-name="gr12" draw:text-style-name="P6" xml:id="id50" draw:id="id50" draw:layer="layout" svg:width="0.777cm" svg:height="0.749cm" svg:x="12.73cm" svg:y="3.7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51" draw:id="id51" draw:layer="layout" svg:width="0.777cm" svg:height="0.749cm" svg:x="12.73cm" svg:y="5.2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4.675cm" svg:y="3.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52" draw:id="id52" draw:layer="layout" svg:width="0.777cm" svg:height="0.749cm" svg:x="14.675cm" svg:y="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2.73cm" svg:y="6.7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4.674cm" svg:y="6.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9cm" svg:y="3.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9cm" svg:y="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9cm" svg:y="6.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3" draw:text-style-name="P5" draw:layer="layout" svg:x1="13.119cm" svg:y1="4.466cm" svg:x2="13.119cm" svg:y2="5.217cm" draw:start-shape="id50" draw:start-glue-point="8" draw:end-shape="id51" draw:end-glue-point="4" svg:d="M13119 4466v751" svg:viewBox="0 0 1 752">
          <text:p/>
        </draw:connector>
        <draw:connector draw:style-name="gr13" draw:text-style-name="P5" draw:layer="layout" draw:type="line" svg:x1="13.119cm" svg:y1="4.466cm" svg:x2="13.119cm" svg:y2="5.217cm" draw:start-shape="id50" draw:start-glue-point="8" draw:end-shape="id51" draw:end-glue-point="4" svg:d="M13119 4466v751" svg:viewBox="0 0 1 752">
          <text:p/>
        </draw:connector>
        <draw:connector draw:style-name="gr13" draw:text-style-name="P5" draw:layer="layout" svg:x1="15.063cm" svg:y1="4.466cm" svg:x2="15.063cm" svg:y2="5.217cm" svg:d="M15063 4466v751" svg:viewBox="0 0 1 752">
          <text:p/>
        </draw:connector>
        <draw:connector draw:style-name="gr13" draw:text-style-name="P5" draw:layer="layout" draw:type="line" svg:x1="15.063cm" svg:y1="4.466cm" svg:x2="15.063cm" svg:y2="5.217cm" svg:d="M15063 4466v751" svg:viewBox="0 0 1 752">
          <text:p/>
        </draw:connector>
        <draw:connector draw:style-name="gr13" draw:text-style-name="P5" draw:layer="layout" svg:x1="17.008cm" svg:y1="4.466cm" svg:x2="17.008cm" svg:y2="5.217cm" svg:d="M17008 4466v751" svg:viewBox="0 0 1 752">
          <text:p/>
        </draw:connector>
        <draw:connector draw:style-name="gr13" draw:text-style-name="P5" draw:layer="layout" draw:type="line" svg:x1="17.008cm" svg:y1="4.466cm" svg:x2="17.008cm" svg:y2="5.217cm" svg:d="M17008 4466v751" svg:viewBox="0 0 1 752">
          <text:p/>
        </draw:connector>
        <draw:connector draw:style-name="gr14" draw:text-style-name="P5" draw:layer="layout" svg:x1="13.118cm" svg:y1="5.966cm" svg:x2="13.118cm" svg:y2="6.717cm" svg:d="M13118 5966v751" svg:viewBox="0 0 1 752">
          <text:p/>
        </draw:connector>
        <draw:connector draw:style-name="gr14" draw:text-style-name="P5" draw:layer="layout" draw:type="line" svg:x1="13.118cm" svg:y1="5.966cm" svg:x2="13.118cm" svg:y2="6.717cm" svg:d="M13118 5966v751" svg:viewBox="0 0 1 752">
          <text:p/>
        </draw:connector>
        <draw:connector draw:style-name="gr14" draw:text-style-name="P5" draw:layer="layout" svg:x1="13.118cm" svg:y1="5.967cm" svg:x2="13.118cm" svg:y2="6.717cm" svg:d="M13118 5967v750" svg:viewBox="0 0 1 751">
          <text:p/>
        </draw:connector>
        <draw:connector draw:style-name="gr14" draw:text-style-name="P5" draw:layer="layout" draw:type="line" svg:x1="15.063cm" svg:y1="7.466cm" svg:x2="15.063cm" svg:y2="8.217cm" svg:d="M15063 7466v751" svg:viewBox="0 0 1 752">
          <text:p/>
        </draw:connector>
        <draw:connector draw:style-name="gr14" draw:text-style-name="P5" draw:layer="layout" svg:x1="15.063cm" svg:y1="5.966cm" svg:x2="15.063cm" svg:y2="6.717cm" svg:d="M15063 5966v751" svg:viewBox="0 0 1 752">
          <text:p/>
        </draw:connector>
        <draw:connector draw:style-name="gr14" draw:text-style-name="P5" draw:layer="layout" draw:type="line" svg:x1="15.063cm" svg:y1="5.966cm" svg:x2="15.063cm" svg:y2="6.717cm" svg:d="M15063 5966v751" svg:viewBox="0 0 1 752">
          <text:p/>
        </draw:connector>
        <draw:connector draw:style-name="gr14" draw:text-style-name="P5" draw:layer="layout" svg:x1="15.063cm" svg:y1="5.967cm" svg:x2="15.063cm" svg:y2="6.717cm" svg:d="M15063 5967v750" svg:viewBox="0 0 1 751">
          <text:p/>
        </draw:connector>
        <draw:connector draw:style-name="gr14" draw:text-style-name="P5" draw:layer="layout" draw:type="line" svg:x1="15.063cm" svg:y1="5.967cm" svg:x2="15.063cm" svg:y2="6.717cm" svg:d="M15063 5967v750" svg:viewBox="0 0 1 751">
          <text:p/>
        </draw:connector>
        <draw:connector draw:style-name="gr14" draw:text-style-name="P5" draw:layer="layout" svg:x1="17.008cm" svg:y1="5.966cm" svg:x2="17.008cm" svg:y2="6.717cm" svg:d="M17008 5966v751" svg:viewBox="0 0 1 752">
          <text:p/>
        </draw:connector>
        <draw:connector draw:style-name="gr14" draw:text-style-name="P5" draw:layer="layout" draw:type="line" svg:x1="17.008cm" svg:y1="5.966cm" svg:x2="17.008cm" svg:y2="6.717cm" svg:d="M17008 5966v751" svg:viewBox="0 0 1 752">
          <text:p/>
        </draw:connector>
        <draw:connector draw:style-name="gr14" draw:text-style-name="P5" draw:layer="layout" svg:x1="17.008cm" svg:y1="5.967cm" svg:x2="17.008cm" svg:y2="6.717cm" svg:d="M17008 5967v750" svg:viewBox="0 0 1 751">
          <text:p/>
        </draw:connector>
        <draw:connector draw:style-name="gr14" draw:text-style-name="P5" draw:layer="layout" draw:type="line" svg:x1="17.008cm" svg:y1="5.967cm" svg:x2="17.008cm" svg:y2="6.717cm" svg:d="M17008 5967v750" svg:viewBox="0 0 1 751">
          <text:p/>
        </draw:connector>
        <draw:connector draw:style-name="gr14" draw:text-style-name="P5" draw:layer="layout" draw:type="line" svg:x1="13.507cm" svg:y1="5.592cm" svg:x2="14.675cm" svg:y2="5.591cm" draw:start-shape="id51" draw:start-glue-point="10" draw:end-shape="id52" draw:end-glue-point="6" svg:d="M13507 5592l1168-1" svg:viewBox="0 0 1169 2">
          <text:p/>
        </draw:connector>
        <draw:connector draw:style-name="gr14" draw:text-style-name="P5" draw:layer="layout" draw:type="line" svg:x1="13.507cm" svg:y1="5.592cm" svg:x2="14.675cm" svg:y2="5.591cm" draw:start-shape="id51" draw:start-glue-point="10" draw:end-shape="id52" draw:end-glue-point="6" svg:d="M13507 5592l1168-1" svg:viewBox="0 0 1169 2">
          <text:p/>
        </draw:connector>
        <draw:connector draw:style-name="gr14" draw:text-style-name="P5" draw:layer="layout" draw:type="line" svg:x1="15.452cm" svg:y1="5.592cm" svg:x2="16.619cm" svg:y2="5.591cm" svg:d="M15452 5592l1167-1" svg:viewBox="0 0 1168 2">
          <text:p/>
        </draw:connector>
        <draw:connector draw:style-name="gr14" draw:text-style-name="P5" draw:layer="layout" draw:type="line" svg:x1="15.452cm" svg:y1="5.592cm" svg:x2="16.619cm" svg:y2="5.591cm" svg:d="M15452 5592l1167-1" svg:viewBox="0 0 1168 2">
          <text:p/>
        </draw:connector>
        <draw:connector draw:style-name="gr14" draw:text-style-name="P5" draw:layer="layout" draw:type="line" svg:x1="13.507cm" svg:y1="7.092cm" svg:x2="14.675cm" svg:y2="7.091cm" svg:d="M13507 7092l1168-1" svg:viewBox="0 0 1169 2">
          <text:p/>
        </draw:connector>
        <draw:connector draw:style-name="gr14" draw:text-style-name="P5" draw:layer="layout" draw:type="line" svg:x1="13.507cm" svg:y1="7.092cm" svg:x2="14.675cm" svg:y2="7.091cm" svg:d="M13507 7092l1168-1" svg:viewBox="0 0 1169 2">
          <text:p/>
        </draw:connector>
        <draw:connector draw:style-name="gr14" draw:text-style-name="P5" draw:layer="layout" draw:type="line" svg:x1="15.452cm" svg:y1="7.091cm" svg:x2="16.619cm" svg:y2="7.09cm" svg:d="M15452 7091l1167-1" svg:viewBox="0 0 1168 2">
          <text:p/>
        </draw:connector>
        <draw:connector draw:style-name="gr14" draw:text-style-name="P5" draw:layer="layout" draw:type="line" svg:x1="15.452cm" svg:y1="7.091cm" svg:x2="16.619cm" svg:y2="7.09cm" svg:d="M15452 7091l1167-1" svg:viewBox="0 0 1168 2">
          <text:p/>
        </draw:connector>
        <draw:connector draw:style-name="gr14" draw:text-style-name="P5" draw:layer="layout" draw:type="line" svg:x1="13.118cm" svg:y1="7.466cm" svg:x2="13.118cm" svg:y2="8.217cm" svg:d="M13118 7466v751" svg:viewBox="0 0 1 752">
          <text:p/>
        </draw:connector>
        <draw:connector draw:style-name="gr14" draw:text-style-name="P5" draw:layer="layout" draw:type="line" svg:x1="13.118cm" svg:y1="7.467cm" svg:x2="13.118cm" svg:y2="8.217cm" svg:d="M13118 7467v750" svg:viewBox="0 0 1 751">
          <text:p/>
        </draw:connector>
        <draw:connector draw:style-name="gr14" draw:text-style-name="P5" draw:layer="layout" draw:type="line" svg:x1="17.008cm" svg:y1="7.466cm" svg:x2="17.008cm" svg:y2="8.217cm" svg:d="M17008 7466v751" svg:viewBox="0 0 1 752">
          <text:p/>
        </draw:connector>
        <draw:connector draw:style-name="gr14" draw:text-style-name="P5" draw:layer="layout" draw:type="line" svg:x1="17.396cm" svg:y1="7.092cm" svg:x2="18.564cm" svg:y2="7.091cm" svg:d="M17396 7092l1168-1" svg:viewBox="0 0 1169 2">
          <text:p/>
        </draw:connector>
        <draw:connector draw:style-name="gr14" draw:text-style-name="P5" draw:layer="layout" draw:type="line" svg:x1="17.396cm" svg:y1="7.092cm" svg:x2="18.564cm" svg:y2="7.091cm" svg:d="M17396 7092l1168-1" svg:viewBox="0 0 1169 2">
          <text:p/>
        </draw:connector>
        <draw:connector draw:style-name="gr14" draw:text-style-name="P5" draw:layer="layout" draw:type="line" svg:x1="17.396cm" svg:y1="5.592cm" svg:x2="18.563cm" svg:y2="5.591cm" svg:d="M17396 5592l1167-1" svg:viewBox="0 0 1168 2">
          <text:p/>
        </draw:connector>
        <draw:connector draw:style-name="gr14" draw:text-style-name="P5" draw:layer="layout" draw:type="line" svg:x1="17.396cm" svg:y1="5.592cm" svg:x2="18.563cm" svg:y2="5.591cm" svg:d="M17396 5592l1167-1" svg:viewBox="0 0 1168 2">
          <text:p/>
        </draw:connector>
        <draw:connector draw:style-name="gr14" draw:text-style-name="P5" draw:layer="layout" draw:type="line" svg:x1="11.562cm" svg:y1="5.592cm" svg:x2="12.73cm" svg:y2="5.591cm" svg:d="M11562 5592l1168-1" svg:viewBox="0 0 1169 2">
          <text:p/>
        </draw:connector>
        <draw:connector draw:style-name="gr14" draw:text-style-name="P5" draw:layer="layout" draw:type="line" svg:x1="11.562cm" svg:y1="5.592cm" svg:x2="12.73cm" svg:y2="5.591cm" svg:d="M11562 5592l1168-1" svg:viewBox="0 0 1169 2">
          <text:p/>
        </draw:connector>
        <draw:connector draw:style-name="gr14" draw:text-style-name="P5" draw:layer="layout" draw:type="line" svg:x1="11.562cm" svg:y1="7.092cm" svg:x2="12.73cm" svg:y2="7.091cm" svg:d="M11562 7092l1168-1" svg:viewBox="0 0 1169 2">
          <text:p/>
        </draw:connector>
        <draw:connector draw:style-name="gr14" draw:text-style-name="P5" draw:layer="layout" draw:type="line" svg:x1="11.562cm" svg:y1="7.092cm" svg:x2="12.73cm" svg:y2="7.091cm" svg:d="M11562 7092l1168-1" svg:viewBox="0 0 1169 2">
          <text:p/>
        </draw:connector>
        <draw:custom-shape draw:style-name="gr12" draw:text-style-name="P6" xml:id="id53" draw:id="id53" draw:layer="layout" svg:width="0.777cm" svg:height="0.749cm" svg:x="12.73cm" svg:y="3.7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54" draw:id="id54" draw:layer="layout" svg:width="0.777cm" svg:height="0.749cm" svg:x="12.73cm" svg:y="5.2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4.675cm" svg:y="3.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55" draw:id="id55" draw:layer="layout" svg:width="0.777cm" svg:height="0.749cm" svg:x="14.675cm" svg:y="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2.73cm" svg:y="6.7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4.674cm" svg:y="6.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9cm" svg:y="3.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9cm" svg:y="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9cm" svg:y="6.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3" draw:text-style-name="P5" draw:layer="layout" svg:x1="13.119cm" svg:y1="4.466cm" svg:x2="13.119cm" svg:y2="5.217cm" draw:start-shape="id53" draw:start-glue-point="8" draw:end-shape="id54" draw:end-glue-point="4" svg:d="M13119 4466v751" svg:viewBox="0 0 1 752">
          <text:p/>
        </draw:connector>
        <draw:connector draw:style-name="gr13" draw:text-style-name="P5" draw:layer="layout" draw:type="line" svg:x1="13.119cm" svg:y1="4.466cm" svg:x2="13.119cm" svg:y2="5.217cm" draw:start-shape="id53" draw:start-glue-point="8" draw:end-shape="id54" draw:end-glue-point="4" svg:d="M13119 4466v751" svg:viewBox="0 0 1 752">
          <text:p/>
        </draw:connector>
        <draw:connector draw:style-name="gr13" draw:text-style-name="P5" draw:layer="layout" svg:x1="15.063cm" svg:y1="4.466cm" svg:x2="15.063cm" svg:y2="5.217cm" svg:d="M15063 4466v751" svg:viewBox="0 0 1 752">
          <text:p/>
        </draw:connector>
        <draw:connector draw:style-name="gr13" draw:text-style-name="P5" draw:layer="layout" draw:type="line" svg:x1="15.063cm" svg:y1="4.466cm" svg:x2="15.063cm" svg:y2="5.217cm" svg:d="M15063 4466v751" svg:viewBox="0 0 1 752">
          <text:p/>
        </draw:connector>
        <draw:connector draw:style-name="gr13" draw:text-style-name="P5" draw:layer="layout" svg:x1="17.008cm" svg:y1="4.466cm" svg:x2="17.008cm" svg:y2="5.217cm" svg:d="M17008 4466v751" svg:viewBox="0 0 1 752">
          <text:p/>
        </draw:connector>
        <draw:connector draw:style-name="gr13" draw:text-style-name="P5" draw:layer="layout" draw:type="line" svg:x1="17.008cm" svg:y1="4.466cm" svg:x2="17.008cm" svg:y2="5.217cm" svg:d="M17008 4466v751" svg:viewBox="0 0 1 752">
          <text:p/>
        </draw:connector>
        <draw:connector draw:style-name="gr14" draw:text-style-name="P5" draw:layer="layout" svg:x1="13.118cm" svg:y1="5.966cm" svg:x2="13.118cm" svg:y2="6.717cm" svg:d="M13118 5966v751" svg:viewBox="0 0 1 752">
          <text:p/>
        </draw:connector>
        <draw:connector draw:style-name="gr14" draw:text-style-name="P5" draw:layer="layout" draw:type="line" svg:x1="13.118cm" svg:y1="5.966cm" svg:x2="13.118cm" svg:y2="6.717cm" svg:d="M13118 5966v751" svg:viewBox="0 0 1 752">
          <text:p/>
        </draw:connector>
        <draw:connector draw:style-name="gr14" draw:text-style-name="P5" draw:layer="layout" svg:x1="13.118cm" svg:y1="5.967cm" svg:x2="13.118cm" svg:y2="6.717cm" svg:d="M13118 5967v750" svg:viewBox="0 0 1 751">
          <text:p/>
        </draw:connector>
        <draw:connector draw:style-name="gr14" draw:text-style-name="P5" draw:layer="layout" draw:type="line" svg:x1="15.063cm" svg:y1="7.466cm" svg:x2="15.063cm" svg:y2="8.217cm" svg:d="M15063 7466v751" svg:viewBox="0 0 1 752">
          <text:p/>
        </draw:connector>
        <draw:connector draw:style-name="gr14" draw:text-style-name="P5" draw:layer="layout" svg:x1="15.063cm" svg:y1="5.966cm" svg:x2="15.063cm" svg:y2="6.717cm" svg:d="M15063 5966v751" svg:viewBox="0 0 1 752">
          <text:p/>
        </draw:connector>
        <draw:connector draw:style-name="gr14" draw:text-style-name="P5" draw:layer="layout" draw:type="line" svg:x1="15.063cm" svg:y1="5.966cm" svg:x2="15.063cm" svg:y2="6.717cm" svg:d="M15063 5966v751" svg:viewBox="0 0 1 752">
          <text:p/>
        </draw:connector>
        <draw:connector draw:style-name="gr14" draw:text-style-name="P5" draw:layer="layout" svg:x1="15.063cm" svg:y1="5.967cm" svg:x2="15.063cm" svg:y2="6.717cm" svg:d="M15063 5967v750" svg:viewBox="0 0 1 751">
          <text:p/>
        </draw:connector>
        <draw:connector draw:style-name="gr14" draw:text-style-name="P5" draw:layer="layout" draw:type="line" svg:x1="15.063cm" svg:y1="5.967cm" svg:x2="15.063cm" svg:y2="6.717cm" svg:d="M15063 5967v750" svg:viewBox="0 0 1 751">
          <text:p/>
        </draw:connector>
        <draw:connector draw:style-name="gr14" draw:text-style-name="P5" draw:layer="layout" svg:x1="17.008cm" svg:y1="5.966cm" svg:x2="17.008cm" svg:y2="6.717cm" svg:d="M17008 5966v751" svg:viewBox="0 0 1 752">
          <text:p/>
        </draw:connector>
        <draw:connector draw:style-name="gr14" draw:text-style-name="P5" draw:layer="layout" draw:type="line" svg:x1="17.008cm" svg:y1="5.966cm" svg:x2="17.008cm" svg:y2="6.717cm" svg:d="M17008 5966v751" svg:viewBox="0 0 1 752">
          <text:p/>
        </draw:connector>
        <draw:connector draw:style-name="gr14" draw:text-style-name="P5" draw:layer="layout" svg:x1="17.008cm" svg:y1="5.967cm" svg:x2="17.008cm" svg:y2="6.717cm" svg:d="M17008 5967v750" svg:viewBox="0 0 1 751">
          <text:p/>
        </draw:connector>
        <draw:connector draw:style-name="gr14" draw:text-style-name="P5" draw:layer="layout" draw:type="line" svg:x1="17.008cm" svg:y1="5.967cm" svg:x2="17.008cm" svg:y2="6.717cm" svg:d="M17008 5967v750" svg:viewBox="0 0 1 751">
          <text:p/>
        </draw:connector>
        <draw:connector draw:style-name="gr14" draw:text-style-name="P5" draw:layer="layout" draw:type="line" svg:x1="13.507cm" svg:y1="5.592cm" svg:x2="14.675cm" svg:y2="5.591cm" draw:start-shape="id54" draw:start-glue-point="10" draw:end-shape="id55" draw:end-glue-point="6" svg:d="M13507 5592l1168-1" svg:viewBox="0 0 1169 2">
          <text:p/>
        </draw:connector>
        <draw:connector draw:style-name="gr14" draw:text-style-name="P5" draw:layer="layout" draw:type="line" svg:x1="13.507cm" svg:y1="5.592cm" svg:x2="14.675cm" svg:y2="5.591cm" draw:start-shape="id54" draw:start-glue-point="10" draw:end-shape="id55" draw:end-glue-point="6" svg:d="M13507 5592l1168-1" svg:viewBox="0 0 1169 2">
          <text:p/>
        </draw:connector>
        <draw:connector draw:style-name="gr14" draw:text-style-name="P5" draw:layer="layout" draw:type="line" svg:x1="15.452cm" svg:y1="5.592cm" svg:x2="16.619cm" svg:y2="5.591cm" svg:d="M15452 5592l1167-1" svg:viewBox="0 0 1168 2">
          <text:p/>
        </draw:connector>
        <draw:connector draw:style-name="gr14" draw:text-style-name="P5" draw:layer="layout" draw:type="line" svg:x1="15.452cm" svg:y1="5.592cm" svg:x2="16.619cm" svg:y2="5.591cm" svg:d="M15452 5592l1167-1" svg:viewBox="0 0 1168 2">
          <text:p/>
        </draw:connector>
        <draw:connector draw:style-name="gr14" draw:text-style-name="P5" draw:layer="layout" draw:type="line" svg:x1="13.507cm" svg:y1="7.092cm" svg:x2="14.675cm" svg:y2="7.091cm" svg:d="M13507 7092l1168-1" svg:viewBox="0 0 1169 2">
          <text:p/>
        </draw:connector>
        <draw:connector draw:style-name="gr14" draw:text-style-name="P5" draw:layer="layout" draw:type="line" svg:x1="13.507cm" svg:y1="7.092cm" svg:x2="14.675cm" svg:y2="7.091cm" svg:d="M13507 7092l1168-1" svg:viewBox="0 0 1169 2">
          <text:p/>
        </draw:connector>
        <draw:connector draw:style-name="gr14" draw:text-style-name="P5" draw:layer="layout" draw:type="line" svg:x1="15.452cm" svg:y1="7.091cm" svg:x2="16.619cm" svg:y2="7.09cm" svg:d="M15452 7091l1167-1" svg:viewBox="0 0 1168 2">
          <text:p/>
        </draw:connector>
        <draw:connector draw:style-name="gr14" draw:text-style-name="P5" draw:layer="layout" draw:type="line" svg:x1="15.452cm" svg:y1="7.091cm" svg:x2="16.619cm" svg:y2="7.09cm" svg:d="M15452 7091l1167-1" svg:viewBox="0 0 1168 2">
          <text:p/>
        </draw:connector>
        <draw:connector draw:style-name="gr14" draw:text-style-name="P5" draw:layer="layout" draw:type="line" svg:x1="13.118cm" svg:y1="7.466cm" svg:x2="13.118cm" svg:y2="8.217cm" svg:d="M13118 7466v751" svg:viewBox="0 0 1 752">
          <text:p/>
        </draw:connector>
        <draw:connector draw:style-name="gr14" draw:text-style-name="P5" draw:layer="layout" draw:type="line" svg:x1="13.118cm" svg:y1="7.467cm" svg:x2="13.118cm" svg:y2="8.217cm" svg:d="M13118 7467v750" svg:viewBox="0 0 1 751">
          <text:p/>
        </draw:connector>
        <draw:connector draw:style-name="gr14" draw:text-style-name="P5" draw:layer="layout" draw:type="line" svg:x1="17.008cm" svg:y1="7.466cm" svg:x2="17.008cm" svg:y2="8.217cm" svg:d="M17008 7466v751" svg:viewBox="0 0 1 752">
          <text:p/>
        </draw:connector>
        <draw:connector draw:style-name="gr14" draw:text-style-name="P5" draw:layer="layout" draw:type="line" svg:x1="17.396cm" svg:y1="7.092cm" svg:x2="18.564cm" svg:y2="7.091cm" svg:d="M17396 7092l1168-1" svg:viewBox="0 0 1169 2">
          <text:p/>
        </draw:connector>
        <draw:connector draw:style-name="gr14" draw:text-style-name="P5" draw:layer="layout" draw:type="line" svg:x1="17.396cm" svg:y1="7.092cm" svg:x2="18.564cm" svg:y2="7.091cm" svg:d="M17396 7092l1168-1" svg:viewBox="0 0 1169 2">
          <text:p/>
        </draw:connector>
        <draw:connector draw:style-name="gr14" draw:text-style-name="P5" draw:layer="layout" draw:type="line" svg:x1="17.396cm" svg:y1="5.592cm" svg:x2="18.563cm" svg:y2="5.591cm" svg:d="M17396 5592l1167-1" svg:viewBox="0 0 1168 2">
          <text:p/>
        </draw:connector>
        <draw:connector draw:style-name="gr14" draw:text-style-name="P5" draw:layer="layout" draw:type="line" svg:x1="17.396cm" svg:y1="5.592cm" svg:x2="18.563cm" svg:y2="5.591cm" svg:d="M17396 5592l1167-1" svg:viewBox="0 0 1168 2">
          <text:p/>
        </draw:connector>
        <draw:connector draw:style-name="gr14" draw:text-style-name="P5" draw:layer="layout" draw:type="line" svg:x1="11.562cm" svg:y1="5.592cm" svg:x2="12.73cm" svg:y2="5.591cm" svg:d="M11562 5592l1168-1" svg:viewBox="0 0 1169 2">
          <text:p/>
        </draw:connector>
        <draw:connector draw:style-name="gr14" draw:text-style-name="P5" draw:layer="layout" draw:type="line" svg:x1="11.562cm" svg:y1="5.592cm" svg:x2="12.73cm" svg:y2="5.591cm" svg:d="M11562 5592l1168-1" svg:viewBox="0 0 1169 2">
          <text:p/>
        </draw:connector>
        <draw:connector draw:style-name="gr14" draw:text-style-name="P5" draw:layer="layout" draw:type="line" svg:x1="11.562cm" svg:y1="7.092cm" svg:x2="12.73cm" svg:y2="7.091cm" svg:d="M11562 7092l1168-1" svg:viewBox="0 0 1169 2">
          <text:p/>
        </draw:connector>
        <draw:connector draw:style-name="gr14" draw:text-style-name="P5" draw:layer="layout" draw:type="line" svg:x1="11.562cm" svg:y1="7.092cm" svg:x2="12.73cm" svg:y2="7.091cm" svg:d="M11562 7092l1168-1" svg:viewBox="0 0 1169 2">
          <text:p/>
        </draw:connector>
        <draw:custom-shape draw:style-name="gr12" draw:text-style-name="P6" xml:id="id56" draw:id="id56" draw:layer="layout" svg:width="0.777cm" svg:height="0.749cm" svg:x="12.73cm" svg:y="3.7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57" draw:id="id57" draw:layer="layout" svg:width="0.777cm" svg:height="0.749cm" svg:x="12.73cm" svg:y="5.2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4.675cm" svg:y="3.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58" draw:id="id58" draw:layer="layout" svg:width="0.777cm" svg:height="0.749cm" svg:x="14.675cm" svg:y="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2.73cm" svg:y="6.7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4.674cm" svg:y="6.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9cm" svg:y="3.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9cm" svg:y="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9cm" svg:y="6.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3" draw:text-style-name="P5" draw:layer="layout" svg:x1="13.119cm" svg:y1="4.466cm" svg:x2="13.119cm" svg:y2="5.217cm" draw:start-shape="id56" draw:start-glue-point="8" draw:end-shape="id57" draw:end-glue-point="4" svg:d="M13119 4466v751" svg:viewBox="0 0 1 752">
          <text:p/>
        </draw:connector>
        <draw:connector draw:style-name="gr13" draw:text-style-name="P5" draw:layer="layout" draw:type="line" svg:x1="13.119cm" svg:y1="4.466cm" svg:x2="13.119cm" svg:y2="5.217cm" draw:start-shape="id56" draw:start-glue-point="8" draw:end-shape="id57" draw:end-glue-point="4" svg:d="M13119 4466v751" svg:viewBox="0 0 1 752">
          <text:p/>
        </draw:connector>
        <draw:connector draw:style-name="gr13" draw:text-style-name="P5" draw:layer="layout" svg:x1="15.063cm" svg:y1="4.466cm" svg:x2="15.063cm" svg:y2="5.217cm" svg:d="M15063 4466v751" svg:viewBox="0 0 1 752">
          <text:p/>
        </draw:connector>
        <draw:connector draw:style-name="gr13" draw:text-style-name="P5" draw:layer="layout" draw:type="line" svg:x1="15.063cm" svg:y1="4.466cm" svg:x2="15.063cm" svg:y2="5.217cm" svg:d="M15063 4466v751" svg:viewBox="0 0 1 752">
          <text:p/>
        </draw:connector>
        <draw:connector draw:style-name="gr13" draw:text-style-name="P5" draw:layer="layout" svg:x1="17.008cm" svg:y1="4.466cm" svg:x2="17.008cm" svg:y2="5.217cm" svg:d="M17008 4466v751" svg:viewBox="0 0 1 752">
          <text:p/>
        </draw:connector>
        <draw:connector draw:style-name="gr13" draw:text-style-name="P5" draw:layer="layout" draw:type="line" svg:x1="17.008cm" svg:y1="4.466cm" svg:x2="17.008cm" svg:y2="5.217cm" svg:d="M17008 4466v751" svg:viewBox="0 0 1 752">
          <text:p/>
        </draw:connector>
        <draw:connector draw:style-name="gr14" draw:text-style-name="P5" draw:layer="layout" svg:x1="13.118cm" svg:y1="5.966cm" svg:x2="13.118cm" svg:y2="6.717cm" svg:d="M13118 5966v751" svg:viewBox="0 0 1 752">
          <text:p/>
        </draw:connector>
        <draw:connector draw:style-name="gr14" draw:text-style-name="P5" draw:layer="layout" draw:type="line" svg:x1="13.118cm" svg:y1="5.966cm" svg:x2="13.118cm" svg:y2="6.717cm" svg:d="M13118 5966v751" svg:viewBox="0 0 1 752">
          <text:p/>
        </draw:connector>
        <draw:connector draw:style-name="gr14" draw:text-style-name="P5" draw:layer="layout" svg:x1="13.118cm" svg:y1="5.967cm" svg:x2="13.118cm" svg:y2="6.717cm" svg:d="M13118 5967v750" svg:viewBox="0 0 1 751">
          <text:p/>
        </draw:connector>
        <draw:connector draw:style-name="gr14" draw:text-style-name="P5" draw:layer="layout" draw:type="line" svg:x1="15.063cm" svg:y1="7.466cm" svg:x2="15.063cm" svg:y2="8.217cm" svg:d="M15063 7466v751" svg:viewBox="0 0 1 752">
          <text:p/>
        </draw:connector>
        <draw:connector draw:style-name="gr14" draw:text-style-name="P5" draw:layer="layout" svg:x1="15.063cm" svg:y1="5.966cm" svg:x2="15.063cm" svg:y2="6.717cm" svg:d="M15063 5966v751" svg:viewBox="0 0 1 752">
          <text:p/>
        </draw:connector>
        <draw:connector draw:style-name="gr14" draw:text-style-name="P5" draw:layer="layout" draw:type="line" svg:x1="15.063cm" svg:y1="5.966cm" svg:x2="15.063cm" svg:y2="6.717cm" svg:d="M15063 5966v751" svg:viewBox="0 0 1 752">
          <text:p/>
        </draw:connector>
        <draw:connector draw:style-name="gr14" draw:text-style-name="P5" draw:layer="layout" svg:x1="15.063cm" svg:y1="5.967cm" svg:x2="15.063cm" svg:y2="6.717cm" svg:d="M15063 5967v750" svg:viewBox="0 0 1 751">
          <text:p/>
        </draw:connector>
        <draw:connector draw:style-name="gr14" draw:text-style-name="P5" draw:layer="layout" draw:type="line" svg:x1="15.063cm" svg:y1="5.967cm" svg:x2="15.063cm" svg:y2="6.717cm" svg:d="M15063 5967v750" svg:viewBox="0 0 1 751">
          <text:p/>
        </draw:connector>
        <draw:connector draw:style-name="gr14" draw:text-style-name="P5" draw:layer="layout" svg:x1="17.008cm" svg:y1="5.966cm" svg:x2="17.008cm" svg:y2="6.717cm" svg:d="M17008 5966v751" svg:viewBox="0 0 1 752">
          <text:p/>
        </draw:connector>
        <draw:connector draw:style-name="gr14" draw:text-style-name="P5" draw:layer="layout" draw:type="line" svg:x1="17.008cm" svg:y1="5.966cm" svg:x2="17.008cm" svg:y2="6.717cm" svg:d="M17008 5966v751" svg:viewBox="0 0 1 752">
          <text:p/>
        </draw:connector>
        <draw:connector draw:style-name="gr14" draw:text-style-name="P5" draw:layer="layout" svg:x1="17.008cm" svg:y1="5.967cm" svg:x2="17.008cm" svg:y2="6.717cm" svg:d="M17008 5967v750" svg:viewBox="0 0 1 751">
          <text:p/>
        </draw:connector>
        <draw:connector draw:style-name="gr14" draw:text-style-name="P5" draw:layer="layout" draw:type="line" svg:x1="17.008cm" svg:y1="5.967cm" svg:x2="17.008cm" svg:y2="6.717cm" svg:d="M17008 5967v750" svg:viewBox="0 0 1 751">
          <text:p/>
        </draw:connector>
        <draw:connector draw:style-name="gr14" draw:text-style-name="P5" draw:layer="layout" draw:type="line" svg:x1="13.507cm" svg:y1="5.592cm" svg:x2="14.675cm" svg:y2="5.591cm" draw:start-shape="id57" draw:start-glue-point="10" draw:end-shape="id58" draw:end-glue-point="6" svg:d="M13507 5592l1168-1" svg:viewBox="0 0 1169 2">
          <text:p/>
        </draw:connector>
        <draw:connector draw:style-name="gr14" draw:text-style-name="P5" draw:layer="layout" draw:type="line" svg:x1="13.507cm" svg:y1="5.592cm" svg:x2="14.675cm" svg:y2="5.591cm" draw:start-shape="id57" draw:start-glue-point="10" draw:end-shape="id58" draw:end-glue-point="6" svg:d="M13507 5592l1168-1" svg:viewBox="0 0 1169 2">
          <text:p/>
        </draw:connector>
        <draw:connector draw:style-name="gr14" draw:text-style-name="P5" draw:layer="layout" draw:type="line" svg:x1="15.452cm" svg:y1="5.592cm" svg:x2="16.619cm" svg:y2="5.591cm" svg:d="M15452 5592l1167-1" svg:viewBox="0 0 1168 2">
          <text:p/>
        </draw:connector>
        <draw:connector draw:style-name="gr14" draw:text-style-name="P5" draw:layer="layout" draw:type="line" svg:x1="15.452cm" svg:y1="5.592cm" svg:x2="16.619cm" svg:y2="5.591cm" svg:d="M15452 5592l1167-1" svg:viewBox="0 0 1168 2">
          <text:p/>
        </draw:connector>
        <draw:connector draw:style-name="gr14" draw:text-style-name="P5" draw:layer="layout" draw:type="line" svg:x1="13.507cm" svg:y1="7.092cm" svg:x2="14.675cm" svg:y2="7.091cm" svg:d="M13507 7092l1168-1" svg:viewBox="0 0 1169 2">
          <text:p/>
        </draw:connector>
        <draw:connector draw:style-name="gr14" draw:text-style-name="P5" draw:layer="layout" draw:type="line" svg:x1="13.507cm" svg:y1="7.092cm" svg:x2="14.675cm" svg:y2="7.091cm" svg:d="M13507 7092l1168-1" svg:viewBox="0 0 1169 2">
          <text:p/>
        </draw:connector>
        <draw:connector draw:style-name="gr14" draw:text-style-name="P5" draw:layer="layout" draw:type="line" svg:x1="15.452cm" svg:y1="7.091cm" svg:x2="16.619cm" svg:y2="7.09cm" svg:d="M15452 7091l1167-1" svg:viewBox="0 0 1168 2">
          <text:p/>
        </draw:connector>
        <draw:connector draw:style-name="gr14" draw:text-style-name="P5" draw:layer="layout" draw:type="line" svg:x1="15.452cm" svg:y1="7.091cm" svg:x2="16.619cm" svg:y2="7.09cm" svg:d="M15452 7091l1167-1" svg:viewBox="0 0 1168 2">
          <text:p/>
        </draw:connector>
        <draw:connector draw:style-name="gr14" draw:text-style-name="P5" draw:layer="layout" draw:type="line" svg:x1="13.118cm" svg:y1="7.466cm" svg:x2="13.118cm" svg:y2="8.217cm" svg:d="M13118 7466v751" svg:viewBox="0 0 1 752">
          <text:p/>
        </draw:connector>
        <draw:connector draw:style-name="gr14" draw:text-style-name="P5" draw:layer="layout" draw:type="line" svg:x1="13.118cm" svg:y1="7.467cm" svg:x2="13.118cm" svg:y2="8.217cm" svg:d="M13118 7467v750" svg:viewBox="0 0 1 751">
          <text:p/>
        </draw:connector>
        <draw:connector draw:style-name="gr14" draw:text-style-name="P5" draw:layer="layout" draw:type="line" svg:x1="17.008cm" svg:y1="7.466cm" svg:x2="17.008cm" svg:y2="8.217cm" svg:d="M17008 7466v751" svg:viewBox="0 0 1 752">
          <text:p/>
        </draw:connector>
        <draw:connector draw:style-name="gr14" draw:text-style-name="P5" draw:layer="layout" draw:type="line" svg:x1="17.396cm" svg:y1="7.092cm" svg:x2="18.564cm" svg:y2="7.091cm" svg:d="M17396 7092l1168-1" svg:viewBox="0 0 1169 2">
          <text:p/>
        </draw:connector>
        <draw:connector draw:style-name="gr14" draw:text-style-name="P5" draw:layer="layout" draw:type="line" svg:x1="17.396cm" svg:y1="7.092cm" svg:x2="18.564cm" svg:y2="7.091cm" svg:d="M17396 7092l1168-1" svg:viewBox="0 0 1169 2">
          <text:p/>
        </draw:connector>
        <draw:connector draw:style-name="gr14" draw:text-style-name="P5" draw:layer="layout" draw:type="line" svg:x1="17.396cm" svg:y1="5.592cm" svg:x2="18.563cm" svg:y2="5.591cm" svg:d="M17396 5592l1167-1" svg:viewBox="0 0 1168 2">
          <text:p/>
        </draw:connector>
        <draw:connector draw:style-name="gr14" draw:text-style-name="P5" draw:layer="layout" draw:type="line" svg:x1="17.396cm" svg:y1="5.592cm" svg:x2="18.563cm" svg:y2="5.591cm" svg:d="M17396 5592l1167-1" svg:viewBox="0 0 1168 2">
          <text:p/>
        </draw:connector>
        <draw:connector draw:style-name="gr14" draw:text-style-name="P5" draw:layer="layout" draw:type="line" svg:x1="11.562cm" svg:y1="5.592cm" svg:x2="12.73cm" svg:y2="5.591cm" svg:d="M11562 5592l1168-1" svg:viewBox="0 0 1169 2">
          <text:p/>
        </draw:connector>
        <draw:connector draw:style-name="gr14" draw:text-style-name="P5" draw:layer="layout" draw:type="line" svg:x1="11.562cm" svg:y1="5.592cm" svg:x2="12.73cm" svg:y2="5.591cm" svg:d="M11562 5592l1168-1" svg:viewBox="0 0 1169 2">
          <text:p/>
        </draw:connector>
        <draw:connector draw:style-name="gr14" draw:text-style-name="P5" draw:layer="layout" draw:type="line" svg:x1="11.562cm" svg:y1="7.092cm" svg:x2="12.73cm" svg:y2="7.091cm" svg:d="M11562 7092l1168-1" svg:viewBox="0 0 1169 2">
          <text:p/>
        </draw:connector>
        <draw:connector draw:style-name="gr14" draw:text-style-name="P5" draw:layer="layout" draw:type="line" svg:x1="11.562cm" svg:y1="7.092cm" svg:x2="12.73cm" svg:y2="7.091cm" svg:d="M11562 7092l1168-1" svg:viewBox="0 0 1169 2">
          <text:p/>
        </draw:connector>
        <draw:custom-shape draw:style-name="gr12" draw:text-style-name="P6" xml:id="id59" draw:id="id59" draw:layer="layout" svg:width="0.777cm" svg:height="0.749cm" svg:x="12.73cm" svg:y="3.7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60" draw:id="id60" draw:layer="layout" svg:width="0.777cm" svg:height="0.749cm" svg:x="12.73cm" svg:y="5.2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4.675cm" svg:y="3.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61" draw:id="id61" draw:layer="layout" svg:width="0.777cm" svg:height="0.749cm" svg:x="14.675cm" svg:y="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2.73cm" svg:y="6.7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4.674cm" svg:y="6.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9cm" svg:y="3.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9cm" svg:y="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9cm" svg:y="6.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3" draw:text-style-name="P5" draw:layer="layout" svg:x1="13.119cm" svg:y1="4.466cm" svg:x2="13.119cm" svg:y2="5.217cm" draw:start-shape="id59" draw:start-glue-point="8" draw:end-shape="id60" draw:end-glue-point="4" svg:d="M13119 4466v751" svg:viewBox="0 0 1 752">
          <text:p/>
        </draw:connector>
        <draw:connector draw:style-name="gr13" draw:text-style-name="P5" draw:layer="layout" draw:type="line" svg:x1="13.119cm" svg:y1="4.466cm" svg:x2="13.119cm" svg:y2="5.217cm" draw:start-shape="id59" draw:start-glue-point="8" draw:end-shape="id60" draw:end-glue-point="4" svg:d="M13119 4466v751" svg:viewBox="0 0 1 752">
          <text:p/>
        </draw:connector>
        <draw:connector draw:style-name="gr13" draw:text-style-name="P5" draw:layer="layout" svg:x1="15.063cm" svg:y1="4.466cm" svg:x2="15.063cm" svg:y2="5.217cm" svg:d="M15063 4466v751" svg:viewBox="0 0 1 752">
          <text:p/>
        </draw:connector>
        <draw:connector draw:style-name="gr13" draw:text-style-name="P5" draw:layer="layout" draw:type="line" svg:x1="15.063cm" svg:y1="4.466cm" svg:x2="15.063cm" svg:y2="5.217cm" svg:d="M15063 4466v751" svg:viewBox="0 0 1 752">
          <text:p/>
        </draw:connector>
        <draw:connector draw:style-name="gr13" draw:text-style-name="P5" draw:layer="layout" svg:x1="17.008cm" svg:y1="4.466cm" svg:x2="17.008cm" svg:y2="5.217cm" svg:d="M17008 4466v751" svg:viewBox="0 0 1 752">
          <text:p/>
        </draw:connector>
        <draw:connector draw:style-name="gr13" draw:text-style-name="P5" draw:layer="layout" draw:type="line" svg:x1="17.008cm" svg:y1="4.466cm" svg:x2="17.008cm" svg:y2="5.217cm" svg:d="M17008 4466v751" svg:viewBox="0 0 1 752">
          <text:p/>
        </draw:connector>
        <draw:connector draw:style-name="gr14" draw:text-style-name="P5" draw:layer="layout" svg:x1="13.118cm" svg:y1="5.966cm" svg:x2="13.118cm" svg:y2="6.717cm" svg:d="M13118 5966v751" svg:viewBox="0 0 1 752">
          <text:p/>
        </draw:connector>
        <draw:connector draw:style-name="gr14" draw:text-style-name="P5" draw:layer="layout" draw:type="line" svg:x1="13.118cm" svg:y1="5.966cm" svg:x2="13.118cm" svg:y2="6.717cm" svg:d="M13118 5966v751" svg:viewBox="0 0 1 752">
          <text:p/>
        </draw:connector>
        <draw:connector draw:style-name="gr14" draw:text-style-name="P5" draw:layer="layout" svg:x1="13.118cm" svg:y1="5.967cm" svg:x2="13.118cm" svg:y2="6.717cm" svg:d="M13118 5967v750" svg:viewBox="0 0 1 751">
          <text:p/>
        </draw:connector>
        <draw:connector draw:style-name="gr14" draw:text-style-name="P5" draw:layer="layout" draw:type="line" svg:x1="15.063cm" svg:y1="7.466cm" svg:x2="15.063cm" svg:y2="8.217cm" svg:d="M15063 7466v751" svg:viewBox="0 0 1 752">
          <text:p/>
        </draw:connector>
        <draw:connector draw:style-name="gr14" draw:text-style-name="P5" draw:layer="layout" svg:x1="15.063cm" svg:y1="5.966cm" svg:x2="15.063cm" svg:y2="6.717cm" svg:d="M15063 5966v751" svg:viewBox="0 0 1 752">
          <text:p/>
        </draw:connector>
        <draw:connector draw:style-name="gr14" draw:text-style-name="P5" draw:layer="layout" draw:type="line" svg:x1="15.063cm" svg:y1="5.966cm" svg:x2="15.063cm" svg:y2="6.717cm" svg:d="M15063 5966v751" svg:viewBox="0 0 1 752">
          <text:p/>
        </draw:connector>
        <draw:connector draw:style-name="gr14" draw:text-style-name="P5" draw:layer="layout" svg:x1="15.063cm" svg:y1="5.967cm" svg:x2="15.063cm" svg:y2="6.717cm" svg:d="M15063 5967v750" svg:viewBox="0 0 1 751">
          <text:p/>
        </draw:connector>
        <draw:connector draw:style-name="gr14" draw:text-style-name="P5" draw:layer="layout" draw:type="line" svg:x1="15.063cm" svg:y1="5.967cm" svg:x2="15.063cm" svg:y2="6.717cm" svg:d="M15063 5967v750" svg:viewBox="0 0 1 751">
          <text:p/>
        </draw:connector>
        <draw:connector draw:style-name="gr14" draw:text-style-name="P5" draw:layer="layout" svg:x1="17.008cm" svg:y1="5.966cm" svg:x2="17.008cm" svg:y2="6.717cm" svg:d="M17008 5966v751" svg:viewBox="0 0 1 752">
          <text:p/>
        </draw:connector>
        <draw:connector draw:style-name="gr14" draw:text-style-name="P5" draw:layer="layout" draw:type="line" svg:x1="17.008cm" svg:y1="5.966cm" svg:x2="17.008cm" svg:y2="6.717cm" svg:d="M17008 5966v751" svg:viewBox="0 0 1 752">
          <text:p/>
        </draw:connector>
        <draw:connector draw:style-name="gr14" draw:text-style-name="P5" draw:layer="layout" svg:x1="17.008cm" svg:y1="5.967cm" svg:x2="17.008cm" svg:y2="6.717cm" svg:d="M17008 5967v750" svg:viewBox="0 0 1 751">
          <text:p/>
        </draw:connector>
        <draw:connector draw:style-name="gr14" draw:text-style-name="P5" draw:layer="layout" draw:type="line" svg:x1="17.008cm" svg:y1="5.967cm" svg:x2="17.008cm" svg:y2="6.717cm" svg:d="M17008 5967v750" svg:viewBox="0 0 1 751">
          <text:p/>
        </draw:connector>
        <draw:connector draw:style-name="gr14" draw:text-style-name="P5" draw:layer="layout" draw:type="line" svg:x1="13.507cm" svg:y1="5.592cm" svg:x2="14.675cm" svg:y2="5.591cm" draw:start-shape="id60" draw:start-glue-point="10" draw:end-shape="id61" draw:end-glue-point="6" svg:d="M13507 5592l1168-1" svg:viewBox="0 0 1169 2">
          <text:p/>
        </draw:connector>
        <draw:connector draw:style-name="gr14" draw:text-style-name="P5" draw:layer="layout" draw:type="line" svg:x1="13.507cm" svg:y1="5.592cm" svg:x2="14.675cm" svg:y2="5.591cm" draw:start-shape="id60" draw:start-glue-point="10" draw:end-shape="id61" draw:end-glue-point="6" svg:d="M13507 5592l1168-1" svg:viewBox="0 0 1169 2">
          <text:p/>
        </draw:connector>
        <draw:connector draw:style-name="gr14" draw:text-style-name="P5" draw:layer="layout" draw:type="line" svg:x1="15.452cm" svg:y1="5.592cm" svg:x2="16.619cm" svg:y2="5.591cm" svg:d="M15452 5592l1167-1" svg:viewBox="0 0 1168 2">
          <text:p/>
        </draw:connector>
        <draw:connector draw:style-name="gr14" draw:text-style-name="P5" draw:layer="layout" draw:type="line" svg:x1="15.452cm" svg:y1="5.592cm" svg:x2="16.619cm" svg:y2="5.591cm" svg:d="M15452 5592l1167-1" svg:viewBox="0 0 1168 2">
          <text:p/>
        </draw:connector>
        <draw:connector draw:style-name="gr14" draw:text-style-name="P5" draw:layer="layout" draw:type="line" svg:x1="13.507cm" svg:y1="7.092cm" svg:x2="14.675cm" svg:y2="7.091cm" svg:d="M13507 7092l1168-1" svg:viewBox="0 0 1169 2">
          <text:p/>
        </draw:connector>
        <draw:connector draw:style-name="gr14" draw:text-style-name="P5" draw:layer="layout" draw:type="line" svg:x1="13.507cm" svg:y1="7.092cm" svg:x2="14.675cm" svg:y2="7.091cm" svg:d="M13507 7092l1168-1" svg:viewBox="0 0 1169 2">
          <text:p/>
        </draw:connector>
        <draw:connector draw:style-name="gr14" draw:text-style-name="P5" draw:layer="layout" draw:type="line" svg:x1="15.452cm" svg:y1="7.091cm" svg:x2="16.619cm" svg:y2="7.09cm" svg:d="M15452 7091l1167-1" svg:viewBox="0 0 1168 2">
          <text:p/>
        </draw:connector>
        <draw:connector draw:style-name="gr14" draw:text-style-name="P5" draw:layer="layout" draw:type="line" svg:x1="15.452cm" svg:y1="7.091cm" svg:x2="16.619cm" svg:y2="7.09cm" svg:d="M15452 7091l1167-1" svg:viewBox="0 0 1168 2">
          <text:p/>
        </draw:connector>
        <draw:connector draw:style-name="gr14" draw:text-style-name="P5" draw:layer="layout" draw:type="line" svg:x1="13.118cm" svg:y1="7.466cm" svg:x2="13.118cm" svg:y2="8.217cm" svg:d="M13118 7466v751" svg:viewBox="0 0 1 752">
          <text:p/>
        </draw:connector>
        <draw:connector draw:style-name="gr14" draw:text-style-name="P5" draw:layer="layout" draw:type="line" svg:x1="13.118cm" svg:y1="7.467cm" svg:x2="13.118cm" svg:y2="8.217cm" svg:d="M13118 7467v750" svg:viewBox="0 0 1 751">
          <text:p/>
        </draw:connector>
        <draw:connector draw:style-name="gr14" draw:text-style-name="P5" draw:layer="layout" draw:type="line" svg:x1="17.008cm" svg:y1="7.466cm" svg:x2="17.008cm" svg:y2="8.217cm" svg:d="M17008 7466v751" svg:viewBox="0 0 1 752">
          <text:p/>
        </draw:connector>
        <draw:connector draw:style-name="gr14" draw:text-style-name="P5" draw:layer="layout" draw:type="line" svg:x1="17.396cm" svg:y1="7.092cm" svg:x2="18.564cm" svg:y2="7.091cm" svg:d="M17396 7092l1168-1" svg:viewBox="0 0 1169 2">
          <text:p/>
        </draw:connector>
        <draw:connector draw:style-name="gr14" draw:text-style-name="P5" draw:layer="layout" draw:type="line" svg:x1="17.396cm" svg:y1="7.092cm" svg:x2="18.564cm" svg:y2="7.091cm" svg:d="M17396 7092l1168-1" svg:viewBox="0 0 1169 2">
          <text:p/>
        </draw:connector>
        <draw:connector draw:style-name="gr14" draw:text-style-name="P5" draw:layer="layout" draw:type="line" svg:x1="17.396cm" svg:y1="5.592cm" svg:x2="18.563cm" svg:y2="5.591cm" svg:d="M17396 5592l1167-1" svg:viewBox="0 0 1168 2">
          <text:p/>
        </draw:connector>
        <draw:connector draw:style-name="gr14" draw:text-style-name="P5" draw:layer="layout" draw:type="line" svg:x1="17.396cm" svg:y1="5.592cm" svg:x2="18.563cm" svg:y2="5.591cm" svg:d="M17396 5592l1167-1" svg:viewBox="0 0 1168 2">
          <text:p/>
        </draw:connector>
        <draw:connector draw:style-name="gr14" draw:text-style-name="P5" draw:layer="layout" draw:type="line" svg:x1="11.562cm" svg:y1="5.592cm" svg:x2="12.73cm" svg:y2="5.591cm" svg:d="M11562 5592l1168-1" svg:viewBox="0 0 1169 2">
          <text:p/>
        </draw:connector>
        <draw:connector draw:style-name="gr14" draw:text-style-name="P5" draw:layer="layout" draw:type="line" svg:x1="11.562cm" svg:y1="5.592cm" svg:x2="12.73cm" svg:y2="5.591cm" svg:d="M11562 5592l1168-1" svg:viewBox="0 0 1169 2">
          <text:p/>
        </draw:connector>
        <draw:connector draw:style-name="gr14" draw:text-style-name="P5" draw:layer="layout" draw:type="line" svg:x1="11.562cm" svg:y1="7.092cm" svg:x2="12.73cm" svg:y2="7.091cm" svg:d="M11562 7092l1168-1" svg:viewBox="0 0 1169 2">
          <text:p/>
        </draw:connector>
        <draw:connector draw:style-name="gr14" draw:text-style-name="P5" draw:layer="layout" draw:type="line" svg:x1="11.562cm" svg:y1="7.092cm" svg:x2="12.73cm" svg:y2="7.091cm" svg:d="M11562 7092l1168-1" svg:viewBox="0 0 1169 2">
          <text:p/>
        </draw:connector>
        <draw:custom-shape draw:style-name="gr12" draw:text-style-name="P6" xml:id="id62" draw:id="id62" draw:layer="layout" svg:width="0.777cm" svg:height="0.749cm" svg:x="12.73cm" svg:y="3.7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63" draw:id="id63" draw:layer="layout" svg:width="0.777cm" svg:height="0.749cm" svg:x="12.73cm" svg:y="5.2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4.675cm" svg:y="3.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64" draw:id="id64" draw:layer="layout" svg:width="0.777cm" svg:height="0.749cm" svg:x="14.675cm" svg:y="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2.73cm" svg:y="6.7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4.674cm" svg:y="6.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9cm" svg:y="3.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9cm" svg:y="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9cm" svg:y="6.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3" draw:text-style-name="P5" draw:layer="layout" svg:x1="13.119cm" svg:y1="4.466cm" svg:x2="13.119cm" svg:y2="5.217cm" draw:start-shape="id62" draw:start-glue-point="8" draw:end-shape="id63" draw:end-glue-point="4" svg:d="M13119 4466v751" svg:viewBox="0 0 1 752">
          <text:p/>
        </draw:connector>
        <draw:connector draw:style-name="gr13" draw:text-style-name="P5" draw:layer="layout" draw:type="line" svg:x1="13.119cm" svg:y1="4.466cm" svg:x2="13.119cm" svg:y2="5.217cm" draw:start-shape="id62" draw:start-glue-point="8" draw:end-shape="id63" draw:end-glue-point="4" svg:d="M13119 4466v751" svg:viewBox="0 0 1 752">
          <text:p/>
        </draw:connector>
        <draw:connector draw:style-name="gr13" draw:text-style-name="P5" draw:layer="layout" svg:x1="15.063cm" svg:y1="4.466cm" svg:x2="15.063cm" svg:y2="5.217cm" svg:d="M15063 4466v751" svg:viewBox="0 0 1 752">
          <text:p/>
        </draw:connector>
        <draw:connector draw:style-name="gr13" draw:text-style-name="P5" draw:layer="layout" draw:type="line" svg:x1="15.063cm" svg:y1="4.466cm" svg:x2="15.063cm" svg:y2="5.217cm" svg:d="M15063 4466v751" svg:viewBox="0 0 1 752">
          <text:p/>
        </draw:connector>
        <draw:connector draw:style-name="gr13" draw:text-style-name="P5" draw:layer="layout" svg:x1="17.008cm" svg:y1="4.466cm" svg:x2="17.008cm" svg:y2="5.217cm" svg:d="M17008 4466v751" svg:viewBox="0 0 1 752">
          <text:p/>
        </draw:connector>
        <draw:connector draw:style-name="gr13" draw:text-style-name="P5" draw:layer="layout" draw:type="line" svg:x1="17.008cm" svg:y1="4.466cm" svg:x2="17.008cm" svg:y2="5.217cm" svg:d="M17008 4466v751" svg:viewBox="0 0 1 752">
          <text:p/>
        </draw:connector>
        <draw:connector draw:style-name="gr14" draw:text-style-name="P5" draw:layer="layout" svg:x1="13.118cm" svg:y1="5.966cm" svg:x2="13.118cm" svg:y2="6.717cm" svg:d="M13118 5966v751" svg:viewBox="0 0 1 752">
          <text:p/>
        </draw:connector>
        <draw:connector draw:style-name="gr14" draw:text-style-name="P5" draw:layer="layout" draw:type="line" svg:x1="13.118cm" svg:y1="5.966cm" svg:x2="13.118cm" svg:y2="6.717cm" svg:d="M13118 5966v751" svg:viewBox="0 0 1 752">
          <text:p/>
        </draw:connector>
        <draw:connector draw:style-name="gr14" draw:text-style-name="P5" draw:layer="layout" svg:x1="13.118cm" svg:y1="5.967cm" svg:x2="13.118cm" svg:y2="6.717cm" svg:d="M13118 5967v750" svg:viewBox="0 0 1 751">
          <text:p/>
        </draw:connector>
        <draw:connector draw:style-name="gr14" draw:text-style-name="P5" draw:layer="layout" draw:type="line" svg:x1="15.063cm" svg:y1="7.466cm" svg:x2="15.063cm" svg:y2="8.217cm" svg:d="M15063 7466v751" svg:viewBox="0 0 1 752">
          <text:p/>
        </draw:connector>
        <draw:connector draw:style-name="gr14" draw:text-style-name="P5" draw:layer="layout" svg:x1="15.063cm" svg:y1="5.966cm" svg:x2="15.063cm" svg:y2="6.717cm" svg:d="M15063 5966v751" svg:viewBox="0 0 1 752">
          <text:p/>
        </draw:connector>
        <draw:connector draw:style-name="gr14" draw:text-style-name="P5" draw:layer="layout" draw:type="line" svg:x1="15.063cm" svg:y1="5.966cm" svg:x2="15.063cm" svg:y2="6.717cm" svg:d="M15063 5966v751" svg:viewBox="0 0 1 752">
          <text:p/>
        </draw:connector>
        <draw:connector draw:style-name="gr14" draw:text-style-name="P5" draw:layer="layout" svg:x1="15.063cm" svg:y1="5.967cm" svg:x2="15.063cm" svg:y2="6.717cm" svg:d="M15063 5967v750" svg:viewBox="0 0 1 751">
          <text:p/>
        </draw:connector>
        <draw:connector draw:style-name="gr14" draw:text-style-name="P5" draw:layer="layout" draw:type="line" svg:x1="15.063cm" svg:y1="5.967cm" svg:x2="15.063cm" svg:y2="6.717cm" svg:d="M15063 5967v750" svg:viewBox="0 0 1 751">
          <text:p/>
        </draw:connector>
        <draw:connector draw:style-name="gr14" draw:text-style-name="P5" draw:layer="layout" svg:x1="17.008cm" svg:y1="5.966cm" svg:x2="17.008cm" svg:y2="6.717cm" svg:d="M17008 5966v751" svg:viewBox="0 0 1 752">
          <text:p/>
        </draw:connector>
        <draw:connector draw:style-name="gr14" draw:text-style-name="P5" draw:layer="layout" draw:type="line" svg:x1="17.008cm" svg:y1="5.966cm" svg:x2="17.008cm" svg:y2="6.717cm" svg:d="M17008 5966v751" svg:viewBox="0 0 1 752">
          <text:p/>
        </draw:connector>
        <draw:connector draw:style-name="gr14" draw:text-style-name="P5" draw:layer="layout" svg:x1="17.008cm" svg:y1="5.967cm" svg:x2="17.008cm" svg:y2="6.717cm" svg:d="M17008 5967v750" svg:viewBox="0 0 1 751">
          <text:p/>
        </draw:connector>
        <draw:connector draw:style-name="gr14" draw:text-style-name="P5" draw:layer="layout" draw:type="line" svg:x1="17.008cm" svg:y1="5.967cm" svg:x2="17.008cm" svg:y2="6.717cm" svg:d="M17008 5967v750" svg:viewBox="0 0 1 751">
          <text:p/>
        </draw:connector>
        <draw:connector draw:style-name="gr14" draw:text-style-name="P5" draw:layer="layout" draw:type="line" svg:x1="13.507cm" svg:y1="5.592cm" svg:x2="14.675cm" svg:y2="5.591cm" draw:start-shape="id63" draw:start-glue-point="10" draw:end-shape="id64" draw:end-glue-point="6" svg:d="M13507 5592l1168-1" svg:viewBox="0 0 1169 2">
          <text:p/>
        </draw:connector>
        <draw:connector draw:style-name="gr14" draw:text-style-name="P5" draw:layer="layout" draw:type="line" svg:x1="13.507cm" svg:y1="5.592cm" svg:x2="14.675cm" svg:y2="5.591cm" draw:start-shape="id63" draw:start-glue-point="10" draw:end-shape="id64" draw:end-glue-point="6" svg:d="M13507 5592l1168-1" svg:viewBox="0 0 1169 2">
          <text:p/>
        </draw:connector>
        <draw:connector draw:style-name="gr14" draw:text-style-name="P5" draw:layer="layout" draw:type="line" svg:x1="15.452cm" svg:y1="5.592cm" svg:x2="16.619cm" svg:y2="5.591cm" svg:d="M15452 5592l1167-1" svg:viewBox="0 0 1168 2">
          <text:p/>
        </draw:connector>
        <draw:connector draw:style-name="gr14" draw:text-style-name="P5" draw:layer="layout" draw:type="line" svg:x1="15.452cm" svg:y1="5.592cm" svg:x2="16.619cm" svg:y2="5.591cm" svg:d="M15452 5592l1167-1" svg:viewBox="0 0 1168 2">
          <text:p/>
        </draw:connector>
        <draw:connector draw:style-name="gr14" draw:text-style-name="P5" draw:layer="layout" draw:type="line" svg:x1="13.507cm" svg:y1="7.092cm" svg:x2="14.675cm" svg:y2="7.091cm" svg:d="M13507 7092l1168-1" svg:viewBox="0 0 1169 2">
          <text:p/>
        </draw:connector>
        <draw:connector draw:style-name="gr14" draw:text-style-name="P5" draw:layer="layout" draw:type="line" svg:x1="13.507cm" svg:y1="7.092cm" svg:x2="14.675cm" svg:y2="7.091cm" svg:d="M13507 7092l1168-1" svg:viewBox="0 0 1169 2">
          <text:p/>
        </draw:connector>
        <draw:connector draw:style-name="gr14" draw:text-style-name="P5" draw:layer="layout" draw:type="line" svg:x1="15.452cm" svg:y1="7.091cm" svg:x2="16.619cm" svg:y2="7.09cm" svg:d="M15452 7091l1167-1" svg:viewBox="0 0 1168 2">
          <text:p/>
        </draw:connector>
        <draw:connector draw:style-name="gr14" draw:text-style-name="P5" draw:layer="layout" draw:type="line" svg:x1="15.452cm" svg:y1="7.091cm" svg:x2="16.619cm" svg:y2="7.09cm" svg:d="M15452 7091l1167-1" svg:viewBox="0 0 1168 2">
          <text:p/>
        </draw:connector>
        <draw:connector draw:style-name="gr14" draw:text-style-name="P5" draw:layer="layout" draw:type="line" svg:x1="13.118cm" svg:y1="7.466cm" svg:x2="13.118cm" svg:y2="8.217cm" svg:d="M13118 7466v751" svg:viewBox="0 0 1 752">
          <text:p/>
        </draw:connector>
        <draw:connector draw:style-name="gr14" draw:text-style-name="P5" draw:layer="layout" draw:type="line" svg:x1="13.119cm" svg:y1="7.467cm" svg:x2="13.119cm" svg:y2="8.218cm" svg:d="M13119 7467v751" svg:viewBox="0 0 1 752">
          <text:p/>
        </draw:connector>
        <draw:connector draw:style-name="gr14" draw:text-style-name="P5" draw:layer="layout" draw:type="line" svg:x1="17.008cm" svg:y1="7.466cm" svg:x2="17.008cm" svg:y2="8.217cm" svg:d="M17008 7466v751" svg:viewBox="0 0 1 752">
          <text:p/>
        </draw:connector>
        <draw:connector draw:style-name="gr14" draw:text-style-name="P5" draw:layer="layout" draw:type="line" svg:x1="17.396cm" svg:y1="7.092cm" svg:x2="18.564cm" svg:y2="7.091cm" svg:d="M17396 7092l1168-1" svg:viewBox="0 0 1169 2">
          <text:p/>
        </draw:connector>
        <draw:connector draw:style-name="gr14" draw:text-style-name="P5" draw:layer="layout" draw:type="line" svg:x1="17.396cm" svg:y1="7.092cm" svg:x2="18.564cm" svg:y2="7.091cm" svg:d="M17396 7092l1168-1" svg:viewBox="0 0 1169 2">
          <text:p/>
        </draw:connector>
        <draw:connector draw:style-name="gr14" draw:text-style-name="P5" draw:layer="layout" draw:type="line" svg:x1="17.396cm" svg:y1="5.592cm" svg:x2="18.563cm" svg:y2="5.591cm" svg:d="M17396 5592l1167-1" svg:viewBox="0 0 1168 2">
          <text:p/>
        </draw:connector>
        <draw:connector draw:style-name="gr14" draw:text-style-name="P5" draw:layer="layout" draw:type="line" svg:x1="17.396cm" svg:y1="5.592cm" svg:x2="18.563cm" svg:y2="5.591cm" svg:d="M17396 5592l1167-1" svg:viewBox="0 0 1168 2">
          <text:p/>
        </draw:connector>
        <draw:connector draw:style-name="gr14" draw:text-style-name="P5" draw:layer="layout" draw:type="line" svg:x1="11.562cm" svg:y1="5.592cm" svg:x2="12.73cm" svg:y2="5.591cm" svg:d="M11562 5592l1168-1" svg:viewBox="0 0 1169 2">
          <text:p/>
        </draw:connector>
        <draw:connector draw:style-name="gr14" draw:text-style-name="P5" draw:layer="layout" draw:type="line" svg:x1="11.562cm" svg:y1="5.592cm" svg:x2="12.73cm" svg:y2="5.591cm" svg:d="M11562 5592l1168-1" svg:viewBox="0 0 1169 2">
          <text:p/>
        </draw:connector>
        <draw:connector draw:style-name="gr14" draw:text-style-name="P5" draw:layer="layout" draw:type="line" svg:x1="11.562cm" svg:y1="7.092cm" svg:x2="12.73cm" svg:y2="7.091cm" svg:d="M11562 7092l1168-1" svg:viewBox="0 0 1169 2">
          <text:p/>
        </draw:connector>
        <draw:connector draw:style-name="gr14" draw:text-style-name="P5" draw:layer="layout" draw:type="line" svg:x1="11.562cm" svg:y1="7.092cm" svg:x2="12.73cm" svg:y2="7.091cm" svg:d="M11562 7092l1168-1" svg:viewBox="0 0 1169 2">
          <text:p/>
        </draw:connector>
        <draw:custom-shape draw:style-name="gr17" draw:text-style-name="P6" draw:layer="layout" svg:width="0.777cm" svg:height="0.75cm" svg:x="12.73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65" draw:id="id65" draw:layer="layout" svg:width="0.777cm" svg:height="0.749cm" svg:x="12.73cm" svg:y="12.4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4.674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66" draw:id="id66" draw:layer="layout" svg:width="0.777cm" svg:height="0.749cm" svg:x="14.674cm" svg:y="1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2.729cm" svg:y="13.9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4.673cm" svg:y="1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8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8cm" svg:y="1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7cm" svg:y="1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 draw:text-style-name="P5" draw:layer="layout" svg:x1="13.118cm" svg:y1="13.22cm" svg:x2="13.118cm" svg:y2="13.971cm" svg:d="M13118 13220v751" svg:viewBox="0 0 1 752">
          <text:p/>
        </draw:connector>
        <draw:connector draw:style-name="gr14" draw:text-style-name="P5" draw:layer="layout" draw:type="line" svg:x1="13.118cm" svg:y1="13.22cm" svg:x2="13.118cm" svg:y2="13.971cm" svg:d="M13118 13220v751" svg:viewBox="0 0 1 752">
          <text:p/>
        </draw:connector>
        <draw:connector draw:style-name="gr14" draw:text-style-name="P5" draw:layer="layout" svg:x1="13.118cm" svg:y1="13.221cm" svg:x2="13.118cm" svg:y2="13.971cm" svg:d="M13118 13221v750" svg:viewBox="0 0 1 751">
          <text:p/>
        </draw:connector>
        <draw:connector draw:style-name="gr14" draw:text-style-name="P5" draw:layer="layout" draw:type="line" svg:x1="15.063cm" svg:y1="11.718cm" svg:x2="15.063cm" svg:y2="12.469cm" svg:d="M15063 11718v751" svg:viewBox="0 0 1 752">
          <text:p/>
        </draw:connector>
        <draw:connector draw:style-name="gr14" draw:text-style-name="P5" draw:layer="layout" svg:x1="15.062cm" svg:y1="13.22cm" svg:x2="15.062cm" svg:y2="13.971cm" svg:d="M15062 13220v751" svg:viewBox="0 0 1 752">
          <text:p/>
        </draw:connector>
        <draw:connector draw:style-name="gr14" draw:text-style-name="P5" draw:layer="layout" draw:type="line" svg:x1="15.062cm" svg:y1="13.22cm" svg:x2="15.062cm" svg:y2="13.971cm" svg:d="M15062 13220v751" svg:viewBox="0 0 1 752">
          <text:p/>
        </draw:connector>
        <draw:connector draw:style-name="gr14" draw:text-style-name="P5" draw:layer="layout" svg:x1="15.062cm" svg:y1="13.221cm" svg:x2="15.062cm" svg:y2="13.971cm" svg:d="M15062 13221v750" svg:viewBox="0 0 1 751">
          <text:p/>
        </draw:connector>
        <draw:connector draw:style-name="gr14" draw:text-style-name="P5" draw:layer="layout" draw:type="line" svg:x1="15.062cm" svg:y1="13.221cm" svg:x2="15.062cm" svg:y2="13.971cm" svg:d="M15062 13221v750" svg:viewBox="0 0 1 751">
          <text:p/>
        </draw:connector>
        <draw:connector draw:style-name="gr14" draw:text-style-name="P5" draw:layer="layout" svg:x1="17.006cm" svg:y1="13.22cm" svg:x2="17.006cm" svg:y2="13.971cm" svg:d="M17006 13220v751" svg:viewBox="0 0 1 752">
          <text:p/>
        </draw:connector>
        <draw:connector draw:style-name="gr14" draw:text-style-name="P5" draw:layer="layout" draw:type="line" svg:x1="17.006cm" svg:y1="13.22cm" svg:x2="17.006cm" svg:y2="13.971cm" svg:d="M17006 13220v751" svg:viewBox="0 0 1 752">
          <text:p/>
        </draw:connector>
        <draw:connector draw:style-name="gr14" draw:text-style-name="P5" draw:layer="layout" svg:x1="17.006cm" svg:y1="13.221cm" svg:x2="17.006cm" svg:y2="13.971cm" svg:d="M17006 13221v750" svg:viewBox="0 0 1 751">
          <text:p/>
        </draw:connector>
        <draw:connector draw:style-name="gr14" draw:text-style-name="P5" draw:layer="layout" draw:type="line" svg:x1="17.006cm" svg:y1="13.221cm" svg:x2="17.006cm" svg:y2="13.971cm" svg:d="M17006 13221v750" svg:viewBox="0 0 1 751">
          <text:p/>
        </draw:connector>
        <draw:connector draw:style-name="gr14" draw:text-style-name="P5" draw:layer="layout" draw:type="line" svg:x1="13.507cm" svg:y1="12.846cm" svg:x2="14.674cm" svg:y2="12.845cm" draw:start-shape="id65" draw:start-glue-point="10" draw:end-shape="id66" draw:end-glue-point="6" svg:d="M13507 12846l1167-1" svg:viewBox="0 0 1168 2">
          <text:p/>
        </draw:connector>
        <draw:connector draw:style-name="gr14" draw:text-style-name="P5" draw:layer="layout" draw:type="line" svg:x1="13.507cm" svg:y1="12.846cm" svg:x2="14.674cm" svg:y2="12.845cm" draw:start-shape="id65" draw:start-glue-point="10" draw:end-shape="id66" draw:end-glue-point="6" svg:d="M13507 12846l1167-1" svg:viewBox="0 0 1168 2">
          <text:p/>
        </draw:connector>
        <draw:connector draw:style-name="gr14" draw:text-style-name="P5" draw:layer="layout" draw:type="line" svg:x1="15.451cm" svg:y1="12.846cm" svg:x2="16.618cm" svg:y2="12.845cm" svg:d="M15451 12846l1167-1" svg:viewBox="0 0 1168 2">
          <text:p/>
        </draw:connector>
        <draw:connector draw:style-name="gr14" draw:text-style-name="P5" draw:layer="layout" draw:type="line" svg:x1="15.451cm" svg:y1="12.846cm" svg:x2="16.618cm" svg:y2="12.845cm" svg:d="M15451 12846l1167-1" svg:viewBox="0 0 1168 2">
          <text:p/>
        </draw:connector>
        <draw:connector draw:style-name="gr14" draw:text-style-name="P5" draw:layer="layout" draw:type="line" svg:x1="13.507cm" svg:y1="11.372cm" svg:x2="14.675cm" svg:y2="11.371cm" svg:d="M13507 11372l1168-1" svg:viewBox="0 0 1169 2">
          <text:p/>
        </draw:connector>
        <draw:connector draw:style-name="gr14" draw:text-style-name="P5" draw:layer="layout" draw:type="line" svg:x1="13.507cm" svg:y1="11.372cm" svg:x2="14.675cm" svg:y2="11.371cm" svg:d="M13507 11372l1168-1" svg:viewBox="0 0 1169 2">
          <text:p/>
        </draw:connector>
        <draw:connector draw:style-name="gr14" draw:text-style-name="P5" draw:layer="layout" draw:type="line" svg:x1="15.452cm" svg:y1="11.372cm" svg:x2="16.618cm" svg:y2="11.372cm" svg:d="M15452 11372h1166" svg:viewBox="0 0 1167 1">
          <text:p/>
        </draw:connector>
        <draw:connector draw:style-name="gr14" draw:text-style-name="P5" draw:layer="layout" draw:type="line" svg:x1="15.452cm" svg:y1="11.372cm" svg:x2="16.618cm" svg:y2="11.372cm" svg:d="M15452 11372h1166" svg:viewBox="0 0 1167 1">
          <text:p/>
        </draw:connector>
        <draw:connector draw:style-name="gr14" draw:text-style-name="P5" draw:layer="layout" draw:type="line" svg:x1="13.118cm" svg:y1="11.718cm" svg:x2="13.118cm" svg:y2="12.469cm" svg:d="M13118 11718v751" svg:viewBox="0 0 1 752">
          <text:p/>
        </draw:connector>
        <draw:connector draw:style-name="gr14" draw:text-style-name="P5" draw:layer="layout" draw:type="line" svg:x1="13.118cm" svg:y1="11.719cm" svg:x2="13.118cm" svg:y2="12.47cm" svg:d="M13118 11719v751" svg:viewBox="0 0 1 752">
          <text:p/>
        </draw:connector>
        <draw:connector draw:style-name="gr14" draw:text-style-name="P5" draw:layer="layout" draw:type="line" svg:x1="17.007cm" svg:y1="11.718cm" svg:x2="17.007cm" svg:y2="12.469cm" svg:d="M17007 11718v751" svg:viewBox="0 0 1 752">
          <text:p/>
        </draw:connector>
        <draw:connector draw:style-name="gr14" draw:text-style-name="P5" draw:layer="layout" draw:type="line" svg:x1="17.395cm" svg:y1="11.372cm" svg:x2="18.562cm" svg:y2="11.371cm" svg:d="M17395 11372l1167-1" svg:viewBox="0 0 1168 2">
          <text:p/>
        </draw:connector>
        <draw:connector draw:style-name="gr14" draw:text-style-name="P5" draw:layer="layout" draw:type="line" svg:x1="17.395cm" svg:y1="11.372cm" svg:x2="18.562cm" svg:y2="11.371cm" svg:d="M17395 11372l1167-1" svg:viewBox="0 0 1168 2">
          <text:p/>
        </draw:connector>
        <draw:connector draw:style-name="gr14" draw:text-style-name="P5" draw:layer="layout" draw:type="line" svg:x1="17.394cm" svg:y1="12.846cm" svg:x2="18.561cm" svg:y2="12.845cm" svg:d="M17394 12846l1167-1" svg:viewBox="0 0 1168 2">
          <text:p/>
        </draw:connector>
        <draw:connector draw:style-name="gr14" draw:text-style-name="P5" draw:layer="layout" draw:type="line" svg:x1="17.394cm" svg:y1="12.846cm" svg:x2="18.561cm" svg:y2="12.845cm" svg:d="M17394 12846l1167-1" svg:viewBox="0 0 1168 2">
          <text:p/>
        </draw:connector>
        <draw:connector draw:style-name="gr14" draw:text-style-name="P5" draw:layer="layout" draw:type="line" svg:x1="11.562cm" svg:y1="12.846cm" svg:x2="12.729cm" svg:y2="12.845cm" svg:d="M11562 12846l1167-1" svg:viewBox="0 0 1168 2">
          <text:p/>
        </draw:connector>
        <draw:connector draw:style-name="gr14" draw:text-style-name="P5" draw:layer="layout" draw:type="line" svg:x1="11.562cm" svg:y1="12.846cm" svg:x2="12.729cm" svg:y2="12.845cm" svg:d="M11562 12846l1167-1" svg:viewBox="0 0 1168 2">
          <text:p/>
        </draw:connector>
        <draw:connector draw:style-name="gr14" draw:text-style-name="P5" draw:layer="layout" draw:type="line" svg:x1="11.563cm" svg:y1="11.372cm" svg:x2="12.73cm" svg:y2="11.372cm" svg:d="M11563 11372h1167" svg:viewBox="0 0 1168 1">
          <text:p/>
        </draw:connector>
        <draw:connector draw:style-name="gr14" draw:text-style-name="P5" draw:layer="layout" draw:type="line" svg:x1="11.563cm" svg:y1="11.372cm" svg:x2="12.73cm" svg:y2="11.372cm" svg:d="M11563 11372h1167" svg:viewBox="0 0 1168 1">
          <text:p/>
        </draw:connector>
        <draw:custom-shape draw:style-name="gr17" draw:text-style-name="P6" draw:layer="layout" svg:width="0.777cm" svg:height="0.75cm" svg:x="12.73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67" draw:id="id67" draw:layer="layout" svg:width="0.777cm" svg:height="0.749cm" svg:x="12.73cm" svg:y="12.4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4.674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68" draw:id="id68" draw:layer="layout" svg:width="0.777cm" svg:height="0.749cm" svg:x="14.674cm" svg:y="1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2.729cm" svg:y="13.9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4.673cm" svg:y="1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8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8cm" svg:y="1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7cm" svg:y="1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 draw:text-style-name="P5" draw:layer="layout" svg:x1="13.118cm" svg:y1="13.22cm" svg:x2="13.118cm" svg:y2="13.971cm" svg:d="M13118 13220v751" svg:viewBox="0 0 1 752">
          <text:p/>
        </draw:connector>
        <draw:connector draw:style-name="gr14" draw:text-style-name="P5" draw:layer="layout" draw:type="line" svg:x1="13.118cm" svg:y1="13.22cm" svg:x2="13.118cm" svg:y2="13.971cm" svg:d="M13118 13220v751" svg:viewBox="0 0 1 752">
          <text:p/>
        </draw:connector>
        <draw:connector draw:style-name="gr14" draw:text-style-name="P5" draw:layer="layout" svg:x1="13.118cm" svg:y1="13.221cm" svg:x2="13.118cm" svg:y2="13.971cm" svg:d="M13118 13221v750" svg:viewBox="0 0 1 751">
          <text:p/>
        </draw:connector>
        <draw:connector draw:style-name="gr14" draw:text-style-name="P5" draw:layer="layout" draw:type="line" svg:x1="15.063cm" svg:y1="11.718cm" svg:x2="15.063cm" svg:y2="12.469cm" svg:d="M15063 11718v751" svg:viewBox="0 0 1 752">
          <text:p/>
        </draw:connector>
        <draw:connector draw:style-name="gr14" draw:text-style-name="P5" draw:layer="layout" svg:x1="15.062cm" svg:y1="13.22cm" svg:x2="15.062cm" svg:y2="13.971cm" svg:d="M15062 13220v751" svg:viewBox="0 0 1 752">
          <text:p/>
        </draw:connector>
        <draw:connector draw:style-name="gr14" draw:text-style-name="P5" draw:layer="layout" draw:type="line" svg:x1="15.062cm" svg:y1="13.22cm" svg:x2="15.062cm" svg:y2="13.971cm" svg:d="M15062 13220v751" svg:viewBox="0 0 1 752">
          <text:p/>
        </draw:connector>
        <draw:connector draw:style-name="gr14" draw:text-style-name="P5" draw:layer="layout" svg:x1="15.062cm" svg:y1="13.221cm" svg:x2="15.062cm" svg:y2="13.971cm" svg:d="M15062 13221v750" svg:viewBox="0 0 1 751">
          <text:p/>
        </draw:connector>
        <draw:connector draw:style-name="gr14" draw:text-style-name="P5" draw:layer="layout" draw:type="line" svg:x1="15.062cm" svg:y1="13.221cm" svg:x2="15.062cm" svg:y2="13.971cm" svg:d="M15062 13221v750" svg:viewBox="0 0 1 751">
          <text:p/>
        </draw:connector>
        <draw:connector draw:style-name="gr14" draw:text-style-name="P5" draw:layer="layout" svg:x1="17.006cm" svg:y1="13.22cm" svg:x2="17.006cm" svg:y2="13.971cm" svg:d="M17006 13220v751" svg:viewBox="0 0 1 752">
          <text:p/>
        </draw:connector>
        <draw:connector draw:style-name="gr14" draw:text-style-name="P5" draw:layer="layout" draw:type="line" svg:x1="17.006cm" svg:y1="13.22cm" svg:x2="17.006cm" svg:y2="13.971cm" svg:d="M17006 13220v751" svg:viewBox="0 0 1 752">
          <text:p/>
        </draw:connector>
        <draw:connector draw:style-name="gr14" draw:text-style-name="P5" draw:layer="layout" svg:x1="17.006cm" svg:y1="13.221cm" svg:x2="17.006cm" svg:y2="13.971cm" svg:d="M17006 13221v750" svg:viewBox="0 0 1 751">
          <text:p/>
        </draw:connector>
        <draw:connector draw:style-name="gr14" draw:text-style-name="P5" draw:layer="layout" draw:type="line" svg:x1="17.006cm" svg:y1="13.221cm" svg:x2="17.006cm" svg:y2="13.971cm" svg:d="M17006 13221v750" svg:viewBox="0 0 1 751">
          <text:p/>
        </draw:connector>
        <draw:connector draw:style-name="gr14" draw:text-style-name="P5" draw:layer="layout" draw:type="line" svg:x1="13.507cm" svg:y1="12.846cm" svg:x2="14.674cm" svg:y2="12.845cm" draw:start-shape="id67" draw:start-glue-point="10" draw:end-shape="id68" draw:end-glue-point="6" svg:d="M13507 12846l1167-1" svg:viewBox="0 0 1168 2">
          <text:p/>
        </draw:connector>
        <draw:connector draw:style-name="gr14" draw:text-style-name="P5" draw:layer="layout" draw:type="line" svg:x1="13.507cm" svg:y1="12.846cm" svg:x2="14.674cm" svg:y2="12.845cm" draw:start-shape="id67" draw:start-glue-point="10" draw:end-shape="id68" draw:end-glue-point="6" svg:d="M13507 12846l1167-1" svg:viewBox="0 0 1168 2">
          <text:p/>
        </draw:connector>
        <draw:connector draw:style-name="gr14" draw:text-style-name="P5" draw:layer="layout" draw:type="line" svg:x1="15.451cm" svg:y1="12.846cm" svg:x2="16.618cm" svg:y2="12.845cm" svg:d="M15451 12846l1167-1" svg:viewBox="0 0 1168 2">
          <text:p/>
        </draw:connector>
        <draw:connector draw:style-name="gr14" draw:text-style-name="P5" draw:layer="layout" draw:type="line" svg:x1="15.451cm" svg:y1="12.846cm" svg:x2="16.618cm" svg:y2="12.845cm" svg:d="M15451 12846l1167-1" svg:viewBox="0 0 1168 2">
          <text:p/>
        </draw:connector>
        <draw:connector draw:style-name="gr14" draw:text-style-name="P5" draw:layer="layout" draw:type="line" svg:x1="13.507cm" svg:y1="11.372cm" svg:x2="14.675cm" svg:y2="11.371cm" svg:d="M13507 11372l1168-1" svg:viewBox="0 0 1169 2">
          <text:p/>
        </draw:connector>
        <draw:connector draw:style-name="gr14" draw:text-style-name="P5" draw:layer="layout" draw:type="line" svg:x1="13.507cm" svg:y1="11.372cm" svg:x2="14.675cm" svg:y2="11.371cm" svg:d="M13507 11372l1168-1" svg:viewBox="0 0 1169 2">
          <text:p/>
        </draw:connector>
        <draw:connector draw:style-name="gr14" draw:text-style-name="P5" draw:layer="layout" draw:type="line" svg:x1="15.452cm" svg:y1="11.372cm" svg:x2="16.618cm" svg:y2="11.372cm" svg:d="M15452 11372h1166" svg:viewBox="0 0 1167 1">
          <text:p/>
        </draw:connector>
        <draw:connector draw:style-name="gr14" draw:text-style-name="P5" draw:layer="layout" draw:type="line" svg:x1="15.452cm" svg:y1="11.372cm" svg:x2="16.618cm" svg:y2="11.372cm" svg:d="M15452 11372h1166" svg:viewBox="0 0 1167 1">
          <text:p/>
        </draw:connector>
        <draw:connector draw:style-name="gr14" draw:text-style-name="P5" draw:layer="layout" draw:type="line" svg:x1="13.118cm" svg:y1="11.718cm" svg:x2="13.118cm" svg:y2="12.469cm" svg:d="M13118 11718v751" svg:viewBox="0 0 1 752">
          <text:p/>
        </draw:connector>
        <draw:connector draw:style-name="gr14" draw:text-style-name="P5" draw:layer="layout" draw:type="line" svg:x1="13.118cm" svg:y1="11.719cm" svg:x2="13.118cm" svg:y2="12.47cm" svg:d="M13118 11719v751" svg:viewBox="0 0 1 752">
          <text:p/>
        </draw:connector>
        <draw:connector draw:style-name="gr14" draw:text-style-name="P5" draw:layer="layout" draw:type="line" svg:x1="17.007cm" svg:y1="11.718cm" svg:x2="17.007cm" svg:y2="12.469cm" svg:d="M17007 11718v751" svg:viewBox="0 0 1 752">
          <text:p/>
        </draw:connector>
        <draw:connector draw:style-name="gr14" draw:text-style-name="P5" draw:layer="layout" draw:type="line" svg:x1="17.395cm" svg:y1="11.372cm" svg:x2="18.562cm" svg:y2="11.371cm" svg:d="M17395 11372l1167-1" svg:viewBox="0 0 1168 2">
          <text:p/>
        </draw:connector>
        <draw:connector draw:style-name="gr14" draw:text-style-name="P5" draw:layer="layout" draw:type="line" svg:x1="17.395cm" svg:y1="11.372cm" svg:x2="18.562cm" svg:y2="11.371cm" svg:d="M17395 11372l1167-1" svg:viewBox="0 0 1168 2">
          <text:p/>
        </draw:connector>
        <draw:connector draw:style-name="gr14" draw:text-style-name="P5" draw:layer="layout" draw:type="line" svg:x1="17.394cm" svg:y1="12.846cm" svg:x2="18.561cm" svg:y2="12.845cm" svg:d="M17394 12846l1167-1" svg:viewBox="0 0 1168 2">
          <text:p/>
        </draw:connector>
        <draw:connector draw:style-name="gr14" draw:text-style-name="P5" draw:layer="layout" draw:type="line" svg:x1="17.394cm" svg:y1="12.846cm" svg:x2="18.561cm" svg:y2="12.845cm" svg:d="M17394 12846l1167-1" svg:viewBox="0 0 1168 2">
          <text:p/>
        </draw:connector>
        <draw:connector draw:style-name="gr14" draw:text-style-name="P5" draw:layer="layout" draw:type="line" svg:x1="11.562cm" svg:y1="12.846cm" svg:x2="12.729cm" svg:y2="12.845cm" svg:d="M11562 12846l1167-1" svg:viewBox="0 0 1168 2">
          <text:p/>
        </draw:connector>
        <draw:connector draw:style-name="gr14" draw:text-style-name="P5" draw:layer="layout" draw:type="line" svg:x1="11.562cm" svg:y1="12.846cm" svg:x2="12.729cm" svg:y2="12.845cm" svg:d="M11562 12846l1167-1" svg:viewBox="0 0 1168 2">
          <text:p/>
        </draw:connector>
        <draw:connector draw:style-name="gr14" draw:text-style-name="P5" draw:layer="layout" draw:type="line" svg:x1="11.563cm" svg:y1="11.372cm" svg:x2="12.73cm" svg:y2="11.372cm" svg:d="M11563 11372h1167" svg:viewBox="0 0 1168 1">
          <text:p/>
        </draw:connector>
        <draw:connector draw:style-name="gr14" draw:text-style-name="P5" draw:layer="layout" draw:type="line" svg:x1="11.563cm" svg:y1="11.372cm" svg:x2="12.73cm" svg:y2="11.372cm" svg:d="M11563 11372h1167" svg:viewBox="0 0 1168 1">
          <text:p/>
        </draw:connector>
        <draw:custom-shape draw:style-name="gr17" draw:text-style-name="P6" draw:layer="layout" svg:width="0.777cm" svg:height="0.75cm" svg:x="12.73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69" draw:id="id69" draw:layer="layout" svg:width="0.777cm" svg:height="0.749cm" svg:x="12.73cm" svg:y="12.4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4.674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70" draw:id="id70" draw:layer="layout" svg:width="0.777cm" svg:height="0.749cm" svg:x="14.674cm" svg:y="1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2.729cm" svg:y="13.9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4.673cm" svg:y="1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8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8cm" svg:y="1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7cm" svg:y="1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 draw:text-style-name="P5" draw:layer="layout" svg:x1="13.118cm" svg:y1="13.22cm" svg:x2="13.118cm" svg:y2="13.971cm" svg:d="M13118 13220v751" svg:viewBox="0 0 1 752">
          <text:p/>
        </draw:connector>
        <draw:connector draw:style-name="gr14" draw:text-style-name="P5" draw:layer="layout" draw:type="line" svg:x1="13.118cm" svg:y1="13.22cm" svg:x2="13.118cm" svg:y2="13.971cm" svg:d="M13118 13220v751" svg:viewBox="0 0 1 752">
          <text:p/>
        </draw:connector>
        <draw:connector draw:style-name="gr14" draw:text-style-name="P5" draw:layer="layout" svg:x1="13.118cm" svg:y1="13.221cm" svg:x2="13.118cm" svg:y2="13.971cm" svg:d="M13118 13221v750" svg:viewBox="0 0 1 751">
          <text:p/>
        </draw:connector>
        <draw:connector draw:style-name="gr14" draw:text-style-name="P5" draw:layer="layout" draw:type="line" svg:x1="15.063cm" svg:y1="11.718cm" svg:x2="15.063cm" svg:y2="12.469cm" svg:d="M15063 11718v751" svg:viewBox="0 0 1 752">
          <text:p/>
        </draw:connector>
        <draw:connector draw:style-name="gr14" draw:text-style-name="P5" draw:layer="layout" svg:x1="15.062cm" svg:y1="13.22cm" svg:x2="15.062cm" svg:y2="13.971cm" svg:d="M15062 13220v751" svg:viewBox="0 0 1 752">
          <text:p/>
        </draw:connector>
        <draw:connector draw:style-name="gr14" draw:text-style-name="P5" draw:layer="layout" draw:type="line" svg:x1="15.062cm" svg:y1="13.22cm" svg:x2="15.062cm" svg:y2="13.971cm" svg:d="M15062 13220v751" svg:viewBox="0 0 1 752">
          <text:p/>
        </draw:connector>
        <draw:connector draw:style-name="gr14" draw:text-style-name="P5" draw:layer="layout" svg:x1="15.062cm" svg:y1="13.221cm" svg:x2="15.062cm" svg:y2="13.971cm" svg:d="M15062 13221v750" svg:viewBox="0 0 1 751">
          <text:p/>
        </draw:connector>
        <draw:connector draw:style-name="gr14" draw:text-style-name="P5" draw:layer="layout" draw:type="line" svg:x1="15.062cm" svg:y1="13.221cm" svg:x2="15.062cm" svg:y2="13.971cm" svg:d="M15062 13221v750" svg:viewBox="0 0 1 751">
          <text:p/>
        </draw:connector>
        <draw:connector draw:style-name="gr14" draw:text-style-name="P5" draw:layer="layout" svg:x1="17.006cm" svg:y1="13.22cm" svg:x2="17.006cm" svg:y2="13.971cm" svg:d="M17006 13220v751" svg:viewBox="0 0 1 752">
          <text:p/>
        </draw:connector>
        <draw:connector draw:style-name="gr14" draw:text-style-name="P5" draw:layer="layout" draw:type="line" svg:x1="17.006cm" svg:y1="13.22cm" svg:x2="17.006cm" svg:y2="13.971cm" svg:d="M17006 13220v751" svg:viewBox="0 0 1 752">
          <text:p/>
        </draw:connector>
        <draw:connector draw:style-name="gr14" draw:text-style-name="P5" draw:layer="layout" svg:x1="17.006cm" svg:y1="13.221cm" svg:x2="17.006cm" svg:y2="13.971cm" svg:d="M17006 13221v750" svg:viewBox="0 0 1 751">
          <text:p/>
        </draw:connector>
        <draw:connector draw:style-name="gr14" draw:text-style-name="P5" draw:layer="layout" draw:type="line" svg:x1="17.006cm" svg:y1="13.221cm" svg:x2="17.006cm" svg:y2="13.971cm" svg:d="M17006 13221v750" svg:viewBox="0 0 1 751">
          <text:p/>
        </draw:connector>
        <draw:connector draw:style-name="gr14" draw:text-style-name="P5" draw:layer="layout" draw:type="line" svg:x1="13.507cm" svg:y1="12.846cm" svg:x2="14.674cm" svg:y2="12.845cm" draw:start-shape="id69" draw:start-glue-point="10" draw:end-shape="id70" draw:end-glue-point="6" svg:d="M13507 12846l1167-1" svg:viewBox="0 0 1168 2">
          <text:p/>
        </draw:connector>
        <draw:connector draw:style-name="gr14" draw:text-style-name="P5" draw:layer="layout" draw:type="line" svg:x1="13.507cm" svg:y1="12.846cm" svg:x2="14.674cm" svg:y2="12.845cm" draw:start-shape="id69" draw:start-glue-point="10" draw:end-shape="id70" draw:end-glue-point="6" svg:d="M13507 12846l1167-1" svg:viewBox="0 0 1168 2">
          <text:p/>
        </draw:connector>
        <draw:connector draw:style-name="gr14" draw:text-style-name="P5" draw:layer="layout" draw:type="line" svg:x1="15.451cm" svg:y1="12.846cm" svg:x2="16.618cm" svg:y2="12.845cm" svg:d="M15451 12846l1167-1" svg:viewBox="0 0 1168 2">
          <text:p/>
        </draw:connector>
        <draw:connector draw:style-name="gr14" draw:text-style-name="P5" draw:layer="layout" draw:type="line" svg:x1="15.451cm" svg:y1="12.846cm" svg:x2="16.618cm" svg:y2="12.845cm" svg:d="M15451 12846l1167-1" svg:viewBox="0 0 1168 2">
          <text:p/>
        </draw:connector>
        <draw:connector draw:style-name="gr14" draw:text-style-name="P5" draw:layer="layout" draw:type="line" svg:x1="13.507cm" svg:y1="11.372cm" svg:x2="14.675cm" svg:y2="11.371cm" svg:d="M13507 11372l1168-1" svg:viewBox="0 0 1169 2">
          <text:p/>
        </draw:connector>
        <draw:connector draw:style-name="gr14" draw:text-style-name="P5" draw:layer="layout" draw:type="line" svg:x1="13.507cm" svg:y1="11.372cm" svg:x2="14.675cm" svg:y2="11.371cm" svg:d="M13507 11372l1168-1" svg:viewBox="0 0 1169 2">
          <text:p/>
        </draw:connector>
        <draw:connector draw:style-name="gr14" draw:text-style-name="P5" draw:layer="layout" draw:type="line" svg:x1="15.452cm" svg:y1="11.372cm" svg:x2="16.618cm" svg:y2="11.372cm" svg:d="M15452 11372h1166" svg:viewBox="0 0 1167 1">
          <text:p/>
        </draw:connector>
        <draw:connector draw:style-name="gr14" draw:text-style-name="P5" draw:layer="layout" draw:type="line" svg:x1="15.452cm" svg:y1="11.372cm" svg:x2="16.618cm" svg:y2="11.372cm" svg:d="M15452 11372h1166" svg:viewBox="0 0 1167 1">
          <text:p/>
        </draw:connector>
        <draw:connector draw:style-name="gr14" draw:text-style-name="P5" draw:layer="layout" draw:type="line" svg:x1="13.118cm" svg:y1="11.718cm" svg:x2="13.118cm" svg:y2="12.469cm" svg:d="M13118 11718v751" svg:viewBox="0 0 1 752">
          <text:p/>
        </draw:connector>
        <draw:connector draw:style-name="gr14" draw:text-style-name="P5" draw:layer="layout" draw:type="line" svg:x1="13.118cm" svg:y1="11.719cm" svg:x2="13.118cm" svg:y2="12.47cm" svg:d="M13118 11719v751" svg:viewBox="0 0 1 752">
          <text:p/>
        </draw:connector>
        <draw:connector draw:style-name="gr14" draw:text-style-name="P5" draw:layer="layout" draw:type="line" svg:x1="17.007cm" svg:y1="11.718cm" svg:x2="17.007cm" svg:y2="12.469cm" svg:d="M17007 11718v751" svg:viewBox="0 0 1 752">
          <text:p/>
        </draw:connector>
        <draw:connector draw:style-name="gr14" draw:text-style-name="P5" draw:layer="layout" draw:type="line" svg:x1="17.395cm" svg:y1="11.372cm" svg:x2="18.562cm" svg:y2="11.371cm" svg:d="M17395 11372l1167-1" svg:viewBox="0 0 1168 2">
          <text:p/>
        </draw:connector>
        <draw:connector draw:style-name="gr14" draw:text-style-name="P5" draw:layer="layout" draw:type="line" svg:x1="17.395cm" svg:y1="11.372cm" svg:x2="18.562cm" svg:y2="11.371cm" svg:d="M17395 11372l1167-1" svg:viewBox="0 0 1168 2">
          <text:p/>
        </draw:connector>
        <draw:connector draw:style-name="gr14" draw:text-style-name="P5" draw:layer="layout" draw:type="line" svg:x1="17.394cm" svg:y1="12.846cm" svg:x2="18.561cm" svg:y2="12.845cm" svg:d="M17394 12846l1167-1" svg:viewBox="0 0 1168 2">
          <text:p/>
        </draw:connector>
        <draw:connector draw:style-name="gr14" draw:text-style-name="P5" draw:layer="layout" draw:type="line" svg:x1="17.394cm" svg:y1="12.846cm" svg:x2="18.561cm" svg:y2="12.845cm" svg:d="M17394 12846l1167-1" svg:viewBox="0 0 1168 2">
          <text:p/>
        </draw:connector>
        <draw:connector draw:style-name="gr14" draw:text-style-name="P5" draw:layer="layout" draw:type="line" svg:x1="11.562cm" svg:y1="12.846cm" svg:x2="12.729cm" svg:y2="12.845cm" svg:d="M11562 12846l1167-1" svg:viewBox="0 0 1168 2">
          <text:p/>
        </draw:connector>
        <draw:connector draw:style-name="gr14" draw:text-style-name="P5" draw:layer="layout" draw:type="line" svg:x1="11.562cm" svg:y1="12.846cm" svg:x2="12.729cm" svg:y2="12.845cm" svg:d="M11562 12846l1167-1" svg:viewBox="0 0 1168 2">
          <text:p/>
        </draw:connector>
        <draw:connector draw:style-name="gr14" draw:text-style-name="P5" draw:layer="layout" draw:type="line" svg:x1="11.563cm" svg:y1="11.372cm" svg:x2="12.73cm" svg:y2="11.372cm" svg:d="M11563 11372h1167" svg:viewBox="0 0 1168 1">
          <text:p/>
        </draw:connector>
        <draw:connector draw:style-name="gr14" draw:text-style-name="P5" draw:layer="layout" draw:type="line" svg:x1="11.563cm" svg:y1="11.372cm" svg:x2="12.73cm" svg:y2="11.372cm" svg:d="M11563 11372h1167" svg:viewBox="0 0 1168 1">
          <text:p/>
        </draw:connector>
        <draw:custom-shape draw:style-name="gr17" draw:text-style-name="P6" draw:layer="layout" svg:width="0.777cm" svg:height="0.75cm" svg:x="12.73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71" draw:id="id71" draw:layer="layout" svg:width="0.777cm" svg:height="0.749cm" svg:x="12.73cm" svg:y="12.4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4.674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72" draw:id="id72" draw:layer="layout" svg:width="0.777cm" svg:height="0.749cm" svg:x="14.674cm" svg:y="1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2.729cm" svg:y="13.9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4.673cm" svg:y="1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8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8cm" svg:y="1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7cm" svg:y="1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 draw:text-style-name="P5" draw:layer="layout" svg:x1="13.118cm" svg:y1="13.22cm" svg:x2="13.118cm" svg:y2="13.971cm" svg:d="M13118 13220v751" svg:viewBox="0 0 1 752">
          <text:p/>
        </draw:connector>
        <draw:connector draw:style-name="gr14" draw:text-style-name="P5" draw:layer="layout" draw:type="line" svg:x1="13.118cm" svg:y1="13.22cm" svg:x2="13.118cm" svg:y2="13.971cm" svg:d="M13118 13220v751" svg:viewBox="0 0 1 752">
          <text:p/>
        </draw:connector>
        <draw:connector draw:style-name="gr14" draw:text-style-name="P5" draw:layer="layout" svg:x1="13.118cm" svg:y1="13.221cm" svg:x2="13.118cm" svg:y2="13.971cm" svg:d="M13118 13221v750" svg:viewBox="0 0 1 751">
          <text:p/>
        </draw:connector>
        <draw:connector draw:style-name="gr14" draw:text-style-name="P5" draw:layer="layout" draw:type="line" svg:x1="15.063cm" svg:y1="11.718cm" svg:x2="15.063cm" svg:y2="12.469cm" svg:d="M15063 11718v751" svg:viewBox="0 0 1 752">
          <text:p/>
        </draw:connector>
        <draw:connector draw:style-name="gr14" draw:text-style-name="P5" draw:layer="layout" svg:x1="15.062cm" svg:y1="13.22cm" svg:x2="15.062cm" svg:y2="13.971cm" svg:d="M15062 13220v751" svg:viewBox="0 0 1 752">
          <text:p/>
        </draw:connector>
        <draw:connector draw:style-name="gr14" draw:text-style-name="P5" draw:layer="layout" draw:type="line" svg:x1="15.062cm" svg:y1="13.22cm" svg:x2="15.062cm" svg:y2="13.971cm" svg:d="M15062 13220v751" svg:viewBox="0 0 1 752">
          <text:p/>
        </draw:connector>
        <draw:connector draw:style-name="gr14" draw:text-style-name="P5" draw:layer="layout" svg:x1="15.062cm" svg:y1="13.221cm" svg:x2="15.062cm" svg:y2="13.971cm" svg:d="M15062 13221v750" svg:viewBox="0 0 1 751">
          <text:p/>
        </draw:connector>
        <draw:connector draw:style-name="gr14" draw:text-style-name="P5" draw:layer="layout" draw:type="line" svg:x1="15.062cm" svg:y1="13.221cm" svg:x2="15.062cm" svg:y2="13.971cm" svg:d="M15062 13221v750" svg:viewBox="0 0 1 751">
          <text:p/>
        </draw:connector>
        <draw:connector draw:style-name="gr14" draw:text-style-name="P5" draw:layer="layout" svg:x1="17.006cm" svg:y1="13.22cm" svg:x2="17.006cm" svg:y2="13.971cm" svg:d="M17006 13220v751" svg:viewBox="0 0 1 752">
          <text:p/>
        </draw:connector>
        <draw:connector draw:style-name="gr14" draw:text-style-name="P5" draw:layer="layout" draw:type="line" svg:x1="17.006cm" svg:y1="13.22cm" svg:x2="17.006cm" svg:y2="13.971cm" svg:d="M17006 13220v751" svg:viewBox="0 0 1 752">
          <text:p/>
        </draw:connector>
        <draw:connector draw:style-name="gr14" draw:text-style-name="P5" draw:layer="layout" svg:x1="17.006cm" svg:y1="13.221cm" svg:x2="17.006cm" svg:y2="13.971cm" svg:d="M17006 13221v750" svg:viewBox="0 0 1 751">
          <text:p/>
        </draw:connector>
        <draw:connector draw:style-name="gr14" draw:text-style-name="P5" draw:layer="layout" draw:type="line" svg:x1="17.006cm" svg:y1="13.221cm" svg:x2="17.006cm" svg:y2="13.971cm" svg:d="M17006 13221v750" svg:viewBox="0 0 1 751">
          <text:p/>
        </draw:connector>
        <draw:connector draw:style-name="gr14" draw:text-style-name="P5" draw:layer="layout" draw:type="line" svg:x1="13.507cm" svg:y1="12.846cm" svg:x2="14.674cm" svg:y2="12.845cm" draw:start-shape="id71" draw:start-glue-point="10" draw:end-shape="id72" draw:end-glue-point="6" svg:d="M13507 12846l1167-1" svg:viewBox="0 0 1168 2">
          <text:p/>
        </draw:connector>
        <draw:connector draw:style-name="gr14" draw:text-style-name="P5" draw:layer="layout" draw:type="line" svg:x1="13.507cm" svg:y1="12.846cm" svg:x2="14.674cm" svg:y2="12.845cm" draw:start-shape="id71" draw:start-glue-point="10" draw:end-shape="id72" draw:end-glue-point="6" svg:d="M13507 12846l1167-1" svg:viewBox="0 0 1168 2">
          <text:p/>
        </draw:connector>
        <draw:connector draw:style-name="gr14" draw:text-style-name="P5" draw:layer="layout" draw:type="line" svg:x1="15.451cm" svg:y1="12.846cm" svg:x2="16.618cm" svg:y2="12.845cm" svg:d="M15451 12846l1167-1" svg:viewBox="0 0 1168 2">
          <text:p/>
        </draw:connector>
        <draw:connector draw:style-name="gr14" draw:text-style-name="P5" draw:layer="layout" draw:type="line" svg:x1="15.451cm" svg:y1="12.846cm" svg:x2="16.618cm" svg:y2="12.845cm" svg:d="M15451 12846l1167-1" svg:viewBox="0 0 1168 2">
          <text:p/>
        </draw:connector>
        <draw:connector draw:style-name="gr14" draw:text-style-name="P5" draw:layer="layout" draw:type="line" svg:x1="13.507cm" svg:y1="11.372cm" svg:x2="14.675cm" svg:y2="11.371cm" svg:d="M13507 11372l1168-1" svg:viewBox="0 0 1169 2">
          <text:p/>
        </draw:connector>
        <draw:connector draw:style-name="gr14" draw:text-style-name="P5" draw:layer="layout" draw:type="line" svg:x1="13.507cm" svg:y1="11.372cm" svg:x2="14.675cm" svg:y2="11.371cm" svg:d="M13507 11372l1168-1" svg:viewBox="0 0 1169 2">
          <text:p/>
        </draw:connector>
        <draw:connector draw:style-name="gr14" draw:text-style-name="P5" draw:layer="layout" draw:type="line" svg:x1="15.452cm" svg:y1="11.372cm" svg:x2="16.618cm" svg:y2="11.372cm" svg:d="M15452 11372h1166" svg:viewBox="0 0 1167 1">
          <text:p/>
        </draw:connector>
        <draw:connector draw:style-name="gr14" draw:text-style-name="P5" draw:layer="layout" draw:type="line" svg:x1="15.452cm" svg:y1="11.372cm" svg:x2="16.618cm" svg:y2="11.372cm" svg:d="M15452 11372h1166" svg:viewBox="0 0 1167 1">
          <text:p/>
        </draw:connector>
        <draw:connector draw:style-name="gr14" draw:text-style-name="P5" draw:layer="layout" draw:type="line" svg:x1="13.118cm" svg:y1="11.718cm" svg:x2="13.118cm" svg:y2="12.469cm" svg:d="M13118 11718v751" svg:viewBox="0 0 1 752">
          <text:p/>
        </draw:connector>
        <draw:connector draw:style-name="gr14" draw:text-style-name="P5" draw:layer="layout" draw:type="line" svg:x1="13.118cm" svg:y1="11.719cm" svg:x2="13.118cm" svg:y2="12.47cm" svg:d="M13118 11719v751" svg:viewBox="0 0 1 752">
          <text:p/>
        </draw:connector>
        <draw:connector draw:style-name="gr14" draw:text-style-name="P5" draw:layer="layout" draw:type="line" svg:x1="17.007cm" svg:y1="11.718cm" svg:x2="17.007cm" svg:y2="12.469cm" svg:d="M17007 11718v751" svg:viewBox="0 0 1 752">
          <text:p/>
        </draw:connector>
        <draw:connector draw:style-name="gr14" draw:text-style-name="P5" draw:layer="layout" draw:type="line" svg:x1="17.395cm" svg:y1="11.372cm" svg:x2="18.562cm" svg:y2="11.371cm" svg:d="M17395 11372l1167-1" svg:viewBox="0 0 1168 2">
          <text:p/>
        </draw:connector>
        <draw:connector draw:style-name="gr14" draw:text-style-name="P5" draw:layer="layout" draw:type="line" svg:x1="17.395cm" svg:y1="11.372cm" svg:x2="18.562cm" svg:y2="11.371cm" svg:d="M17395 11372l1167-1" svg:viewBox="0 0 1168 2">
          <text:p/>
        </draw:connector>
        <draw:connector draw:style-name="gr14" draw:text-style-name="P5" draw:layer="layout" draw:type="line" svg:x1="17.394cm" svg:y1="12.846cm" svg:x2="18.561cm" svg:y2="12.845cm" svg:d="M17394 12846l1167-1" svg:viewBox="0 0 1168 2">
          <text:p/>
        </draw:connector>
        <draw:connector draw:style-name="gr14" draw:text-style-name="P5" draw:layer="layout" draw:type="line" svg:x1="17.394cm" svg:y1="12.846cm" svg:x2="18.561cm" svg:y2="12.845cm" svg:d="M17394 12846l1167-1" svg:viewBox="0 0 1168 2">
          <text:p/>
        </draw:connector>
        <draw:connector draw:style-name="gr14" draw:text-style-name="P5" draw:layer="layout" draw:type="line" svg:x1="11.562cm" svg:y1="12.846cm" svg:x2="12.729cm" svg:y2="12.845cm" svg:d="M11562 12846l1167-1" svg:viewBox="0 0 1168 2">
          <text:p/>
        </draw:connector>
        <draw:connector draw:style-name="gr14" draw:text-style-name="P5" draw:layer="layout" draw:type="line" svg:x1="11.562cm" svg:y1="12.846cm" svg:x2="12.729cm" svg:y2="12.845cm" svg:d="M11562 12846l1167-1" svg:viewBox="0 0 1168 2">
          <text:p/>
        </draw:connector>
        <draw:connector draw:style-name="gr14" draw:text-style-name="P5" draw:layer="layout" draw:type="line" svg:x1="11.563cm" svg:y1="11.372cm" svg:x2="12.73cm" svg:y2="11.372cm" svg:d="M11563 11372h1167" svg:viewBox="0 0 1168 1">
          <text:p/>
        </draw:connector>
        <draw:connector draw:style-name="gr14" draw:text-style-name="P5" draw:layer="layout" draw:type="line" svg:x1="11.563cm" svg:y1="11.372cm" svg:x2="12.73cm" svg:y2="11.372cm" svg:d="M11563 11372h1167" svg:viewBox="0 0 1168 1">
          <text:p/>
        </draw:connector>
        <draw:custom-shape draw:style-name="gr17" draw:text-style-name="P6" draw:layer="layout" svg:width="0.777cm" svg:height="0.75cm" svg:x="12.73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73" draw:id="id73" draw:layer="layout" svg:width="0.777cm" svg:height="0.749cm" svg:x="12.73cm" svg:y="12.4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4.674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74" draw:id="id74" draw:layer="layout" svg:width="0.777cm" svg:height="0.749cm" svg:x="14.674cm" svg:y="1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2.729cm" svg:y="13.9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4.673cm" svg:y="1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8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8cm" svg:y="1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7cm" svg:y="1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 draw:text-style-name="P5" draw:layer="layout" svg:x1="13.118cm" svg:y1="13.22cm" svg:x2="13.118cm" svg:y2="13.971cm" svg:d="M13118 13220v751" svg:viewBox="0 0 1 752">
          <text:p/>
        </draw:connector>
        <draw:connector draw:style-name="gr14" draw:text-style-name="P5" draw:layer="layout" draw:type="line" svg:x1="13.118cm" svg:y1="13.22cm" svg:x2="13.118cm" svg:y2="13.971cm" svg:d="M13118 13220v751" svg:viewBox="0 0 1 752">
          <text:p/>
        </draw:connector>
        <draw:connector draw:style-name="gr14" draw:text-style-name="P5" draw:layer="layout" svg:x1="13.118cm" svg:y1="13.221cm" svg:x2="13.118cm" svg:y2="13.971cm" svg:d="M13118 13221v750" svg:viewBox="0 0 1 751">
          <text:p/>
        </draw:connector>
        <draw:connector draw:style-name="gr14" draw:text-style-name="P5" draw:layer="layout" draw:type="line" svg:x1="15.063cm" svg:y1="11.718cm" svg:x2="15.063cm" svg:y2="12.469cm" svg:d="M15063 11718v751" svg:viewBox="0 0 1 752">
          <text:p/>
        </draw:connector>
        <draw:connector draw:style-name="gr14" draw:text-style-name="P5" draw:layer="layout" svg:x1="15.062cm" svg:y1="13.22cm" svg:x2="15.062cm" svg:y2="13.971cm" svg:d="M15062 13220v751" svg:viewBox="0 0 1 752">
          <text:p/>
        </draw:connector>
        <draw:connector draw:style-name="gr14" draw:text-style-name="P5" draw:layer="layout" draw:type="line" svg:x1="15.062cm" svg:y1="13.22cm" svg:x2="15.062cm" svg:y2="13.971cm" svg:d="M15062 13220v751" svg:viewBox="0 0 1 752">
          <text:p/>
        </draw:connector>
        <draw:connector draw:style-name="gr14" draw:text-style-name="P5" draw:layer="layout" svg:x1="15.062cm" svg:y1="13.221cm" svg:x2="15.062cm" svg:y2="13.971cm" svg:d="M15062 13221v750" svg:viewBox="0 0 1 751">
          <text:p/>
        </draw:connector>
        <draw:connector draw:style-name="gr14" draw:text-style-name="P5" draw:layer="layout" draw:type="line" svg:x1="15.062cm" svg:y1="13.221cm" svg:x2="15.062cm" svg:y2="13.971cm" svg:d="M15062 13221v750" svg:viewBox="0 0 1 751">
          <text:p/>
        </draw:connector>
        <draw:connector draw:style-name="gr14" draw:text-style-name="P5" draw:layer="layout" svg:x1="17.006cm" svg:y1="13.22cm" svg:x2="17.006cm" svg:y2="13.971cm" svg:d="M17006 13220v751" svg:viewBox="0 0 1 752">
          <text:p/>
        </draw:connector>
        <draw:connector draw:style-name="gr14" draw:text-style-name="P5" draw:layer="layout" draw:type="line" svg:x1="17.006cm" svg:y1="13.22cm" svg:x2="17.006cm" svg:y2="13.971cm" svg:d="M17006 13220v751" svg:viewBox="0 0 1 752">
          <text:p/>
        </draw:connector>
        <draw:connector draw:style-name="gr14" draw:text-style-name="P5" draw:layer="layout" svg:x1="17.006cm" svg:y1="13.221cm" svg:x2="17.006cm" svg:y2="13.971cm" svg:d="M17006 13221v750" svg:viewBox="0 0 1 751">
          <text:p/>
        </draw:connector>
        <draw:connector draw:style-name="gr14" draw:text-style-name="P5" draw:layer="layout" draw:type="line" svg:x1="17.006cm" svg:y1="13.221cm" svg:x2="17.006cm" svg:y2="13.971cm" svg:d="M17006 13221v750" svg:viewBox="0 0 1 751">
          <text:p/>
        </draw:connector>
        <draw:connector draw:style-name="gr14" draw:text-style-name="P5" draw:layer="layout" draw:type="line" svg:x1="13.507cm" svg:y1="12.846cm" svg:x2="14.674cm" svg:y2="12.845cm" draw:start-shape="id73" draw:start-glue-point="10" draw:end-shape="id74" draw:end-glue-point="6" svg:d="M13507 12846l1167-1" svg:viewBox="0 0 1168 2">
          <text:p/>
        </draw:connector>
        <draw:connector draw:style-name="gr14" draw:text-style-name="P5" draw:layer="layout" draw:type="line" svg:x1="13.507cm" svg:y1="12.846cm" svg:x2="14.674cm" svg:y2="12.845cm" draw:start-shape="id73" draw:start-glue-point="10" draw:end-shape="id74" draw:end-glue-point="6" svg:d="M13507 12846l1167-1" svg:viewBox="0 0 1168 2">
          <text:p/>
        </draw:connector>
        <draw:connector draw:style-name="gr14" draw:text-style-name="P5" draw:layer="layout" draw:type="line" svg:x1="15.451cm" svg:y1="12.846cm" svg:x2="16.618cm" svg:y2="12.845cm" svg:d="M15451 12846l1167-1" svg:viewBox="0 0 1168 2">
          <text:p/>
        </draw:connector>
        <draw:connector draw:style-name="gr14" draw:text-style-name="P5" draw:layer="layout" draw:type="line" svg:x1="15.451cm" svg:y1="12.846cm" svg:x2="16.618cm" svg:y2="12.845cm" svg:d="M15451 12846l1167-1" svg:viewBox="0 0 1168 2">
          <text:p/>
        </draw:connector>
        <draw:connector draw:style-name="gr14" draw:text-style-name="P5" draw:layer="layout" draw:type="line" svg:x1="13.507cm" svg:y1="11.372cm" svg:x2="14.675cm" svg:y2="11.371cm" svg:d="M13507 11372l1168-1" svg:viewBox="0 0 1169 2">
          <text:p/>
        </draw:connector>
        <draw:connector draw:style-name="gr14" draw:text-style-name="P5" draw:layer="layout" draw:type="line" svg:x1="13.507cm" svg:y1="11.372cm" svg:x2="14.675cm" svg:y2="11.371cm" svg:d="M13507 11372l1168-1" svg:viewBox="0 0 1169 2">
          <text:p/>
        </draw:connector>
        <draw:connector draw:style-name="gr14" draw:text-style-name="P5" draw:layer="layout" draw:type="line" svg:x1="15.452cm" svg:y1="11.372cm" svg:x2="16.618cm" svg:y2="11.372cm" svg:d="M15452 11372h1166" svg:viewBox="0 0 1167 1">
          <text:p/>
        </draw:connector>
        <draw:connector draw:style-name="gr14" draw:text-style-name="P5" draw:layer="layout" draw:type="line" svg:x1="15.452cm" svg:y1="11.372cm" svg:x2="16.618cm" svg:y2="11.372cm" svg:d="M15452 11372h1166" svg:viewBox="0 0 1167 1">
          <text:p/>
        </draw:connector>
        <draw:connector draw:style-name="gr14" draw:text-style-name="P5" draw:layer="layout" draw:type="line" svg:x1="13.118cm" svg:y1="11.718cm" svg:x2="13.118cm" svg:y2="12.469cm" svg:d="M13118 11718v751" svg:viewBox="0 0 1 752">
          <text:p/>
        </draw:connector>
        <draw:connector draw:style-name="gr14" draw:text-style-name="P5" draw:layer="layout" draw:type="line" svg:x1="13.118cm" svg:y1="11.719cm" svg:x2="13.118cm" svg:y2="12.47cm" svg:d="M13118 11719v751" svg:viewBox="0 0 1 752">
          <text:p/>
        </draw:connector>
        <draw:connector draw:style-name="gr14" draw:text-style-name="P5" draw:layer="layout" draw:type="line" svg:x1="17.007cm" svg:y1="11.718cm" svg:x2="17.007cm" svg:y2="12.469cm" svg:d="M17007 11718v751" svg:viewBox="0 0 1 752">
          <text:p/>
        </draw:connector>
        <draw:connector draw:style-name="gr14" draw:text-style-name="P5" draw:layer="layout" draw:type="line" svg:x1="17.395cm" svg:y1="11.372cm" svg:x2="18.562cm" svg:y2="11.371cm" svg:d="M17395 11372l1167-1" svg:viewBox="0 0 1168 2">
          <text:p/>
        </draw:connector>
        <draw:connector draw:style-name="gr14" draw:text-style-name="P5" draw:layer="layout" draw:type="line" svg:x1="17.395cm" svg:y1="11.372cm" svg:x2="18.562cm" svg:y2="11.371cm" svg:d="M17395 11372l1167-1" svg:viewBox="0 0 1168 2">
          <text:p/>
        </draw:connector>
        <draw:connector draw:style-name="gr14" draw:text-style-name="P5" draw:layer="layout" draw:type="line" svg:x1="17.394cm" svg:y1="12.846cm" svg:x2="18.561cm" svg:y2="12.845cm" svg:d="M17394 12846l1167-1" svg:viewBox="0 0 1168 2">
          <text:p/>
        </draw:connector>
        <draw:connector draw:style-name="gr14" draw:text-style-name="P5" draw:layer="layout" draw:type="line" svg:x1="17.394cm" svg:y1="12.846cm" svg:x2="18.561cm" svg:y2="12.845cm" svg:d="M17394 12846l1167-1" svg:viewBox="0 0 1168 2">
          <text:p/>
        </draw:connector>
        <draw:connector draw:style-name="gr14" draw:text-style-name="P5" draw:layer="layout" draw:type="line" svg:x1="11.562cm" svg:y1="12.846cm" svg:x2="12.729cm" svg:y2="12.845cm" svg:d="M11562 12846l1167-1" svg:viewBox="0 0 1168 2">
          <text:p/>
        </draw:connector>
        <draw:connector draw:style-name="gr14" draw:text-style-name="P5" draw:layer="layout" draw:type="line" svg:x1="11.562cm" svg:y1="12.846cm" svg:x2="12.729cm" svg:y2="12.845cm" svg:d="M11562 12846l1167-1" svg:viewBox="0 0 1168 2">
          <text:p/>
        </draw:connector>
        <draw:connector draw:style-name="gr14" draw:text-style-name="P5" draw:layer="layout" draw:type="line" svg:x1="11.563cm" svg:y1="11.372cm" svg:x2="12.73cm" svg:y2="11.372cm" svg:d="M11563 11372h1167" svg:viewBox="0 0 1168 1">
          <text:p/>
        </draw:connector>
        <draw:connector draw:style-name="gr14" draw:text-style-name="P5" draw:layer="layout" draw:type="line" svg:x1="11.563cm" svg:y1="11.372cm" svg:x2="12.73cm" svg:y2="11.372cm" svg:d="M11563 11372h1167" svg:viewBox="0 0 1168 1">
          <text:p/>
        </draw:connector>
        <draw:custom-shape draw:style-name="gr17" draw:text-style-name="P6" draw:layer="layout" svg:width="0.777cm" svg:height="0.75cm" svg:x="12.73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75" draw:id="id75" draw:layer="layout" svg:width="0.777cm" svg:height="0.749cm" svg:x="12.73cm" svg:y="12.4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4.674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76" draw:id="id76" draw:layer="layout" svg:width="0.777cm" svg:height="0.749cm" svg:x="14.674cm" svg:y="1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2.729cm" svg:y="13.9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4.673cm" svg:y="1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8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8cm" svg:y="1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7cm" svg:y="1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 draw:text-style-name="P5" draw:layer="layout" svg:x1="13.118cm" svg:y1="13.22cm" svg:x2="13.118cm" svg:y2="13.971cm" svg:d="M13118 13220v751" svg:viewBox="0 0 1 752">
          <text:p/>
        </draw:connector>
        <draw:connector draw:style-name="gr14" draw:text-style-name="P5" draw:layer="layout" draw:type="line" svg:x1="13.118cm" svg:y1="13.22cm" svg:x2="13.118cm" svg:y2="13.971cm" svg:d="M13118 13220v751" svg:viewBox="0 0 1 752">
          <text:p/>
        </draw:connector>
        <draw:connector draw:style-name="gr14" draw:text-style-name="P5" draw:layer="layout" svg:x1="13.118cm" svg:y1="13.221cm" svg:x2="13.118cm" svg:y2="13.971cm" svg:d="M13118 13221v750" svg:viewBox="0 0 1 751">
          <text:p/>
        </draw:connector>
        <draw:connector draw:style-name="gr14" draw:text-style-name="P5" draw:layer="layout" draw:type="line" svg:x1="15.063cm" svg:y1="11.718cm" svg:x2="15.063cm" svg:y2="12.469cm" svg:d="M15063 11718v751" svg:viewBox="0 0 1 752">
          <text:p/>
        </draw:connector>
        <draw:connector draw:style-name="gr14" draw:text-style-name="P5" draw:layer="layout" svg:x1="15.062cm" svg:y1="13.22cm" svg:x2="15.062cm" svg:y2="13.971cm" svg:d="M15062 13220v751" svg:viewBox="0 0 1 752">
          <text:p/>
        </draw:connector>
        <draw:connector draw:style-name="gr14" draw:text-style-name="P5" draw:layer="layout" draw:type="line" svg:x1="15.062cm" svg:y1="13.22cm" svg:x2="15.062cm" svg:y2="13.971cm" svg:d="M15062 13220v751" svg:viewBox="0 0 1 752">
          <text:p/>
        </draw:connector>
        <draw:connector draw:style-name="gr14" draw:text-style-name="P5" draw:layer="layout" svg:x1="15.062cm" svg:y1="13.221cm" svg:x2="15.062cm" svg:y2="13.971cm" svg:d="M15062 13221v750" svg:viewBox="0 0 1 751">
          <text:p/>
        </draw:connector>
        <draw:connector draw:style-name="gr14" draw:text-style-name="P5" draw:layer="layout" draw:type="line" svg:x1="15.062cm" svg:y1="13.221cm" svg:x2="15.062cm" svg:y2="13.971cm" svg:d="M15062 13221v750" svg:viewBox="0 0 1 751">
          <text:p/>
        </draw:connector>
        <draw:connector draw:style-name="gr14" draw:text-style-name="P5" draw:layer="layout" svg:x1="17.006cm" svg:y1="13.22cm" svg:x2="17.006cm" svg:y2="13.971cm" svg:d="M17006 13220v751" svg:viewBox="0 0 1 752">
          <text:p/>
        </draw:connector>
        <draw:connector draw:style-name="gr14" draw:text-style-name="P5" draw:layer="layout" draw:type="line" svg:x1="17.006cm" svg:y1="13.22cm" svg:x2="17.006cm" svg:y2="13.971cm" svg:d="M17006 13220v751" svg:viewBox="0 0 1 752">
          <text:p/>
        </draw:connector>
        <draw:connector draw:style-name="gr14" draw:text-style-name="P5" draw:layer="layout" svg:x1="17.006cm" svg:y1="13.221cm" svg:x2="17.006cm" svg:y2="13.971cm" svg:d="M17006 13221v750" svg:viewBox="0 0 1 751">
          <text:p/>
        </draw:connector>
        <draw:connector draw:style-name="gr14" draw:text-style-name="P5" draw:layer="layout" draw:type="line" svg:x1="17.006cm" svg:y1="13.221cm" svg:x2="17.006cm" svg:y2="13.971cm" svg:d="M17006 13221v750" svg:viewBox="0 0 1 751">
          <text:p/>
        </draw:connector>
        <draw:connector draw:style-name="gr14" draw:text-style-name="P5" draw:layer="layout" draw:type="line" svg:x1="13.507cm" svg:y1="12.846cm" svg:x2="14.674cm" svg:y2="12.845cm" draw:start-shape="id75" draw:start-glue-point="10" draw:end-shape="id76" draw:end-glue-point="6" svg:d="M13507 12846l1167-1" svg:viewBox="0 0 1168 2">
          <text:p/>
        </draw:connector>
        <draw:connector draw:style-name="gr14" draw:text-style-name="P5" draw:layer="layout" draw:type="line" svg:x1="13.507cm" svg:y1="12.846cm" svg:x2="14.674cm" svg:y2="12.845cm" draw:start-shape="id75" draw:start-glue-point="10" draw:end-shape="id76" draw:end-glue-point="6" svg:d="M13507 12846l1167-1" svg:viewBox="0 0 1168 2">
          <text:p/>
        </draw:connector>
        <draw:connector draw:style-name="gr14" draw:text-style-name="P5" draw:layer="layout" draw:type="line" svg:x1="15.451cm" svg:y1="12.846cm" svg:x2="16.618cm" svg:y2="12.845cm" svg:d="M15451 12846l1167-1" svg:viewBox="0 0 1168 2">
          <text:p/>
        </draw:connector>
        <draw:connector draw:style-name="gr14" draw:text-style-name="P5" draw:layer="layout" draw:type="line" svg:x1="15.451cm" svg:y1="12.846cm" svg:x2="16.618cm" svg:y2="12.845cm" svg:d="M15451 12846l1167-1" svg:viewBox="0 0 1168 2">
          <text:p/>
        </draw:connector>
        <draw:connector draw:style-name="gr14" draw:text-style-name="P5" draw:layer="layout" draw:type="line" svg:x1="13.507cm" svg:y1="11.372cm" svg:x2="14.675cm" svg:y2="11.371cm" svg:d="M13507 11372l1168-1" svg:viewBox="0 0 1169 2">
          <text:p/>
        </draw:connector>
        <draw:connector draw:style-name="gr14" draw:text-style-name="P5" draw:layer="layout" draw:type="line" svg:x1="13.507cm" svg:y1="11.372cm" svg:x2="14.675cm" svg:y2="11.371cm" svg:d="M13507 11372l1168-1" svg:viewBox="0 0 1169 2">
          <text:p/>
        </draw:connector>
        <draw:connector draw:style-name="gr14" draw:text-style-name="P5" draw:layer="layout" draw:type="line" svg:x1="15.452cm" svg:y1="11.372cm" svg:x2="16.618cm" svg:y2="11.372cm" svg:d="M15452 11372h1166" svg:viewBox="0 0 1167 1">
          <text:p/>
        </draw:connector>
        <draw:connector draw:style-name="gr14" draw:text-style-name="P5" draw:layer="layout" draw:type="line" svg:x1="15.452cm" svg:y1="11.372cm" svg:x2="16.618cm" svg:y2="11.372cm" svg:d="M15452 11372h1166" svg:viewBox="0 0 1167 1">
          <text:p/>
        </draw:connector>
        <draw:connector draw:style-name="gr14" draw:text-style-name="P5" draw:layer="layout" draw:type="line" svg:x1="13.118cm" svg:y1="11.718cm" svg:x2="13.118cm" svg:y2="12.469cm" svg:d="M13118 11718v751" svg:viewBox="0 0 1 752">
          <text:p/>
        </draw:connector>
        <draw:connector draw:style-name="gr14" draw:text-style-name="P5" draw:layer="layout" draw:type="line" svg:x1="13.118cm" svg:y1="11.719cm" svg:x2="13.118cm" svg:y2="12.47cm" svg:d="M13118 11719v751" svg:viewBox="0 0 1 752">
          <text:p/>
        </draw:connector>
        <draw:connector draw:style-name="gr14" draw:text-style-name="P5" draw:layer="layout" draw:type="line" svg:x1="17.007cm" svg:y1="11.718cm" svg:x2="17.007cm" svg:y2="12.469cm" svg:d="M17007 11718v751" svg:viewBox="0 0 1 752">
          <text:p/>
        </draw:connector>
        <draw:connector draw:style-name="gr14" draw:text-style-name="P5" draw:layer="layout" draw:type="line" svg:x1="17.395cm" svg:y1="11.372cm" svg:x2="18.562cm" svg:y2="11.371cm" svg:d="M17395 11372l1167-1" svg:viewBox="0 0 1168 2">
          <text:p/>
        </draw:connector>
        <draw:connector draw:style-name="gr14" draw:text-style-name="P5" draw:layer="layout" draw:type="line" svg:x1="17.395cm" svg:y1="11.372cm" svg:x2="18.562cm" svg:y2="11.371cm" svg:d="M17395 11372l1167-1" svg:viewBox="0 0 1168 2">
          <text:p/>
        </draw:connector>
        <draw:connector draw:style-name="gr14" draw:text-style-name="P5" draw:layer="layout" draw:type="line" svg:x1="17.394cm" svg:y1="12.846cm" svg:x2="18.561cm" svg:y2="12.845cm" svg:d="M17394 12846l1167-1" svg:viewBox="0 0 1168 2">
          <text:p/>
        </draw:connector>
        <draw:connector draw:style-name="gr14" draw:text-style-name="P5" draw:layer="layout" draw:type="line" svg:x1="17.394cm" svg:y1="12.846cm" svg:x2="18.561cm" svg:y2="12.845cm" svg:d="M17394 12846l1167-1" svg:viewBox="0 0 1168 2">
          <text:p/>
        </draw:connector>
        <draw:connector draw:style-name="gr14" draw:text-style-name="P5" draw:layer="layout" draw:type="line" svg:x1="11.562cm" svg:y1="12.846cm" svg:x2="12.729cm" svg:y2="12.845cm" svg:d="M11562 12846l1167-1" svg:viewBox="0 0 1168 2">
          <text:p/>
        </draw:connector>
        <draw:connector draw:style-name="gr14" draw:text-style-name="P5" draw:layer="layout" draw:type="line" svg:x1="11.562cm" svg:y1="12.846cm" svg:x2="12.729cm" svg:y2="12.845cm" svg:d="M11562 12846l1167-1" svg:viewBox="0 0 1168 2">
          <text:p/>
        </draw:connector>
        <draw:connector draw:style-name="gr14" draw:text-style-name="P5" draw:layer="layout" draw:type="line" svg:x1="11.563cm" svg:y1="11.372cm" svg:x2="12.73cm" svg:y2="11.372cm" svg:d="M11563 11372h1167" svg:viewBox="0 0 1168 1">
          <text:p/>
        </draw:connector>
        <draw:connector draw:style-name="gr14" draw:text-style-name="P5" draw:layer="layout" draw:type="line" svg:x1="11.563cm" svg:y1="11.372cm" svg:x2="12.73cm" svg:y2="11.372cm" svg:d="M11563 11372h1167" svg:viewBox="0 0 1168 1">
          <text:p/>
        </draw:connector>
        <draw:custom-shape draw:style-name="gr17" draw:text-style-name="P6" draw:layer="layout" svg:width="0.777cm" svg:height="0.75cm" svg:x="12.73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77" draw:id="id77" draw:layer="layout" svg:width="0.777cm" svg:height="0.749cm" svg:x="12.73cm" svg:y="12.4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4.674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78" draw:id="id78" draw:layer="layout" svg:width="0.777cm" svg:height="0.749cm" svg:x="14.674cm" svg:y="1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2.729cm" svg:y="13.9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4.673cm" svg:y="1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8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8cm" svg:y="1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7cm" svg:y="1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 draw:text-style-name="P5" draw:layer="layout" svg:x1="13.118cm" svg:y1="13.22cm" svg:x2="13.118cm" svg:y2="13.971cm" svg:d="M13118 13220v751" svg:viewBox="0 0 1 752">
          <text:p/>
        </draw:connector>
        <draw:connector draw:style-name="gr14" draw:text-style-name="P5" draw:layer="layout" draw:type="line" svg:x1="13.118cm" svg:y1="13.22cm" svg:x2="13.118cm" svg:y2="13.971cm" svg:d="M13118 13220v751" svg:viewBox="0 0 1 752">
          <text:p/>
        </draw:connector>
        <draw:connector draw:style-name="gr14" draw:text-style-name="P5" draw:layer="layout" svg:x1="13.118cm" svg:y1="13.221cm" svg:x2="13.118cm" svg:y2="13.971cm" svg:d="M13118 13221v750" svg:viewBox="0 0 1 751">
          <text:p/>
        </draw:connector>
        <draw:connector draw:style-name="gr14" draw:text-style-name="P5" draw:layer="layout" draw:type="line" svg:x1="15.063cm" svg:y1="11.718cm" svg:x2="15.063cm" svg:y2="12.469cm" svg:d="M15063 11718v751" svg:viewBox="0 0 1 752">
          <text:p/>
        </draw:connector>
        <draw:connector draw:style-name="gr14" draw:text-style-name="P5" draw:layer="layout" svg:x1="15.062cm" svg:y1="13.22cm" svg:x2="15.062cm" svg:y2="13.971cm" svg:d="M15062 13220v751" svg:viewBox="0 0 1 752">
          <text:p/>
        </draw:connector>
        <draw:connector draw:style-name="gr14" draw:text-style-name="P5" draw:layer="layout" draw:type="line" svg:x1="15.062cm" svg:y1="13.22cm" svg:x2="15.062cm" svg:y2="13.971cm" svg:d="M15062 13220v751" svg:viewBox="0 0 1 752">
          <text:p/>
        </draw:connector>
        <draw:connector draw:style-name="gr14" draw:text-style-name="P5" draw:layer="layout" svg:x1="15.062cm" svg:y1="13.221cm" svg:x2="15.062cm" svg:y2="13.971cm" svg:d="M15062 13221v750" svg:viewBox="0 0 1 751">
          <text:p/>
        </draw:connector>
        <draw:connector draw:style-name="gr14" draw:text-style-name="P5" draw:layer="layout" draw:type="line" svg:x1="15.062cm" svg:y1="13.221cm" svg:x2="15.062cm" svg:y2="13.971cm" svg:d="M15062 13221v750" svg:viewBox="0 0 1 751">
          <text:p/>
        </draw:connector>
        <draw:connector draw:style-name="gr14" draw:text-style-name="P5" draw:layer="layout" svg:x1="17.006cm" svg:y1="13.22cm" svg:x2="17.006cm" svg:y2="13.971cm" svg:d="M17006 13220v751" svg:viewBox="0 0 1 752">
          <text:p/>
        </draw:connector>
        <draw:connector draw:style-name="gr14" draw:text-style-name="P5" draw:layer="layout" draw:type="line" svg:x1="17.006cm" svg:y1="13.22cm" svg:x2="17.006cm" svg:y2="13.971cm" svg:d="M17006 13220v751" svg:viewBox="0 0 1 752">
          <text:p/>
        </draw:connector>
        <draw:connector draw:style-name="gr14" draw:text-style-name="P5" draw:layer="layout" svg:x1="17.006cm" svg:y1="13.221cm" svg:x2="17.006cm" svg:y2="13.971cm" svg:d="M17006 13221v750" svg:viewBox="0 0 1 751">
          <text:p/>
        </draw:connector>
        <draw:connector draw:style-name="gr14" draw:text-style-name="P5" draw:layer="layout" draw:type="line" svg:x1="17.006cm" svg:y1="13.221cm" svg:x2="17.006cm" svg:y2="13.971cm" svg:d="M17006 13221v750" svg:viewBox="0 0 1 751">
          <text:p/>
        </draw:connector>
        <draw:connector draw:style-name="gr14" draw:text-style-name="P5" draw:layer="layout" draw:type="line" svg:x1="13.507cm" svg:y1="12.846cm" svg:x2="14.674cm" svg:y2="12.845cm" draw:start-shape="id77" draw:start-glue-point="10" draw:end-shape="id78" draw:end-glue-point="6" svg:d="M13507 12846l1167-1" svg:viewBox="0 0 1168 2">
          <text:p/>
        </draw:connector>
        <draw:connector draw:style-name="gr14" draw:text-style-name="P5" draw:layer="layout" draw:type="line" svg:x1="13.507cm" svg:y1="12.846cm" svg:x2="14.674cm" svg:y2="12.845cm" draw:start-shape="id77" draw:start-glue-point="10" draw:end-shape="id78" draw:end-glue-point="6" svg:d="M13507 12846l1167-1" svg:viewBox="0 0 1168 2">
          <text:p/>
        </draw:connector>
        <draw:connector draw:style-name="gr14" draw:text-style-name="P5" draw:layer="layout" draw:type="line" svg:x1="15.451cm" svg:y1="12.846cm" svg:x2="16.618cm" svg:y2="12.845cm" svg:d="M15451 12846l1167-1" svg:viewBox="0 0 1168 2">
          <text:p/>
        </draw:connector>
        <draw:connector draw:style-name="gr14" draw:text-style-name="P5" draw:layer="layout" draw:type="line" svg:x1="15.451cm" svg:y1="12.846cm" svg:x2="16.618cm" svg:y2="12.845cm" svg:d="M15451 12846l1167-1" svg:viewBox="0 0 1168 2">
          <text:p/>
        </draw:connector>
        <draw:connector draw:style-name="gr14" draw:text-style-name="P5" draw:layer="layout" draw:type="line" svg:x1="13.507cm" svg:y1="11.372cm" svg:x2="14.675cm" svg:y2="11.371cm" svg:d="M13507 11372l1168-1" svg:viewBox="0 0 1169 2">
          <text:p/>
        </draw:connector>
        <draw:connector draw:style-name="gr14" draw:text-style-name="P5" draw:layer="layout" draw:type="line" svg:x1="13.507cm" svg:y1="11.372cm" svg:x2="14.675cm" svg:y2="11.371cm" svg:d="M13507 11372l1168-1" svg:viewBox="0 0 1169 2">
          <text:p/>
        </draw:connector>
        <draw:connector draw:style-name="gr14" draw:text-style-name="P5" draw:layer="layout" draw:type="line" svg:x1="15.452cm" svg:y1="11.372cm" svg:x2="16.618cm" svg:y2="11.372cm" svg:d="M15452 11372h1166" svg:viewBox="0 0 1167 1">
          <text:p/>
        </draw:connector>
        <draw:connector draw:style-name="gr14" draw:text-style-name="P5" draw:layer="layout" draw:type="line" svg:x1="15.452cm" svg:y1="11.372cm" svg:x2="16.618cm" svg:y2="11.372cm" svg:d="M15452 11372h1166" svg:viewBox="0 0 1167 1">
          <text:p/>
        </draw:connector>
        <draw:connector draw:style-name="gr14" draw:text-style-name="P5" draw:layer="layout" draw:type="line" svg:x1="13.118cm" svg:y1="11.718cm" svg:x2="13.118cm" svg:y2="12.469cm" svg:d="M13118 11718v751" svg:viewBox="0 0 1 752">
          <text:p/>
        </draw:connector>
        <draw:connector draw:style-name="gr14" draw:text-style-name="P5" draw:layer="layout" draw:type="line" svg:x1="13.118cm" svg:y1="11.719cm" svg:x2="13.118cm" svg:y2="12.47cm" svg:d="M13118 11719v751" svg:viewBox="0 0 1 752">
          <text:p/>
        </draw:connector>
        <draw:connector draw:style-name="gr14" draw:text-style-name="P5" draw:layer="layout" draw:type="line" svg:x1="17.007cm" svg:y1="11.718cm" svg:x2="17.007cm" svg:y2="12.469cm" svg:d="M17007 11718v751" svg:viewBox="0 0 1 752">
          <text:p/>
        </draw:connector>
        <draw:connector draw:style-name="gr14" draw:text-style-name="P5" draw:layer="layout" draw:type="line" svg:x1="17.395cm" svg:y1="11.372cm" svg:x2="18.562cm" svg:y2="11.371cm" svg:d="M17395 11372l1167-1" svg:viewBox="0 0 1168 2">
          <text:p/>
        </draw:connector>
        <draw:connector draw:style-name="gr14" draw:text-style-name="P5" draw:layer="layout" draw:type="line" svg:x1="17.395cm" svg:y1="11.372cm" svg:x2="18.562cm" svg:y2="11.371cm" svg:d="M17395 11372l1167-1" svg:viewBox="0 0 1168 2">
          <text:p/>
        </draw:connector>
        <draw:connector draw:style-name="gr14" draw:text-style-name="P5" draw:layer="layout" draw:type="line" svg:x1="17.394cm" svg:y1="12.846cm" svg:x2="18.561cm" svg:y2="12.845cm" svg:d="M17394 12846l1167-1" svg:viewBox="0 0 1168 2">
          <text:p/>
        </draw:connector>
        <draw:connector draw:style-name="gr14" draw:text-style-name="P5" draw:layer="layout" draw:type="line" svg:x1="17.394cm" svg:y1="12.846cm" svg:x2="18.561cm" svg:y2="12.845cm" svg:d="M17394 12846l1167-1" svg:viewBox="0 0 1168 2">
          <text:p/>
        </draw:connector>
        <draw:connector draw:style-name="gr14" draw:text-style-name="P5" draw:layer="layout" draw:type="line" svg:x1="11.562cm" svg:y1="12.846cm" svg:x2="12.729cm" svg:y2="12.845cm" svg:d="M11562 12846l1167-1" svg:viewBox="0 0 1168 2">
          <text:p/>
        </draw:connector>
        <draw:connector draw:style-name="gr14" draw:text-style-name="P5" draw:layer="layout" draw:type="line" svg:x1="11.562cm" svg:y1="12.846cm" svg:x2="12.729cm" svg:y2="12.845cm" svg:d="M11562 12846l1167-1" svg:viewBox="0 0 1168 2">
          <text:p/>
        </draw:connector>
        <draw:connector draw:style-name="gr14" draw:text-style-name="P5" draw:layer="layout" draw:type="line" svg:x1="11.563cm" svg:y1="11.372cm" svg:x2="12.73cm" svg:y2="11.372cm" svg:d="M11563 11372h1167" svg:viewBox="0 0 1168 1">
          <text:p/>
        </draw:connector>
        <draw:connector draw:style-name="gr14" draw:text-style-name="P5" draw:layer="layout" draw:type="line" svg:x1="11.563cm" svg:y1="11.372cm" svg:x2="12.73cm" svg:y2="11.372cm" svg:d="M11563 11372h1167" svg:viewBox="0 0 1168 1">
          <text:p/>
        </draw:connector>
        <draw:custom-shape draw:style-name="gr17" draw:text-style-name="P6" draw:layer="layout" svg:width="0.777cm" svg:height="0.75cm" svg:x="12.73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79" draw:id="id79" draw:layer="layout" svg:width="0.777cm" svg:height="0.749cm" svg:x="12.73cm" svg:y="12.4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4.674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80" draw:id="id80" draw:layer="layout" svg:width="0.777cm" svg:height="0.749cm" svg:x="14.674cm" svg:y="1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0" draw:layer="layout" svg:width="4.5cm" svg:height="1.25cm" svg:x="8.333cm" svg:y="14.5cm">
          <text:p text:style-name="P6">Longitudes</text:p>
          <draw:enhanced-geometry svg:viewBox="0 0 21600 21600" draw:type="rectangle" draw:enhanced-path="M 0 0 L 21600 0 21600 21600 0 21600 0 0 Z N"/>
        </draw:custom-shape>
        <draw:custom-shape draw:style-name="gr12" draw:text-style-name="P6" draw:layer="layout" svg:width="0.777cm" svg:height="0.749cm" svg:x="12.729cm" svg:y="13.9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4.673cm" svg:y="1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8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8cm" svg:y="1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0.777cm" svg:height="0.749cm" svg:x="16.617cm" svg:y="1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 draw:text-style-name="P5" draw:layer="layout" svg:x1="13.118cm" svg:y1="13.22cm" svg:x2="13.118cm" svg:y2="13.971cm" svg:d="M13118 13220v751" svg:viewBox="0 0 1 752">
          <text:p/>
        </draw:connector>
        <draw:connector draw:style-name="gr14" draw:text-style-name="P5" draw:layer="layout" draw:type="line" svg:x1="13.118cm" svg:y1="13.22cm" svg:x2="13.118cm" svg:y2="13.971cm" svg:d="M13118 13220v751" svg:viewBox="0 0 1 752">
          <text:p/>
        </draw:connector>
        <draw:connector draw:style-name="gr14" draw:text-style-name="P5" draw:layer="layout" svg:x1="13.118cm" svg:y1="13.221cm" svg:x2="13.118cm" svg:y2="13.971cm" svg:d="M13118 13221v750" svg:viewBox="0 0 1 751">
          <text:p/>
        </draw:connector>
        <draw:connector draw:style-name="gr14" draw:text-style-name="P5" draw:layer="layout" draw:type="line" svg:x1="15.063cm" svg:y1="11.718cm" svg:x2="15.063cm" svg:y2="12.469cm" svg:d="M15063 11718v751" svg:viewBox="0 0 1 752">
          <text:p/>
        </draw:connector>
        <draw:connector draw:style-name="gr14" draw:text-style-name="P5" draw:layer="layout" svg:x1="15.062cm" svg:y1="13.22cm" svg:x2="15.062cm" svg:y2="13.971cm" svg:d="M15062 13220v751" svg:viewBox="0 0 1 752">
          <text:p/>
        </draw:connector>
        <draw:connector draw:style-name="gr14" draw:text-style-name="P5" draw:layer="layout" draw:type="line" svg:x1="15.062cm" svg:y1="13.22cm" svg:x2="15.062cm" svg:y2="13.971cm" svg:d="M15062 13220v751" svg:viewBox="0 0 1 752">
          <text:p/>
        </draw:connector>
        <draw:connector draw:style-name="gr14" draw:text-style-name="P5" draw:layer="layout" svg:x1="15.062cm" svg:y1="13.221cm" svg:x2="15.062cm" svg:y2="13.971cm" svg:d="M15062 13221v750" svg:viewBox="0 0 1 751">
          <text:p/>
        </draw:connector>
        <draw:connector draw:style-name="gr14" draw:text-style-name="P5" draw:layer="layout" draw:type="line" svg:x1="15.062cm" svg:y1="13.221cm" svg:x2="15.062cm" svg:y2="13.971cm" svg:d="M15062 13221v750" svg:viewBox="0 0 1 751">
          <text:p/>
        </draw:connector>
        <draw:connector draw:style-name="gr14" draw:text-style-name="P5" draw:layer="layout" svg:x1="17.006cm" svg:y1="13.22cm" svg:x2="17.006cm" svg:y2="13.971cm" svg:d="M17006 13220v751" svg:viewBox="0 0 1 752">
          <text:p/>
        </draw:connector>
        <draw:connector draw:style-name="gr14" draw:text-style-name="P5" draw:layer="layout" draw:type="line" svg:x1="17.006cm" svg:y1="13.22cm" svg:x2="17.006cm" svg:y2="13.971cm" svg:d="M17006 13220v751" svg:viewBox="0 0 1 752">
          <text:p/>
        </draw:connector>
        <draw:connector draw:style-name="gr14" draw:text-style-name="P5" draw:layer="layout" svg:x1="17.006cm" svg:y1="13.221cm" svg:x2="17.006cm" svg:y2="13.971cm" svg:d="M17006 13221v750" svg:viewBox="0 0 1 751">
          <text:p/>
        </draw:connector>
        <draw:connector draw:style-name="gr14" draw:text-style-name="P5" draw:layer="layout" draw:type="line" svg:x1="17.006cm" svg:y1="13.221cm" svg:x2="17.006cm" svg:y2="13.971cm" svg:d="M17006 13221v750" svg:viewBox="0 0 1 751">
          <text:p/>
        </draw:connector>
        <draw:connector draw:style-name="gr14" draw:text-style-name="P5" draw:layer="layout" draw:type="line" svg:x1="13.507cm" svg:y1="12.846cm" svg:x2="14.674cm" svg:y2="12.845cm" draw:start-shape="id79" draw:start-glue-point="10" draw:end-shape="id80" draw:end-glue-point="6" svg:d="M13507 12846l1167-1" svg:viewBox="0 0 1168 2">
          <text:p/>
        </draw:connector>
        <draw:connector draw:style-name="gr14" draw:text-style-name="P5" draw:layer="layout" draw:type="line" svg:x1="13.507cm" svg:y1="12.846cm" svg:x2="14.674cm" svg:y2="12.845cm" draw:start-shape="id79" draw:start-glue-point="10" draw:end-shape="id80" draw:end-glue-point="6" svg:d="M13507 12846l1167-1" svg:viewBox="0 0 1168 2">
          <text:p/>
        </draw:connector>
        <draw:connector draw:style-name="gr14" draw:text-style-name="P5" draw:layer="layout" draw:type="line" svg:x1="15.451cm" svg:y1="12.846cm" svg:x2="16.618cm" svg:y2="12.845cm" svg:d="M15451 12846l1167-1" svg:viewBox="0 0 1168 2">
          <text:p/>
        </draw:connector>
        <draw:connector draw:style-name="gr14" draw:text-style-name="P5" draw:layer="layout" draw:type="line" svg:x1="15.451cm" svg:y1="12.846cm" svg:x2="16.618cm" svg:y2="12.845cm" svg:d="M15451 12846l1167-1" svg:viewBox="0 0 1168 2">
          <text:p/>
        </draw:connector>
        <draw:connector draw:style-name="gr14" draw:text-style-name="P5" draw:layer="layout" draw:type="line" svg:x1="13.507cm" svg:y1="11.372cm" svg:x2="14.675cm" svg:y2="11.371cm" svg:d="M13507 11372l1168-1" svg:viewBox="0 0 1169 2">
          <text:p/>
        </draw:connector>
        <draw:connector draw:style-name="gr14" draw:text-style-name="P5" draw:layer="layout" draw:type="line" svg:x1="13.507cm" svg:y1="11.372cm" svg:x2="14.675cm" svg:y2="11.371cm" svg:d="M13507 11372l1168-1" svg:viewBox="0 0 1169 2">
          <text:p/>
        </draw:connector>
        <draw:connector draw:style-name="gr14" draw:text-style-name="P5" draw:layer="layout" draw:type="line" svg:x1="15.452cm" svg:y1="11.372cm" svg:x2="16.618cm" svg:y2="11.372cm" svg:d="M15452 11372h1166" svg:viewBox="0 0 1167 1">
          <text:p/>
        </draw:connector>
        <draw:connector draw:style-name="gr14" draw:text-style-name="P5" draw:layer="layout" draw:type="line" svg:x1="15.452cm" svg:y1="11.372cm" svg:x2="16.618cm" svg:y2="11.372cm" svg:d="M15452 11372h1166" svg:viewBox="0 0 1167 1">
          <text:p/>
        </draw:connector>
        <draw:connector draw:style-name="gr14" draw:text-style-name="P5" draw:layer="layout" draw:type="line" svg:x1="13.118cm" svg:y1="11.718cm" svg:x2="13.118cm" svg:y2="12.469cm" svg:d="M13118 11718v751" svg:viewBox="0 0 1 752">
          <text:p/>
        </draw:connector>
        <draw:connector draw:style-name="gr14" draw:text-style-name="P5" draw:layer="layout" draw:type="line" svg:x1="13.118cm" svg:y1="11.719cm" svg:x2="13.118cm" svg:y2="12.47cm" svg:d="M13118 11719v751" svg:viewBox="0 0 1 752">
          <text:p/>
        </draw:connector>
        <draw:connector draw:style-name="gr14" draw:text-style-name="P5" draw:layer="layout" draw:type="line" svg:x1="17.007cm" svg:y1="11.718cm" svg:x2="17.007cm" svg:y2="12.469cm" svg:d="M17007 11718v751" svg:viewBox="0 0 1 752">
          <text:p/>
        </draw:connector>
        <draw:connector draw:style-name="gr14" draw:text-style-name="P5" draw:layer="layout" draw:type="line" svg:x1="17.395cm" svg:y1="11.372cm" svg:x2="18.562cm" svg:y2="11.371cm" svg:d="M17395 11372l1167-1" svg:viewBox="0 0 1168 2">
          <text:p/>
        </draw:connector>
        <draw:connector draw:style-name="gr14" draw:text-style-name="P5" draw:layer="layout" draw:type="line" svg:x1="17.395cm" svg:y1="11.372cm" svg:x2="18.562cm" svg:y2="11.371cm" svg:d="M17395 11372l1167-1" svg:viewBox="0 0 1168 2">
          <text:p/>
        </draw:connector>
        <draw:connector draw:style-name="gr14" draw:text-style-name="P5" draw:layer="layout" draw:type="line" svg:x1="17.394cm" svg:y1="12.846cm" svg:x2="18.561cm" svg:y2="12.845cm" svg:d="M17394 12846l1167-1" svg:viewBox="0 0 1168 2">
          <text:p/>
        </draw:connector>
        <draw:connector draw:style-name="gr14" draw:text-style-name="P5" draw:layer="layout" draw:type="line" svg:x1="17.394cm" svg:y1="12.846cm" svg:x2="18.561cm" svg:y2="12.845cm" svg:d="M17394 12846l1167-1" svg:viewBox="0 0 1168 2">
          <text:p/>
        </draw:connector>
        <draw:connector draw:style-name="gr14" draw:text-style-name="P5" draw:layer="layout" draw:type="line" svg:x1="11.562cm" svg:y1="12.846cm" svg:x2="12.729cm" svg:y2="12.845cm" svg:d="M11562 12846l1167-1" svg:viewBox="0 0 1168 2">
          <text:p/>
        </draw:connector>
        <draw:connector draw:style-name="gr14" draw:text-style-name="P5" draw:layer="layout" draw:type="line" svg:x1="11.562cm" svg:y1="12.846cm" svg:x2="12.729cm" svg:y2="12.845cm" svg:d="M11562 12846l1167-1" svg:viewBox="0 0 1168 2">
          <text:p/>
        </draw:connector>
        <draw:connector draw:style-name="gr14" draw:text-style-name="P5" draw:layer="layout" draw:type="line" svg:x1="11.563cm" svg:y1="11.372cm" svg:x2="12.73cm" svg:y2="11.372cm" svg:d="M11563 11372h1167" svg:viewBox="0 0 1168 1">
          <text:p/>
        </draw:connector>
        <draw:connector draw:style-name="gr14" draw:text-style-name="P5" draw:layer="layout" draw:type="line" svg:x1="11.563cm" svg:y1="11.372cm" svg:x2="12.73cm" svg:y2="11.372cm" svg:d="M11563 11372h1167" svg:viewBox="0 0 1168 1">
          <text:p/>
        </draw:connector>
        <draw:connector draw:style-name="gr14" draw:text-style-name="P5" draw:layer="layout" draw:type="line" svg:x1="15.063cm" svg:y1="10.218cm" svg:x2="15.063cm" svg:y2="10.969cm" svg:d="M15063 10218v751" svg:viewBox="0 0 1 752">
          <text:p/>
        </draw:connector>
        <draw:connector draw:style-name="gr14" draw:text-style-name="P5" draw:layer="layout" draw:type="line" svg:x1="13.118cm" svg:y1="10.218cm" svg:x2="13.118cm" svg:y2="10.969cm" svg:d="M13118 10218v751" svg:viewBox="0 0 1 752">
          <text:p/>
        </draw:connector>
        <draw:connector draw:style-name="gr14" draw:text-style-name="P5" draw:layer="layout" draw:type="line" svg:x1="13.118cm" svg:y1="10.219cm" svg:x2="13.118cm" svg:y2="10.97cm" svg:d="M13118 10219v751" svg:viewBox="0 0 1 752">
          <text:p/>
        </draw:connector>
        <draw:connector draw:style-name="gr14" draw:text-style-name="P5" draw:layer="layout" draw:type="line" svg:x1="17.007cm" svg:y1="10.218cm" svg:x2="17.007cm" svg:y2="10.969cm" svg:d="M17007 10218v751" svg:viewBox="0 0 1 752">
          <text:p/>
        </draw:connector>
        <draw:connector draw:style-name="gr14" draw:text-style-name="P5" draw:layer="layout" draw:type="line" svg:x1="15.063cm" svg:y1="10.218cm" svg:x2="15.063cm" svg:y2="10.969cm" svg:d="M15063 10218v751" svg:viewBox="0 0 1 752">
          <text:p/>
        </draw:connector>
        <draw:connector draw:style-name="gr14" draw:text-style-name="P5" draw:layer="layout" draw:type="line" svg:x1="13.118cm" svg:y1="10.218cm" svg:x2="13.118cm" svg:y2="10.969cm" svg:d="M13118 10218v751" svg:viewBox="0 0 1 752">
          <text:p/>
        </draw:connector>
        <draw:connector draw:style-name="gr14" draw:text-style-name="P5" draw:layer="layout" draw:type="line" svg:x1="13.118cm" svg:y1="10.219cm" svg:x2="13.118cm" svg:y2="10.97cm" svg:d="M13118 10219v751" svg:viewBox="0 0 1 752">
          <text:p/>
        </draw:connector>
        <draw:connector draw:style-name="gr14" draw:text-style-name="P5" draw:layer="layout" draw:type="line" svg:x1="17.007cm" svg:y1="10.218cm" svg:x2="17.007cm" svg:y2="10.969cm" svg:d="M17007 10218v751" svg:viewBox="0 0 1 752">
          <text:p/>
        </draw:connector>
        <draw:connector draw:style-name="gr14" draw:text-style-name="P5" draw:layer="layout" draw:type="line" svg:x1="15.063cm" svg:y1="10.218cm" svg:x2="15.063cm" svg:y2="10.969cm" svg:d="M15063 10218v751" svg:viewBox="0 0 1 752">
          <text:p/>
        </draw:connector>
        <draw:connector draw:style-name="gr14" draw:text-style-name="P5" draw:layer="layout" draw:type="line" svg:x1="13.118cm" svg:y1="10.218cm" svg:x2="13.118cm" svg:y2="10.969cm" svg:d="M13118 10218v751" svg:viewBox="0 0 1 752">
          <text:p/>
        </draw:connector>
        <draw:connector draw:style-name="gr14" draw:text-style-name="P5" draw:layer="layout" draw:type="line" svg:x1="13.118cm" svg:y1="10.219cm" svg:x2="13.118cm" svg:y2="10.97cm" svg:d="M13118 10219v751" svg:viewBox="0 0 1 752">
          <text:p/>
        </draw:connector>
        <draw:connector draw:style-name="gr14" draw:text-style-name="P5" draw:layer="layout" draw:type="line" svg:x1="17.007cm" svg:y1="10.218cm" svg:x2="17.007cm" svg:y2="10.969cm" svg:d="M17007 10218v751" svg:viewBox="0 0 1 752">
          <text:p/>
        </draw:connector>
        <draw:connector draw:style-name="gr14" draw:text-style-name="P5" draw:layer="layout" draw:type="line" svg:x1="15.063cm" svg:y1="10.218cm" svg:x2="15.063cm" svg:y2="10.969cm" svg:d="M15063 10218v751" svg:viewBox="0 0 1 752">
          <text:p/>
        </draw:connector>
        <draw:connector draw:style-name="gr14" draw:text-style-name="P5" draw:layer="layout" draw:type="line" svg:x1="13.118cm" svg:y1="10.218cm" svg:x2="13.118cm" svg:y2="10.969cm" svg:d="M13118 10218v751" svg:viewBox="0 0 1 752">
          <text:p/>
        </draw:connector>
        <draw:connector draw:style-name="gr14" draw:text-style-name="P5" draw:layer="layout" draw:type="line" svg:x1="13.118cm" svg:y1="10.219cm" svg:x2="13.118cm" svg:y2="10.97cm" svg:d="M13118 10219v751" svg:viewBox="0 0 1 752">
          <text:p/>
        </draw:connector>
        <draw:connector draw:style-name="gr14" draw:text-style-name="P5" draw:layer="layout" draw:type="line" svg:x1="17.007cm" svg:y1="10.218cm" svg:x2="17.007cm" svg:y2="10.969cm" svg:d="M17007 10218v751" svg:viewBox="0 0 1 752">
          <text:p/>
        </draw:connector>
        <draw:connector draw:style-name="gr14" draw:text-style-name="P5" draw:layer="layout" draw:type="line" svg:x1="15.063cm" svg:y1="10.218cm" svg:x2="15.063cm" svg:y2="10.969cm" svg:d="M15063 10218v751" svg:viewBox="0 0 1 752">
          <text:p/>
        </draw:connector>
        <draw:connector draw:style-name="gr14" draw:text-style-name="P5" draw:layer="layout" draw:type="line" svg:x1="13.118cm" svg:y1="10.218cm" svg:x2="13.118cm" svg:y2="10.969cm" svg:d="M13118 10218v751" svg:viewBox="0 0 1 752">
          <text:p/>
        </draw:connector>
        <draw:connector draw:style-name="gr14" draw:text-style-name="P5" draw:layer="layout" draw:type="line" svg:x1="13.118cm" svg:y1="10.219cm" svg:x2="13.118cm" svg:y2="10.97cm" svg:d="M13118 10219v751" svg:viewBox="0 0 1 752">
          <text:p/>
        </draw:connector>
        <draw:connector draw:style-name="gr14" draw:text-style-name="P5" draw:layer="layout" draw:type="line" svg:x1="17.007cm" svg:y1="10.218cm" svg:x2="17.007cm" svg:y2="10.969cm" svg:d="M17007 10218v751" svg:viewBox="0 0 1 752">
          <text:p/>
        </draw:connector>
        <draw:connector draw:style-name="gr14" draw:text-style-name="P5" draw:layer="layout" draw:type="line" svg:x1="15.063cm" svg:y1="10.218cm" svg:x2="15.063cm" svg:y2="10.969cm" svg:d="M15063 10218v751" svg:viewBox="0 0 1 752">
          <text:p/>
        </draw:connector>
        <draw:connector draw:style-name="gr14" draw:text-style-name="P5" draw:layer="layout" draw:type="line" svg:x1="13.118cm" svg:y1="10.218cm" svg:x2="13.118cm" svg:y2="10.969cm" svg:d="M13118 10218v751" svg:viewBox="0 0 1 752">
          <text:p/>
        </draw:connector>
        <draw:connector draw:style-name="gr14" draw:text-style-name="P5" draw:layer="layout" draw:type="line" svg:x1="13.118cm" svg:y1="10.219cm" svg:x2="13.118cm" svg:y2="10.97cm" svg:d="M13118 10219v751" svg:viewBox="0 0 1 752">
          <text:p/>
        </draw:connector>
        <draw:connector draw:style-name="gr14" draw:text-style-name="P5" draw:layer="layout" draw:type="line" svg:x1="17.007cm" svg:y1="10.218cm" svg:x2="17.007cm" svg:y2="10.969cm" svg:d="M17007 10218v751" svg:viewBox="0 0 1 752">
          <text:p/>
        </draw:connector>
        <draw:connector draw:style-name="gr14" draw:text-style-name="P5" draw:layer="layout" draw:type="line" svg:x1="15.063cm" svg:y1="10.218cm" svg:x2="15.063cm" svg:y2="10.969cm" svg:d="M15063 10218v751" svg:viewBox="0 0 1 752">
          <text:p/>
        </draw:connector>
        <draw:connector draw:style-name="gr14" draw:text-style-name="P5" draw:layer="layout" draw:type="line" svg:x1="13.118cm" svg:y1="10.218cm" svg:x2="13.118cm" svg:y2="10.969cm" svg:d="M13118 10218v751" svg:viewBox="0 0 1 752">
          <text:p/>
        </draw:connector>
        <draw:connector draw:style-name="gr14" draw:text-style-name="P5" draw:layer="layout" draw:type="line" svg:x1="13.118cm" svg:y1="10.219cm" svg:x2="13.118cm" svg:y2="10.97cm" svg:d="M13118 10219v751" svg:viewBox="0 0 1 752">
          <text:p/>
        </draw:connector>
        <draw:connector draw:style-name="gr14" draw:text-style-name="P5" draw:layer="layout" draw:type="line" svg:x1="17.007cm" svg:y1="10.218cm" svg:x2="17.007cm" svg:y2="10.969cm" svg:d="M17007 10218v751" svg:viewBox="0 0 1 752">
          <text:p/>
        </draw:connector>
        <draw:connector draw:style-name="gr14" draw:text-style-name="P5" draw:layer="layout" draw:type="line" svg:x1="15.063cm" svg:y1="10.218cm" svg:x2="15.063cm" svg:y2="10.969cm" svg:d="M15063 10218v751" svg:viewBox="0 0 1 752">
          <text:p/>
        </draw:connector>
        <draw:connector draw:style-name="gr14" draw:text-style-name="P5" draw:layer="layout" draw:type="line" svg:x1="13.118cm" svg:y1="10.218cm" svg:x2="13.118cm" svg:y2="10.969cm" svg:d="M13118 10218v751" svg:viewBox="0 0 1 752">
          <text:p/>
        </draw:connector>
        <draw:connector draw:style-name="gr14" draw:text-style-name="P5" draw:layer="layout" draw:type="line" svg:x1="13.118cm" svg:y1="10.219cm" svg:x2="13.118cm" svg:y2="10.97cm" svg:d="M13118 10219v751" svg:viewBox="0 0 1 752">
          <text:p/>
        </draw:connector>
        <draw:connector draw:style-name="gr14" draw:text-style-name="P5" draw:layer="layout" draw:type="line" svg:x1="17.007cm" svg:y1="10.218cm" svg:x2="17.007cm" svg:y2="10.969cm" svg:d="M17007 10218v751" svg:viewBox="0 0 1 752">
          <text:p/>
        </draw:connector>
        <draw:line draw:style-name="gr19" draw:text-style-name="P5" draw:layer="layout" svg:x1="6.002cm" svg:y1="8.716cm" svg:x2="6.002cm" svg:y2="9.216cm">
          <text:p/>
        </draw:line>
        <draw:line draw:style-name="gr20" draw:text-style-name="P5" draw:layer="layout" svg:x1="10.002cm" svg:y1="6.216cm" svg:x2="11.502cm" svg:y2="6.216cm">
          <text:p/>
        </draw:line>
        <draw:line draw:style-name="gr20" draw:text-style-name="P5" draw:layer="layout" svg:x1="10.002cm" svg:y1="12.216cm" svg:x2="11.502cm" svg:y2="12.216cm">
          <text:p/>
        </draw:line>
        <draw:line draw:style-name="gr20" draw:text-style-name="P5" draw:layer="layout" svg:x1="6.002cm" svg:y1="8.716cm" svg:x2="6.002cm" svg:y2="9.716cm">
          <text:p/>
        </draw:line>
        <draw:line draw:style-name="gr20" draw:text-style-name="P5" draw:layer="layout" svg:x1="15.062cm" svg:y1="8.716cm" svg:x2="15.062cm" svg:y2="9.716cm">
          <text:p/>
        </draw:line>
        <draw:custom-shape draw:style-name="gr18" draw:text-style-name="P10" draw:layer="layout" svg:width="4.5cm" svg:height="1.25cm" draw:transform="rotate (1.5707963267949) translate (0.75cm 11.5cm)">
          <text:p text:style-name="P6">Latitudes</text:p>
          <draw:enhanced-geometry svg:viewBox="0 0 21600 21600" draw:mirror-horizontal="false" draw:mirror-vertical="false" draw:type="rectangle" draw:enhanced-path="M 0 0 L 21600 0 21600 21600 0 21600 0 0 Z N"/>
        </draw:custom-shape>
        <draw:custom-shape draw:style-name="gr21" draw:text-style-name="P11" draw:layer="layout" svg:width="0.999cm" svg:height="0.999cm" svg:x="1cm" svg:y="14cm">
          <text:p text:style-name="P6">-90</text:p>
          <draw:enhanced-geometry svg:viewBox="0 0 21600 21600" draw:type="rectangle" draw:enhanced-path="M 0 0 L 21600 0 21600 21600 0 21600 0 0 Z N"/>
        </draw:custom-shape>
        <draw:custom-shape draw:style-name="gr21" draw:text-style-name="P11" draw:layer="layout" svg:width="0.999cm" svg:height="0.999cm" svg:x="1cm" svg:y="3.501cm">
          <text:p text:style-name="P6">+90</text:p>
          <draw:enhanced-geometry svg:viewBox="0 0 21600 21600" draw:type="rectangle" draw:enhanced-path="M 0 0 L 21600 0 21600 21600 0 21600 0 0 Z N"/>
        </draw:custom-shape>
        <draw:custom-shape draw:style-name="gr21" draw:text-style-name="P11" draw:layer="layout" svg:width="0.999cm" svg:height="0.999cm" svg:x="3.394cm" svg:y="14.751cm">
          <text:p text:style-name="P6">0</text:p>
          <draw:enhanced-geometry svg:viewBox="0 0 21600 21600" draw:type="rectangle" draw:enhanced-path="M 0 0 L 21600 0 21600 21600 0 21600 0 0 Z N"/>
        </draw:custom-shape>
        <draw:custom-shape draw:style-name="gr22" draw:text-style-name="P11" draw:layer="layout" svg:width="2cm" svg:height="0.999cm" svg:x="15.954cm" svg:y="14.751cm">
          <text:p text:style-name="P6">360</text:p>
          <draw:enhanced-geometry svg:viewBox="0 0 21600 21600" draw:type="rectangle" draw:enhanced-path="M 0 0 L 21600 0 21600 21600 0 21600 0 0 Z N"/>
        </draw:custom-shape>
        <draw:frame presentation:style-name="pr18" draw:layer="layout" svg:width="8cm" svg:height="10cm" svg:x="19cm" svg:y="4cm" presentation:class="outline" presentation:user-transformed="true">
          <draw:text-box>
            <text:list text:style-name="L4">
              <text:list-item>
                <text:p>Nodes : grille de points lat-lon</text:p>
              </text:list-item>
              <text:list-item>
                <text:p>Edges : connectent les nodes. </text:p>
              </text:list-item>
              <text:list-item>
                <text:p>/!\ pôles</text:p>
              </text:list-item>
            </text:list>
          </draw:text-box>
        </draw:frame>
        <anim:par presentation:node-type="timing-root">
          <anim:par smil:begin="id90.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7" presentation:class="page"/>
          <draw:frame presentation:style-name="pr13" draw:text-style-name="P2" draw:layer="layout" svg:width="17cm" svg:height="14cm" svg:x="2cm" svg:y="13cm" presentation:class="notes" presentation:placeholder="true">
            <draw:text-box/>
          </draw:frame>
        </presentation:notes>
      </draw:page>
      <draw:page draw:name="page8" draw:style-name="dp1" draw:master-page-name="White_2f_Blue_20_Chart" presentation:presentation-page-layout-name="AL3T1" xml:id="id91" draw:id="id91">
        <office:forms form:automatic-focus="false" form:apply-design-mode="false"/>
        <draw:frame presentation:style-name="pr11" draw:layer="layout" svg:width="9.8cm" svg:height="2cm" svg:x="0cm" svg:y="0.8cm" presentation:class="title" presentation:user-transformed="true">
          <draw:text-box>
            <text:p>Features</text:p>
          </draw:text-box>
        </draw:frame>
        <draw:custom-shape draw:style-name="gr23" draw:text-style-name="P6" draw:layer="layout" svg:width="1.5cm" svg:height="1.5cm" svg:x="7cm" svg:y="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18" draw:text-style-name="P12" draw:layer="layout" svg:width="12cm" svg:height="10cm" svg:x="1.5cm" svg:y="4.5cm" presentation:class="outline" presentation:user-transformed="true">
          <draw:text-box>
            <text:list text:style-name="L4">
              <text:list-item>
                <text:p><text:span text:style-name="T4">500 hPa geopotentiel</text:span></text:p>
              </text:list-item>
              <text:list-item>
                <text:p><text:span text:style-name="T4">500 hPa U, V composantes du vent</text:span></text:p>
              </text:list-item>
              <text:list-item>
                <text:p><text:span text:style-name="T5">sin(lat)</text:span></text:p>
              </text:list-item>
              <text:list-item>
                <text:p><text:span text:style-name="T5">cos(lon), sin(lon)</text:span></text:p>
              </text:list-item>
            </text:list>
          </draw:text-box>
        </draw:frame>
        <draw:connector draw:style-name="gr24" draw:text-style-name="P5" draw:layer="layout" draw:type="line" svg:x1="19.699cm" svg:y1="3.8cm" svg:x2="22.1cm" svg:y2="3.817cm" svg:d="M19699 3800l2401 17" svg:viewBox="0 0 2402 18">
          <text:p/>
        </draw:connector>
        <draw:frame presentation:style-name="pr18" draw:text-style-name="P13" draw:layer="layout" svg:width="10.5cm" svg:height="10cm" svg:x="15cm" svg:y="4.5cm" presentation:class="outline" presentation:user-transformed="true">
          <draw:text-box>
            <text:list text:style-name="L4">
              <text:list-item>
                <text:p><text:span text:style-name="T6">Edge length</text:span></text:p>
              </text:list-item>
              <text:list-item>
                <text:p><text:span text:style-name="T6">X, Y coordonnées relatives du nœud source / nœud destination </text:span><text:span text:style-name="T6">(sorte de codage positionnel)</text:span></text:p>
              </text:list-item>
            </text:list>
          </draw:text-box>
        </draw:frame>
        <draw:frame presentation:style-name="pr18" draw:layer="layout" svg:width="12cm" svg:height="2cm" svg:x="8.5cm" svg:y="13cm" presentation:class="outline" presentation:user-transformed="true">
          <draw:text-box>
            <text:p>Configuration barotrope</text:p>
          </draw:text-box>
        </draw:frame>
        <anim:par presentation:node-type="timing-root">
          <anim:par smil:begin="id91.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8" presentation:class="page"/>
          <draw:frame presentation:style-name="pr13" draw:text-style-name="P2" draw:layer="layout" svg:width="17cm" svg:height="14cm" svg:x="2cm" svg:y="13cm" presentation:class="notes" presentation:placeholder="true">
            <draw:text-box/>
          </draw:frame>
        </presentation:notes>
      </draw:page>
      <draw:page draw:name="page9" draw:style-name="dp1" draw:master-page-name="White_2f_Blue_20_Chart" presentation:presentation-page-layout-name="AL3T1" xml:id="id92" draw:id="id92">
        <office:forms form:automatic-focus="false" form:apply-design-mode="false"/>
        <draw:frame presentation:style-name="pr11" draw:layer="layout" svg:width="9.8cm" svg:height="2cm" svg:x="0cm" svg:y="0.8cm" presentation:class="title" presentation:user-transformed="true">
          <draw:text-box>
            <text:p>Maj du graphe</text:p>
          </draw:text-box>
        </draw:frame>
        <draw:frame presentation:style-name="pr18" draw:layer="layout" svg:width="5.166cm" svg:height="2cm" svg:x="0.5cm" svg:y="4cm" presentation:class="outline" presentation:user-transformed="true">
          <draw:text-box>
            <text:p>Encoder</text:p>
          </draw:text-box>
        </draw:frame>
        <draw:connector draw:style-name="gr24" draw:text-style-name="P5" draw:layer="layout" draw:type="line" svg:x1="19.751cm" svg:y1="3.5cm" svg:x2="22.152cm" svg:y2="3.517cm" svg:d="M19751 3500l2401 17" svg:viewBox="0 0 2402 18">
          <text:p/>
        </draw:connector>
        <draw:custom-shape draw:style-name="gr23" draw:text-style-name="P6" draw:layer="layout" svg:width="1.5cm" svg:height="1.5cm" svg:x="11.619cm" svg:y="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18" draw:layer="layout" svg:width="5.166cm" svg:height="2cm" svg:x="0.5cm" svg:y="7cm" presentation:class="outline" presentation:user-transformed="true">
          <draw:text-box>
            <text:p>Processor</text:p>
          </draw:text-box>
        </draw:frame>
        <draw:frame presentation:style-name="pr18" draw:layer="layout" svg:width="5.166cm" svg:height="2cm" svg:x="0.5cm" svg:y="13.2cm" presentation:class="outline" presentation:user-transformed="true">
          <draw:text-box>
            <text:p>Decoder</text:p>
          </draw:text-box>
        </draw:frame>
        <draw:frame draw:style-name="gr10" draw:text-style-name="P6" draw:layer="layout" svg:width="6.585cm" svg:height="0.943cm" svg:x="9.415cm" svg:y="5cm">
          <draw:object xlink:href="./Object 2" xlink:type="simple" xlink:show="embed" xlink:actuate="onLoad">
            <loext:p/>
          </draw:object>
          <draw:image xlink:href="./ObjectReplacements/Object 2" xlink:type="simple" xlink:show="embed" xlink:actuate="onLoad"/>
        </draw:frame>
        <draw:frame draw:style-name="gr10" draw:text-style-name="P6" draw:layer="layout" svg:width="5.141cm" svg:height="0.943cm" svg:x="10.919cm" svg:y="13.6cm">
          <draw:object xlink:href="./Object 6" xlink:type="simple" xlink:show="embed" xlink:actuate="onLoad">
            <loext:p/>
          </draw:object>
          <draw:image xlink:href="./ObjectReplacements/Object 6" xlink:type="simple" xlink:show="embed" xlink:actuate="onLoad"/>
        </draw:frame>
        <draw:frame draw:style-name="gr10" draw:text-style-name="P6" draw:layer="layout" svg:width="6.693cm" svg:height="1.003cm" svg:x="19.3cm" svg:y="13.6cm">
          <draw:object xlink:href="./Object 7" xlink:type="simple" xlink:show="embed" xlink:actuate="onLoad">
            <loext:p/>
          </draw:object>
          <draw:image xlink:href="./ObjectReplacements/Object 7" xlink:type="simple" xlink:show="embed" xlink:actuate="onLoad"/>
        </draw:frame>
        <draw:frame draw:style-name="gr10" draw:text-style-name="P6" draw:layer="layout" svg:width="8.496cm" svg:height="1.105cm" svg:x="18.004cm" svg:y="7cm">
          <draw:object xlink:href="./Object 8" xlink:type="simple" xlink:show="embed" xlink:actuate="onLoad">
            <loext:p/>
          </draw:object>
          <draw:image xlink:href="./ObjectReplacements/Object 8" xlink:type="simple" xlink:show="embed" xlink:actuate="onLoad"/>
        </draw:frame>
        <draw:frame draw:style-name="gr10" draw:text-style-name="P6" draw:layer="layout" svg:width="10.665cm" svg:height="1.634cm" svg:x="8cm" svg:y="9cm">
          <draw:object xlink:href="./Object 9" xlink:type="simple" xlink:show="embed" xlink:actuate="onLoad">
            <loext:p/>
          </draw:object>
          <draw:image xlink:href="./ObjectReplacements/Object 9" xlink:type="simple" xlink:show="embed" xlink:actuate="onLoad"/>
        </draw:frame>
        <draw:custom-shape draw:style-name="gr25" draw:text-style-name="P6" draw:layer="layout" svg:width="0.999cm" svg:height="0.999cm" svg:x="2cm" svg:y="9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radius-range-minimum="10800" draw:handle-radius-range-maximum="10800" draw:handle-polar="10800 10800" draw:handle-polar-pole-x="10800" draw:handle-polar-pole-y="10800" draw:handle-position="10800 $0" draw:handle-polar-radius="10800" draw:handle-polar-angle="$0"/>
            <draw:handle draw:handle-radius-range-minimum="0" draw:handle-radius-range-maximum="10800" draw:handle-polar="10800 10800" draw:handle-polar-pole-x="10800" draw:handle-polar-pole-y="10800" draw:handle-position="$2 $1" draw:handle-polar-radius="$2" draw:handle-polar-angle="$1"/>
          </draw:enhanced-geometry>
        </draw:custom-shape>
        <draw:custom-shape draw:style-name="gr26" draw:text-style-name="P6" draw:layer="layout" svg:width="0.999cm" svg:height="0.999cm" svg:x="2cm" svg:y="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10800" draw:handle-range-y-minimum="0" draw:handle-range-y-maximum="21600" draw:handle-position="$1 $0" draw:handle-position-x="$1" draw:handle-position-y="$0"/>
          </draw:enhanced-geometry>
        </draw:custom-shape>
        <draw:custom-shape draw:style-name="gr26" draw:text-style-name="P6" draw:layer="layout" svg:width="0.999cm" svg:height="0.999cm" svg:x="2cm" svg:y="12.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10800" draw:handle-range-y-minimum="0" draw:handle-range-y-maximum="21600" draw:handle-position="$1 $0" draw:handle-position-x="$1" draw:handle-position-y="$0"/>
          </draw:enhanced-geometry>
        </draw:custom-shape>
        <draw:frame draw:style-name="gr10" draw:text-style-name="P6" draw:layer="layout" svg:width="3.428cm" svg:height="0.886cm" svg:x="11.419cm" svg:y="11.978cm">
          <draw:object xlink:href="./Object 11" xlink:type="simple" xlink:show="embed" xlink:actuate="onLoad">
            <loext:p/>
          </draw:object>
          <draw:image xlink:href="./ObjectReplacements/Object 11" xlink:type="simple" xlink:show="embed" xlink:actuate="onLoad"/>
        </draw:frame>
        <draw:frame draw:style-name="gr10" draw:text-style-name="P6" draw:layer="layout" svg:width="5.486cm" svg:height="1.003cm" svg:x="20.557cm" svg:y="11.9cm">
          <draw:object xlink:href="./Object 12" xlink:type="simple" xlink:show="embed" xlink:actuate="onLoad">
            <loext:p/>
          </draw:object>
          <draw:image xlink:href="./ObjectReplacements/Object 12" xlink:type="simple" xlink:show="embed" xlink:actuate="onLoad"/>
        </draw:frame>
        <draw:custom-shape draw:style-name="gr12" draw:text-style-name="P6" xml:id="id81" draw:id="id81" draw:layer="layout" svg:width="0.777cm" svg:height="0.749cm" svg:x="11.197cm" svg:y="7.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xml:id="id82" draw:id="id82" draw:layer="layout" svg:width="0.777cm" svg:height="0.749cm" svg:x="13.142cm" svg:y="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7" draw:text-style-name="P5" draw:layer="layout" draw:type="line" svg:x1="11.974cm" svg:y1="7.676cm" svg:x2="13.142cm" svg:y2="7.675cm" draw:start-shape="id81" draw:start-glue-point="10" draw:end-shape="id82" draw:end-glue-point="6" svg:d="M11974 7676l1168-1" svg:viewBox="0 0 1169 2">
          <text:p/>
        </draw:connector>
        <draw:path draw:style-name="gr28" draw:text-style-name="P14" draw:layer="layout" svg:width="0.743cm" svg:height="0.545cm" svg:x="12.834cm" svg:y="6.644cm" svg:viewBox="0 0 744 546" svg:d="M744 546c-34-237-218-410-453-511-342-147-291 207-284 360v75">
          <text:p/>
        </draw:path>
        <draw:custom-shape draw:style-name="gr29" draw:text-style-name="P15" draw:layer="layout" svg:width="1cm" svg:height="1cm" svg:x="11.419cm" svg:y="6.675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radius-range-minimum="10800" draw:handle-radius-range-maximum="10800" draw:handle-polar="10800 10800" draw:handle-polar-pole-x="10800" draw:handle-polar-pole-y="10800" draw:handle-position="10800 $0" draw:handle-polar-radius="10800" draw:handle-polar-angle="$0"/>
            <draw:handle draw:handle-radius-range-minimum="0" draw:handle-radius-range-maximum="10800" draw:handle-polar="10800 10800" draw:handle-polar-pole-x="10800" draw:handle-polar-pole-y="10800" draw:handle-position="$2 $1" draw:handle-polar-radius="$2" draw:handle-polar-angle="$1"/>
          </draw:enhanced-geometry>
        </draw:custom-shape>
        <draw:custom-shape draw:style-name="gr29" draw:text-style-name="P15" draw:layer="layout" svg:width="1cm" svg:height="1cm" svg:x="12.919cm" svg:y="6.676cm">
          <text:p/>
          <draw:enhanced-geometry svg:viewBox="0 0 21600 21600"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radius-range-minimum="10800" draw:handle-radius-range-maximum="10800" draw:handle-polar="10800 10800" draw:handle-polar-pole-x="10800" draw:handle-polar-pole-y="10800" draw:handle-position="10800 $0" draw:handle-polar-radius="10800" draw:handle-polar-angle="$0"/>
            <draw:handle draw:handle-radius-range-minimum="0" draw:handle-radius-range-maximum="10800" draw:handle-polar="10800 10800" draw:handle-polar-pole-x="10800" draw:handle-polar-pole-y="10800" draw:handle-position="$2 $1" draw:handle-polar-radius="$2" draw:handle-polar-angle="$1"/>
          </draw:enhanced-geometry>
        </draw:custom-shape>
        <draw:frame draw:style-name="gr10" draw:text-style-name="P6" draw:layer="layout" svg:width="0.419cm" svg:height="0.588cm" svg:x="11.319cm" svg:y="7.362cm">
          <draw:object xlink:href="./Object 10" xlink:type="simple" xlink:show="embed" xlink:actuate="onLoad">
            <loext:p/>
          </draw:object>
          <draw:image xlink:href="./ObjectReplacements/Object 10" xlink:type="simple" xlink:show="embed" xlink:actuate="onLoad"/>
        </draw:frame>
        <draw:frame draw:style-name="gr10" draw:text-style-name="P6" draw:layer="layout" svg:width="0.419cm" svg:height="0.588cm" svg:x="13.319cm" svg:y="7.361cm">
          <draw:object xlink:href="./Object 14" xlink:type="simple" xlink:show="embed" xlink:actuate="onLoad">
            <loext:p/>
          </draw:object>
          <draw:image xlink:href="./ObjectReplacements/Object 14" xlink:type="simple" xlink:show="embed" xlink:actuate="onLoad"/>
        </draw:frame>
        <draw:frame draw:style-name="gr10" draw:text-style-name="P6" draw:layer="layout" svg:width="0.946cm" svg:height="0.666cm" svg:x="11.973cm" svg:y="7.676cm">
          <draw:object xlink:href="./Object 15" xlink:type="simple" xlink:show="embed" xlink:actuate="onLoad">
            <loext:p/>
          </draw:object>
          <draw:image xlink:href="./ObjectReplacements/Object 15" xlink:type="simple" xlink:show="embed" xlink:actuate="onLoad"/>
        </draw:frame>
        <draw:custom-shape draw:style-name="gr12" draw:text-style-name="P6" xml:id="id83" draw:id="id83" draw:layer="layout" svg:width="0.777cm" svg:height="0.749cm" svg:x="21.874cm" svg:y="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0" draw:text-style-name="P5" draw:layer="layout" draw:type="line" svg:x1="22.651cm" svg:y1="9.775cm" svg:x2="23.832cm" svg:y2="9.78cm" draw:start-shape="id83" draw:start-glue-point="10" svg:d="M22651 9775l1181 5" svg:viewBox="0 0 1182 6">
          <text:p/>
        </draw:connector>
        <draw:connector draw:style-name="gr27" draw:text-style-name="P5" draw:layer="layout" draw:type="line" svg:x1="20.693cm" svg:y1="9.772cm" svg:x2="21.874cm" svg:y2="9.775cm" draw:end-shape="id83" draw:end-glue-point="6" svg:d="M20693 9772l1181 3" svg:viewBox="0 0 1182 4">
          <text:p/>
        </draw:connector>
        <draw:connector draw:style-name="gr27" draw:text-style-name="P5" draw:layer="layout" draw:type="line" svg:x1="22.253cm" svg:y1="8.662cm" svg:x2="22.263cm" svg:y2="9.4cm" draw:end-shape="id83" draw:end-glue-point="4" svg:d="M22253 8662l10 738" svg:viewBox="0 0 11 739">
          <text:p/>
        </draw:connector>
        <draw:connector draw:style-name="gr27" draw:text-style-name="P5" draw:layer="layout" draw:type="line" svg:x1="22.262cm" svg:y1="10.89cm" svg:x2="22.263cm" svg:y2="10.149cm" draw:end-shape="id83" draw:end-glue-point="8" svg:d="M22262 10890l1-741" svg:viewBox="0 0 2 742">
          <text:p/>
        </draw:connector>
        <draw:frame draw:style-name="gr10" draw:text-style-name="P6" draw:layer="layout" svg:width="0.946cm" svg:height="0.69cm" svg:x="20.151cm" svg:y="9.5cm">
          <draw:object xlink:href="./Object 16" xlink:type="simple" xlink:show="embed" xlink:actuate="onLoad">
            <loext:p/>
          </draw:object>
          <draw:image xlink:href="./ObjectReplacements/Object 16" xlink:type="simple" xlink:show="embed" xlink:actuate="onLoad"/>
        </draw:frame>
        <draw:frame draw:style-name="gr10" draw:text-style-name="P6" draw:layer="layout" svg:width="0.419cm" svg:height="0.588cm" svg:x="22.051cm" svg:y="9.5cm">
          <draw:object xlink:href="./Object 20" xlink:type="simple" xlink:show="embed" xlink:actuate="onLoad">
            <loext:p/>
          </draw:object>
          <draw:image xlink:href="./ObjectReplacements/Object 20" xlink:type="simple" xlink:show="embed" xlink:actuate="onLoad"/>
        </draw:frame>
        <draw:frame draw:style-name="gr10" draw:text-style-name="P6" draw:layer="layout" svg:width="0.948cm" svg:height="0.69cm" svg:x="21.798cm" svg:y="10.71cm">
          <draw:object xlink:href="./Object 17" xlink:type="simple" xlink:show="embed" xlink:actuate="onLoad">
            <loext:p/>
          </draw:object>
          <draw:image xlink:href="./ObjectReplacements/Object 17" xlink:type="simple" xlink:show="embed" xlink:actuate="onLoad"/>
        </draw:frame>
        <draw:frame draw:style-name="gr10" draw:text-style-name="P6" draw:layer="layout" svg:width="0.946cm" svg:height="0.69cm" svg:x="21.805cm" svg:y="8.2cm">
          <draw:object xlink:href="./Object 18" xlink:type="simple" xlink:show="embed" xlink:actuate="onLoad">
            <loext:p/>
          </draw:object>
          <draw:image xlink:href="./ObjectReplacements/Object 18" xlink:type="simple" xlink:show="embed" xlink:actuate="onLoad"/>
        </draw:frame>
        <draw:frame draw:style-name="gr10" draw:text-style-name="P6" draw:layer="layout" svg:width="0.95cm" svg:height="0.69cm" svg:x="23.851cm" svg:y="9.41cm">
          <draw:object xlink:href="./Object 19" xlink:type="simple" xlink:show="embed" xlink:actuate="onLoad">
            <loext:p/>
          </draw:object>
          <draw:image xlink:href="./ObjectReplacements/Object 19" xlink:type="simple" xlink:show="embed" xlink:actuate="onLoad"/>
        </draw:frame>
        <draw:frame presentation:style-name="pr18" draw:text-style-name="P16" draw:layer="layout" svg:width="3.666cm" svg:height="1cm" svg:x="1cm" svg:y="10cm" presentation:class="outline" presentation:user-transformed="true">
          <draw:text-box>
            <text:p><text:span text:style-name="T7">x N layers</text:span></text:p>
            <text:p><text:span text:style-name="T7"/></text:p>
          </draw:text-box>
        </draw:frame>
        <draw:custom-shape draw:style-name="gr31" draw:text-style-name="P15" draw:layer="layout" svg:width="5.527cm" svg:height="1.99cm" draw:transform="skewX (0.0991347015132779) rotate (1.66993102830817) translate (7.464cm 12.5cm)">
          <text:p/>
          <draw:enhanced-geometry svg:viewBox="0 0 21600 21600" draw:mirror-horizontal="false" draw:mirror-vertical="true" draw:text-areas="0 0 21600 21600" draw:type="circular-arrow" draw:modifiers="180 12.6924917018434 10097.397349375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radius-range-minimum="10800" draw:handle-radius-range-maximum="10800" draw:handle-polar="10800 10800" draw:handle-polar-pole-x="10800" draw:handle-polar-pole-y="10800" draw:handle-position="10800 $0" draw:handle-polar-radius="10800" draw:handle-polar-angle="$0"/>
            <draw:handle draw:handle-radius-range-minimum="0" draw:handle-radius-range-maximum="10800" draw:handle-polar="10800 10800" draw:handle-polar-pole-x="10800" draw:handle-polar-pole-y="10800" draw:handle-position="$2 $1" draw:handle-polar-radius="$2" draw:handle-polar-angle="$1"/>
          </draw:enhanced-geometry>
        </draw:custom-shape>
        <draw:frame presentation:style-name="pr18" draw:text-style-name="P16" draw:layer="layout" svg:width="5.666cm" svg:height="1cm" draw:transform="rotate (1.5707963267949) translate (6cm 12.366cm)" presentation:class="outline" presentation:user-transformed="true">
          <draw:text-box>
            <text:p><text:span text:style-name="T7">Residual connexion</text:span></text:p>
          </draw:text-box>
        </draw:frame>
        <draw:line draw:style-name="gr32" draw:text-style-name="P14" draw:layer="layout" svg:x1="6.5cm" svg:y1="6.5cm" svg:x2="26.5cm" svg:y2="6.5cm">
          <text:p/>
        </draw:line>
        <draw:line draw:style-name="gr32" draw:text-style-name="P14" draw:layer="layout" svg:x1="6.5cm" svg:y1="12.9cm" svg:x2="26.5cm" svg:y2="12.9cm">
          <text:p/>
        </draw:line>
        <draw:custom-shape draw:style-name="gr33" draw:text-style-name="P17" draw:layer="layout" svg:width="0.499cm" svg:height="0.999cm" svg:x="17cm" svg:y="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10800" draw:handle-range-y-minimum="0" draw:handle-range-y-maximum="21600" draw:handle-position="$1 $0" draw:handle-position-x="$1" draw:handle-position-y="$0"/>
          </draw:enhanced-geometry>
        </draw:custom-shape>
        <draw:custom-shape draw:style-name="gr33" draw:text-style-name="P17" draw:layer="layout" svg:width="0.499cm" svg:height="0.999cm" svg:x="17cm" svg:y="10.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10800" draw:handle-range-y-minimum="0" draw:handle-range-y-maximum="21600" draw:handle-position="$1 $0" draw:handle-position-x="$1" draw:handle-position-y="$0"/>
          </draw:enhanced-geometry>
        </draw:custom-shape>
        <draw:frame draw:style-name="gr10" draw:text-style-name="P6" draw:layer="layout" svg:width="7.335cm" svg:height="1.003cm" svg:x="17.5cm" svg:y="4.997cm">
          <draw:object xlink:href="./Object 21" xlink:type="simple" xlink:show="embed" xlink:actuate="onLoad">
            <loext:p/>
          </draw:object>
          <draw:image xlink:href="./ObjectReplacements/Object 21" xlink:type="simple" xlink:show="embed" xlink:actuate="onLoad"/>
        </draw:frame>
        <draw:frame draw:style-name="gr10" draw:text-style-name="P6" draw:layer="layout" svg:width="0.419cm" svg:height="0.588cm" svg:x="12.081cm" svg:y="3.412cm">
          <draw:object xlink:href="./Object 3" xlink:type="simple" xlink:show="embed" xlink:actuate="onLoad">
            <loext:p/>
          </draw:object>
          <draw:image xlink:href="./ObjectReplacements/Object 3" xlink:type="simple" xlink:show="embed" xlink:actuate="onLoad"/>
        </draw:frame>
        <draw:frame draw:style-name="gr10" draw:text-style-name="P6" draw:layer="layout" svg:width="0.946cm" svg:height="0.666cm" svg:x="20.5cm" svg:y="3.517cm">
          <draw:object xlink:href="./Object 22" xlink:type="simple" xlink:show="embed" xlink:actuate="onLoad">
            <loext:p/>
          </draw:object>
          <draw:image xlink:href="./ObjectReplacements/Object 22" xlink:type="simple" xlink:show="embed" xlink:actuate="onLoad"/>
        </draw:frame>
        <anim:par presentation:node-type="timing-root">
          <anim:par smil:begin="id92.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9" presentation:class="page"/>
          <draw:frame presentation:style-name="pr13" draw:text-style-name="P7" draw:layer="layout" svg:width="17cm" svg:height="14cm" svg:x="2cm" svg:y="13cm" presentation:class="notes" presentation:placeholder="true">
            <draw:text-box/>
          </draw:frame>
        </presentation:notes>
      </draw:page>
      <draw:page draw:name="page10" draw:style-name="dp1" draw:master-page-name="White_2f_Blue_20_Chart" presentation:presentation-page-layout-name="AL3T1" xml:id="id93" draw:id="id93">
        <office:forms form:automatic-focus="false" form:apply-design-mode="false"/>
        <draw:frame presentation:style-name="pr11" draw:layer="layout" svg:width="9.8cm" svg:height="2cm" svg:x="0cm" svg:y="0.8cm" presentation:class="title" presentation:user-transformed="true">
          <draw:text-box>
            <text:p>Entrée et sortie</text:p>
          </draw:text-box>
        </draw:frame>
        <draw:frame presentation:style-name="pr12" draw:layer="layout" svg:width="25.2cm" svg:height="10.5cm" svg:x="1.4cm" svg:y="3.5cm" presentation:class="outline" presentation:user-transformed="true">
          <draw:text-box>
            <text:list text:style-name="L4">
              <text:list-item>
                <text:p>Entrée : ECMWF ERA5</text:p>
                <text:list>
                  <text:list-item>
                    <text:p>Résolution abaissée de 0,25° à 1° </text:p>
                  </text:list-item>
                  <text:list-item>
                    <text:p>Normalisation moyenne zéro et variance unitaire</text:p>
                  </text:list-item>
                </text:list>
              </text:list-item>
              <text:list-item>
                <text:p>Sortie </text:p>
                <text:list>
                  <text:list-item>
                    <text:p>Sortie calculée par nœud via un MLP :</text:p>
                    <text:p/>
                  </text:list-item>
                  <text:list-item>
                    <text:p>La sortie est une différence donc : </text:p>
                  </text:list-item>
                </text:list>
              </text:list-item>
            </text:list>
          </draw:text-box>
        </draw:frame>
        <draw:frame draw:style-name="gr10" draw:text-style-name="P6" draw:layer="layout" svg:width="8.443cm" svg:height="1.415cm" svg:x="8.557cm" svg:y="10.5cm">
          <draw:object xlink:href="./Object 13" xlink:type="simple" xlink:show="embed" xlink:actuate="onLoad">
            <loext:p/>
          </draw:object>
          <draw:image xlink:href="./ObjectReplacements/Object 13" xlink:type="simple" xlink:show="embed" xlink:actuate="onLoad"/>
        </draw:frame>
        <draw:frame draw:style-name="gr10" draw:text-style-name="P6" draw:layer="layout" svg:width="4.504cm" svg:height="1.343cm" svg:x="8.5cm" svg:y="13.085cm">
          <draw:object xlink:href="./Object 1" xlink:type="simple" xlink:show="embed" xlink:actuate="onLoad">
            <loext:p/>
          </draw:object>
          <draw:image xlink:href="./ObjectReplacements/Object 1" xlink:type="simple" xlink:show="embed" xlink:actuate="onLoad"/>
        </draw:frame>
        <anim:par presentation:node-type="timing-root">
          <anim:par smil:begin="id93.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0" presentation:class="page"/>
          <draw:frame presentation:style-name="pr13" draw:text-style-name="P7" draw:layer="layout" svg:width="17cm" svg:height="14cm" svg:x="2cm" svg:y="13cm" presentation:class="notes" presentation:placeholder="true">
            <draw:text-box/>
          </draw:frame>
        </presentation:notes>
      </draw:page>
      <draw:page draw:name="page11" draw:style-name="dp1" draw:master-page-name="Four_20_Bullets" presentation:presentation-page-layout-name="AL5T18" xml:id="id94" draw:id="id94">
        <office:forms form:automatic-focus="false" form:apply-design-mode="false"/>
        <draw:path draw:style-name="gr4" draw:text-style-name="P4" draw:layer="layout" svg:width="1.229cm" svg:height="1.229cm" svg:x="4.083cm" svg:y="4.242cm" svg:viewBox="0 0 1230 1230" svg:d="M526 5c-3 127-40 236-109 327l-194-193c88-73 189-117 303-134zM615 531l-114-114c94-116 142-255 144-417 137 7 258 53 362 139zM139 223l193 194c-91 69-200 106-327 109 17-114 61-215 134-303zM814 729l-114-114 391-392c86 104 133 225 139 362-162 4-301 52-416 144zM615 699l114 115c-92 115-140 254-144 416-137-6-258-53-362-139zM1091 1007l-193-193c91-70 200-106 327-110-16 115-61 215-134 303zM417 501l114 114-392 392c-86-104-132-225-139-362 162-2 301-50 417-144zM704 1225c4-127 40-236 110-327l193 193c-88 73-188 118-303 134z">
          <text:p/>
        </draw:path>
        <draw:frame presentation:style-name="pr19" draw:layer="layout" svg:width="7.5cm" svg:height="3.7cm" svg:x="0.8cm" svg:y="5.6cm" presentation:class="outline" presentation:user-transformed="true">
          <draw:text-box>
            <text:list text:style-name="L4">
              <text:list-item>
                <text:p>1 couche interne</text:p>
              </text:list-item>
            </text:list>
          </draw:text-box>
        </draw:frame>
        <draw:path draw:style-name="gr4" draw:text-style-name="P4" draw:layer="layout" svg:width="1.229cm" svg:height="1.229cm" svg:x="4.083cm" svg:y="10.084cm" svg:viewBox="0 0 1230 1230" svg:d="M1196 129c21 86 33 173 34 260l-389-389c89 2 176 14 260 37 50 13 81 44 95 92zM35 1101c-22-86-33-172-35-260l389 389c-89-1-176-14-260-37-50-13-81-44-94-92zM10 682c28-183 105-335 231-455 125-120 273-192 444-217l535 538c-28 184-105 335-230 455-126 120-274 193-444 217zM799 377l-72 69-70-69c-10-10-19-10-27 0l-30 27c-8 10-8 20 0 30l72 70-57 57-69-72c-10-9-20-9-30 0l-27 27c-10 10-10 20 0 30l69 69-54 57-72-72c-9-8-18-8-28 0l-27 30c-10 8-10 17 0 27l69 70-69 72c-10 8-10 17 0 27l27 27c10 10 19 10 28 0l72-69 69 69c10 10 19 10 27 0l30-27c8-10 8-19 0-27l-72-72 57-55 70 70c10 10 19 10 29 0l28-28c10-10 10-19 0-29l-70-70 55-57 72 72c8 8 17 8 27 0l27-30c10-8 10-17 0-27l-69-69 69-72c10-9 10-18 0-28l-27-27c-10-10-19-10-27 0z">
          <text:p/>
        </draw:path>
        <draw:frame presentation:style-name="pr19" draw:layer="layout" svg:width="7.5cm" svg:height="3.7cm" svg:x="9.1cm" svg:y="5.6cm" presentation:class="outline" presentation:user-transformed="true">
          <draw:text-box>
            <text:list text:style-name="L4">
              <text:list-item>
                <text:p>8 états latents</text:p>
              </text:list-item>
            </text:list>
          </draw:text-box>
        </draw:frame>
        <draw:path draw:style-name="gr4" draw:text-style-name="P4" draw:layer="layout" svg:width="1.229cm" svg:height="1.229cm" svg:x="11.957cm" svg:y="4.203cm" svg:viewBox="0 0 1230 1230" svg:d="M913 883c31 65 74 122 129 174-119 115-261 173-427 173-165 0-307-58-426-173 52-52 95-109 129-174l-72-35c-29 55-66 105-112 152-89-113-134-241-134-385s45-272 134-384c46 44 83 94 109 149l72-38c-31-63-74-119-126-168 119-116 261-174 426-174 166 0 308 58 427 174-53 51-95 108-127 171l72 35c27-55 63-105 109-149 90 112 134 240 134 384s-45 272-136 385c-45-45-81-95-109-152zM347 804c42-128 42-255 0-382l-77 24c37 111 38 222 3 333zM883 422c-41 127-41 254 0 382l74-25c-34-109-33-220 3-333z">
          <text:p/>
        </draw:path>
        <draw:frame presentation:style-name="pr19" draw:layer="layout" svg:width="7.5cm" svg:height="3.7cm" svg:x="0.8cm" svg:y="11.6cm" presentation:class="outline" presentation:user-transformed="true">
          <draw:text-box>
            <text:list text:style-name="L4">
              <text:list-item>
                <text:p>Silu activation function</text:p>
              </text:list-item>
            </text:list>
          </draw:text-box>
        </draw:frame>
        <draw:path draw:style-name="gr4" draw:text-style-name="P4" draw:layer="layout" svg:width="1.229cm" svg:height="1.229cm" svg:x="11.958cm" svg:y="10.044cm" svg:viewBox="0 0 1230 1230" svg:d="M1050 180c120 120 180 265 180 435s-60 316-180 435c-119 120-265 180-435 180s-315-60-435-180c-120-119-180-265-180-435s60-315 180-435 265-180 435-180 316 60 435 180zM1111 615l-64 55-157-144 43-208 84 7c-64-89-148-150-251-181l35 77-186 104-186-104 35-77c-103 31-186 92-251 181l87-7 40 208-156 144-65-55c0 109 31 207 94 293l20-84 211 27 92 191-75 44c103 34 205 34 308 0l-74-44 91-191 211-27 20 84c63-86 94-184 94-293zM496 789l-74-228 193-139 194 139-75 228z">
          <text:p/>
        </draw:path>
        <draw:frame presentation:style-name="pr19" draw:layer="layout" svg:width="7.5cm" svg:height="3.7cm" svg:x="9.1cm" svg:y="11.6cm" presentation:class="outline" presentation:user-transformed="true">
          <draw:text-box>
            <text:list text:style-name="L4">
              <text:list-item>
                <text:p>Layer norm partout sauf decoder</text:p>
              </text:list-item>
            </text:list>
          </draw:text-box>
        </draw:frame>
        <draw:frame presentation:style-name="pr20" draw:layer="layout" svg:width="15.8cm" svg:height="2.628cm" svg:x="0.8cm" svg:y="0.6cm" presentation:class="title" presentation:user-transformed="true">
          <draw:text-box>
            <text:p>MLP hyperparamètres</text:p>
          </draw:text-box>
        </draw:frame>
        <draw:frame draw:style-name="gr5" draw:text-style-name="P5" draw:layer="layout" svg:width="8.364cm" svg:height="11.4cm" svg:x="17.791cm" svg:y="3cm">
          <draw:image xlink:href="Pictures/10000001000002770000035CA248B69F.png" xlink:type="simple" xlink:show="embed" xlink:actuate="onLoad" draw:mime-type="image/png">
            <text:p/>
          </draw:image>
        </draw:frame>
        <anim:par presentation:node-type="timing-root">
          <anim:par smil:begin="id94.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1" presentation:class="page"/>
          <draw:frame presentation:style-name="pr21" draw:text-style-name="P2" draw:layer="layout" svg:width="17cm" svg:height="14cm" svg:x="2cm" svg:y="13cm" presentation:class="notes" presentation:placeholder="true">
            <draw:text-box/>
          </draw:frame>
        </presentation:notes>
      </draw:page>
      <draw:page draw:name="page12" draw:style-name="dp1" draw:master-page-name="Four_20_Bullets" presentation:presentation-page-layout-name="AL5T18" xml:id="id95" draw:id="id95">
        <office:forms form:automatic-focus="false" form:apply-design-mode="false"/>
        <draw:path draw:style-name="gr4" draw:text-style-name="P4" draw:layer="layout" svg:width="1.229cm" svg:height="1.229cm" svg:x="4.083cm" svg:y="4.242cm" svg:viewBox="0 0 1230 1230" svg:d="M526 5c-3 127-40 236-109 327l-194-193c88-73 189-117 303-134zM615 531l-114-114c94-116 142-255 144-417 137 7 258 53 362 139zM139 223l193 194c-91 69-200 106-327 109 17-114 61-215 134-303zM814 729l-114-114 391-392c86 104 133 225 139 362-162 4-301 52-416 144zM615 699l114 115c-92 115-140 254-144 416-137-6-258-53-362-139zM1091 1007l-193-193c91-70 200-106 327-110-16 115-61 215-134 303zM417 501l114 114-392 392c-86-104-132-225-139-362 162-2 301-50 417-144zM704 1225c4-127 40-236 110-327l193 193c-88 73-188 118-303 134z">
          <text:p/>
        </draw:path>
        <draw:frame presentation:style-name="pr19" draw:layer="layout" svg:width="7.5cm" svg:height="3.7cm" svg:x="0.8cm" svg:y="5.6cm" presentation:class="outline" presentation:user-transformed="true">
          <draw:text-box>
            <text:list text:style-name="L4">
              <text:list-item>
                <text:p>8 états latents</text:p>
              </text:list-item>
            </text:list>
          </draw:text-box>
        </draw:frame>
        <draw:path draw:style-name="gr4" draw:text-style-name="P4" draw:layer="layout" svg:width="1.229cm" svg:height="1.229cm" svg:x="4.083cm" svg:y="10.084cm" svg:viewBox="0 0 1230 1230" svg:d="M1196 129c21 86 33 173 34 260l-389-389c89 2 176 14 260 37 50 13 81 44 95 92zM35 1101c-22-86-33-172-35-260l389 389c-89-1-176-14-260-37-50-13-81-44-94-92zM10 682c28-183 105-335 231-455 125-120 273-192 444-217l535 538c-28 184-105 335-230 455-126 120-274 193-444 217zM799 377l-72 69-70-69c-10-10-19-10-27 0l-30 27c-8 10-8 20 0 30l72 70-57 57-69-72c-10-9-20-9-30 0l-27 27c-10 10-10 20 0 30l69 69-54 57-72-72c-9-8-18-8-28 0l-27 30c-10 8-10 17 0 27l69 70-69 72c-10 8-10 17 0 27l27 27c10 10 19 10 28 0l72-69 69 69c10 10 19 10 27 0l30-27c8-10 8-19 0-27l-72-72 57-55 70 70c10 10 19 10 29 0l28-28c10-10 10-19 0-29l-70-70 55-57 72 72c8 8 17 8 27 0l27-30c10-8 10-17 0-27l-69-69 69-72c10-9 10-18 0-28l-27-27c-10-10-19-10-27 0z">
          <text:p/>
        </draw:path>
        <draw:frame presentation:style-name="pr19" draw:layer="layout" svg:width="7.5cm" svg:height="3.7cm" svg:x="9.1cm" svg:y="5.6cm" presentation:class="outline" presentation:user-transformed="true">
          <draw:text-box>
            <text:list text:style-name="L4">
              <text:list-item>
                <text:p>4 étapes de message passing</text:p>
              </text:list-item>
            </text:list>
          </draw:text-box>
        </draw:frame>
        <draw:path draw:style-name="gr4" draw:text-style-name="P4" draw:layer="layout" svg:width="1.229cm" svg:height="1.229cm" svg:x="11.957cm" svg:y="4.203cm" svg:viewBox="0 0 1230 1230" svg:d="M913 883c31 65 74 122 129 174-119 115-261 173-427 173-165 0-307-58-426-173 52-52 95-109 129-174l-72-35c-29 55-66 105-112 152-89-113-134-241-134-385s45-272 134-384c46 44 83 94 109 149l72-38c-31-63-74-119-126-168 119-116 261-174 426-174 166 0 308 58 427 174-53 51-95 108-127 171l72 35c27-55 63-105 109-149 90 112 134 240 134 384s-45 272-136 385c-45-45-81-95-109-152zM347 804c42-128 42-255 0-382l-77 24c37 111 38 222 3 333zM883 422c-41 127-41 254 0 382l74-25c-34-109-33-220 3-333z">
          <text:p/>
        </draw:path>
        <draw:frame presentation:style-name="pr19" draw:layer="layout" svg:width="7.5cm" svg:height="3.7cm" svg:x="0.8cm" svg:y="11.6cm" presentation:class="outline" presentation:user-transformed="true">
          <draw:text-box>
            <text:list text:style-name="L4">
              <text:list-item>
                <text:p>Adam optimizer<text:line-break/>(beta_1=0.9, <text:s text:c="7"/>beta_2=0.95) </text:p>
              </text:list-item>
            </text:list>
          </draw:text-box>
        </draw:frame>
        <draw:path draw:style-name="gr4" draw:text-style-name="P4" draw:layer="layout" svg:width="1.229cm" svg:height="1.229cm" svg:x="11.958cm" svg:y="10.044cm" svg:viewBox="0 0 1230 1230" svg:d="M1050 180c120 120 180 265 180 435s-60 316-180 435c-119 120-265 180-435 180s-315-60-435-180c-120-119-180-265-180-435s60-315 180-435 265-180 435-180 316 60 435 180zM1111 615l-64 55-157-144 43-208 84 7c-64-89-148-150-251-181l35 77-186 104-186-104 35-77c-103 31-186 92-251 181l87-7 40 208-156 144-65-55c0 109 31 207 94 293l20-84 211 27 92 191-75 44c103 34 205 34 308 0l-74-44 91-191 211-27 20 84c63-86 94-184 94-293zM496 789l-74-228 193-139 194 139-75 228z">
          <text:p/>
        </draw:path>
        <draw:frame presentation:style-name="pr19" draw:layer="layout" svg:width="7.5cm" svg:height="3.7cm" svg:x="9.1cm" svg:y="11.6cm" presentation:class="outline" presentation:user-transformed="true">
          <draw:text-box>
            <text:list text:style-name="L4">
              <text:list-item>
                <text:p>Fonction perte :<text:line-break/>Mean Square Error (MSE)</text:p>
              </text:list-item>
            </text:list>
          </draw:text-box>
        </draw:frame>
        <draw:frame presentation:style-name="pr20" draw:layer="layout" svg:width="15.8cm" svg:height="2.628cm" svg:x="0.8cm" svg:y="0.6cm" presentation:class="title" presentation:user-transformed="true">
          <draw:text-box>
            <text:p>PIFO hyperparamètres</text:p>
          </draw:text-box>
        </draw:frame>
        <draw:frame draw:style-name="gr5" draw:text-style-name="P5" draw:layer="layout" svg:width="8.488cm" svg:height="11cm" svg:x="17.912cm" svg:y="3cm">
          <draw:image xlink:href="Pictures/100000010000020C000002A76EA3A5F8.png" xlink:type="simple" xlink:show="embed" xlink:actuate="onLoad" draw:mime-type="image/png">
            <text:p/>
          </draw:image>
        </draw:frame>
        <anim:par presentation:node-type="timing-root">
          <anim:par smil:begin="id95.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2" presentation:class="page"/>
          <draw:frame presentation:style-name="pr21" draw:text-style-name="P2" draw:layer="layout" svg:width="17cm" svg:height="14cm" svg:x="2cm" svg:y="13cm" presentation:class="notes" presentation:placeholder="true">
            <draw:text-box/>
          </draw:frame>
        </presentation:notes>
      </draw:page>
      <draw:page draw:name="page13" draw:style-name="dp1" draw:master-page-name="White_2f_Blue_20_Chart" presentation:presentation-page-layout-name="AL3T1" xml:id="id96" draw:id="id96">
        <office:forms form:automatic-focus="false" form:apply-design-mode="false"/>
        <draw:frame presentation:style-name="pr17" draw:text-style-name="P18" draw:layer="layout" svg:width="9.8cm" svg:height="2cm" svg:x="0cm" svg:y="0.8cm" presentation:class="title" presentation:user-transformed="true">
          <draw:text-box>
            <text:p><text:span text:style-name="T8">Courbe d’apprentissage</text:span></text:p>
          </draw:text-box>
        </draw:frame>
        <draw:frame presentation:style-name="pr18" draw:text-style-name="P12" draw:layer="layout" svg:width="6.4cm" svg:height="10cm" svg:x="20.6cm" svg:y="4cm" presentation:class="outline" presentation:user-transformed="true">
          <draw:text-box>
            <text:list text:style-name="L4">
              <text:list-item>
                <text:p text:style-name="P12"><text:span text:style-name="T5">Pour 300 exemples, soit 1 an de données (2024) et 10 epochs</text:span></text:p>
              </text:list-item>
            </text:list>
          </draw:text-box>
        </draw:frame>
        <draw:frame draw:style-name="gr34" draw:text-style-name="P6" draw:layer="layout" svg:width="15.16cm" svg:height="11.985cm" svg:x="2.84cm" svg:y="2.515cm">
          <draw:image xlink:href="Pictures/100000010000023D000001C519C3DC69.png" xlink:type="simple" xlink:show="embed" xlink:actuate="onLoad" draw:mime-type="image/png">
            <text:p/>
          </draw:image>
        </draw:frame>
        <anim:par presentation:node-type="timing-root">
          <anim:par smil:begin="id96.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3" presentation:class="page"/>
          <draw:frame presentation:style-name="pr13" draw:text-style-name="P7" draw:layer="layout" svg:width="17cm" svg:height="14cm" svg:x="2cm" svg:y="13cm" presentation:class="notes" presentation:placeholder="true">
            <draw:text-box/>
          </draw:frame>
        </presentation:notes>
      </draw:page>
      <draw:page draw:name="page14" draw:style-name="dp1" draw:master-page-name="White_2f_Blue_20_Chart" presentation:presentation-page-layout-name="AL3T1" xml:id="id97" draw:id="id97">
        <office:forms form:automatic-focus="false" form:apply-design-mode="false"/>
        <draw:frame presentation:style-name="pr11" draw:layer="layout" svg:width="9.8cm" svg:height="2cm" svg:x="0cm" svg:y="0.8cm" presentation:class="title" presentation:user-transformed="true">
          <draw:text-box>
            <text:p>Résultats</text:p>
          </draw:text-box>
        </draw:frame>
        <draw:frame draw:style-name="gr5" draw:text-style-name="P5" draw:layer="layout" svg:width="6.929cm" svg:height="5.305cm" svg:x="5.571cm" svg:y="3cm">
          <draw:image xlink:href="Pictures/1000000100000377000002A7E5AFB874.png" xlink:type="simple" xlink:show="embed" xlink:actuate="onLoad" draw:mime-type="image/png">
            <text:p/>
          </draw:image>
        </draw:frame>
        <draw:frame draw:style-name="gr5" draw:text-style-name="P5" draw:layer="layout" svg:width="5cm" svg:height="4.788cm" svg:x="18.5cm" svg:y="9.5cm">
          <draw:image xlink:href="Pictures/1000000100000168000000B590CCEC5C.png" xlink:type="simple" xlink:show="embed" xlink:actuate="onLoad" draw:mime-type="image/png">
            <text:p/>
          </draw:image>
        </draw:frame>
        <draw:frame draw:style-name="gr5" draw:text-style-name="P5" draw:layer="layout" svg:width="7.185cm" svg:height="5.5cm" svg:x="17.815cm" svg:y="3cm">
          <draw:image xlink:href="Pictures/1000000100000377000002A7A2E423AD.png" xlink:type="simple" xlink:show="embed" xlink:actuate="onLoad" draw:mime-type="image/png">
            <text:p/>
          </draw:image>
        </draw:frame>
        <draw:custom-shape draw:style-name="gr35" draw:text-style-name="P19" draw:layer="layout" svg:width="4cm" svg:height="2cm" svg:x="1cm" svg:y="4cm">
          <text:p text:style-name="P6">Référence </text:p>
          <text:p text:style-name="P6">X(t=1)</text:p>
          <draw:enhanced-geometry svg:viewBox="0 0 21600 21600" draw:type="rectangle" draw:enhanced-path="M 0 0 L 21600 0 21600 21600 0 21600 0 0 Z N"/>
        </draw:custom-shape>
        <draw:custom-shape draw:style-name="gr35" draw:text-style-name="P19" draw:layer="layout" svg:width="4cm" svg:height="2cm" svg:x="1cm" svg:y="10.5cm">
          <text:p text:style-name="P6">Prédiction</text:p>
          <text:p text:style-name="P6">X(t=1)</text:p>
          <draw:enhanced-geometry svg:viewBox="0 0 21600 21600" draw:type="rectangle" draw:enhanced-path="M 0 0 L 21600 0 21600 21600 0 21600 0 0 Z N"/>
        </draw:custom-shape>
        <draw:frame draw:style-name="gr5" draw:text-style-name="P5" draw:layer="layout" svg:width="5cm" svg:height="4.788cm" svg:x="6cm" svg:y="9.5cm">
          <draw:image xlink:href="Pictures/1000000100000168000000B55965C526.png" xlink:type="simple" xlink:show="embed" xlink:actuate="onLoad" draw:mime-type="image/png">
            <text:p/>
          </draw:image>
        </draw:frame>
        <draw:custom-shape draw:style-name="gr35" draw:text-style-name="P19" draw:layer="layout" svg:width="4cm" svg:height="2cm" svg:x="13.5cm" svg:y="4cm">
          <text:p text:style-name="P6">Référence </text:p>
          <text:p text:style-name="P6">X(t=4)</text:p>
          <draw:enhanced-geometry svg:viewBox="0 0 21600 21600" draw:type="rectangle" draw:enhanced-path="M 0 0 L 21600 0 21600 21600 0 21600 0 0 Z N"/>
        </draw:custom-shape>
        <draw:custom-shape draw:style-name="gr35" draw:text-style-name="P19" draw:layer="layout" svg:width="4cm" svg:height="2cm" svg:x="13.5cm" svg:y="10.5cm">
          <text:p text:style-name="P6">Prédiction </text:p>
          <text:p text:style-name="P6">X(t=4)</text:p>
          <draw:enhanced-geometry svg:viewBox="0 0 21600 21600" draw:type="rectangle" draw:enhanced-path="M 0 0 L 21600 0 21600 21600 0 21600 0 0 Z N"/>
        </draw:custom-shape>
        <anim:par presentation:node-type="timing-root">
          <anim:par smil:begin="id97.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4" presentation:class="page"/>
          <draw:frame presentation:style-name="pr13" draw:text-style-name="P2" draw:layer="layout" svg:width="17cm" svg:height="14cm" svg:x="2cm" svg:y="13cm" presentation:class="notes" presentation:placeholder="true">
            <draw:text-box/>
          </draw:frame>
        </presentation:notes>
      </draw:page>
      <draw:page draw:name="page15" draw:style-name="dp1" draw:master-page-name="Blue_2f_White_20_Chart" presentation:presentation-page-layout-name="AL3T1" xml:id="id98" draw:id="id98">
        <office:forms form:automatic-focus="false" form:apply-design-mode="false"/>
        <draw:frame presentation:style-name="pr22" draw:layer="layout" svg:width="9.8cm" svg:height="2cm" svg:x="0cm" svg:y="0.8cm" presentation:class="title" presentation:user-transformed="true">
          <draw:text-box>
            <text:p>Quelques chiffres</text:p>
          </draw:text-box>
        </draw:frame>
        <draw:frame presentation:style-name="pr23" draw:layer="layout" svg:width="6.4cm" svg:height="10cm" svg:x="20.6cm" svg:y="4cm" presentation:class="outline" presentation:user-transformed="true">
          <draw:text-box>
            <text:p>Full dataset pour 30 ans de climatologie<text:line-break/>Soit 4 états par jour (t=00h, 06h, 12h, 18h).</text:p>
            <text:p>Taille : ~280Go. Soit ~ 44000 exemples.</text:p>
            <text:p>Estimation : ~8 jours de calcul avec mon <text:s/>CPU (core i7) (5-10 fois moins avec un GPU type Geforce 1050)</text:p>
          </draw:text-box>
        </draw:frame>
        <draw:custom-shape draw:style-name="gr36" draw:text-style-name="P19" draw:layer="layout" svg:width="8cm" svg:height="2cm" svg:x="1cm" svg:y="3.25cm">
          <text:p text:style-name="P6">65160 noeuds</text:p>
          <draw:enhanced-geometry svg:viewBox="0 0 21600 21600" draw:type="rectangle" draw:enhanced-path="M 0 0 L 21600 0 21600 21600 0 21600 0 0 Z N"/>
        </draw:custom-shape>
        <draw:custom-shape draw:style-name="gr37" draw:text-style-name="P20" draw:layer="layout" svg:width="8cm" svg:height="2cm" svg:x="0.5cm" svg:y="6cm">
          <text:p text:style-name="P6">257760 edges</text:p>
          <draw:enhanced-geometry svg:viewBox="0 0 21600 21600" draw:type="rectangle" draw:enhanced-path="M 0 0 L 21600 0 21600 21600 0 21600 0 0 Z N"/>
        </draw:custom-shape>
        <draw:custom-shape draw:style-name="gr38" draw:text-style-name="P21" draw:layer="layout" svg:width="11cm" svg:height="2cm" svg:x="8cm" svg:y="6.5cm">
          <text:p text:style-name="P6">Dataset : 741Mo pour un mois</text:p>
          <draw:enhanced-geometry svg:viewBox="0 0 21600 21600" draw:type="rectangle" draw:enhanced-path="M 0 0 L 21600 0 21600 21600 0 21600 0 0 Z N"/>
        </draw:custom-shape>
        <draw:custom-shape draw:style-name="gr39" draw:text-style-name="P22" draw:layer="layout" svg:width="11cm" svg:height="2cm" svg:x="9.5cm" svg:y="4cm">
          <text:p text:style-name="P6">Temps de learning : 30 min</text:p>
          <draw:enhanced-geometry svg:viewBox="0 0 21600 21600" draw:type="rectangle" draw:enhanced-path="M 0 0 L 21600 0 21600 21600 0 21600 0 0 Z N"/>
        </draw:custom-shape>
        <draw:custom-shape draw:style-name="gr40" draw:text-style-name="P23" draw:layer="layout" svg:width="11cm" svg:height="2cm" svg:x="7.5cm" svg:y="12cm">
          <text:p text:style-name="P6">Mémoire : ~3Go</text:p>
          <draw:enhanced-geometry svg:viewBox="0 0 21600 21600" draw:type="rectangle" draw:enhanced-path="M 0 0 L 21600 0 21600 21600 0 21600 0 0 Z N"/>
        </draw:custom-shape>
        <draw:custom-shape draw:style-name="gr41" draw:text-style-name="P24" draw:layer="layout" svg:width="11cm" svg:height="2cm" svg:x="1cm" svg:y="10.5cm">
          <text:p text:style-name="P6">2566 learnable parameters</text:p>
          <draw:enhanced-geometry svg:viewBox="0 0 21600 21600" draw:type="rectangle" draw:enhanced-path="M 0 0 L 21600 0 21600 21600 0 21600 0 0 Z N"/>
        </draw:custom-shape>
        <draw:custom-shape draw:style-name="gr42" draw:text-style-name="P25" draw:layer="layout" svg:width="11cm" svg:height="2cm" svg:x="9cm" svg:y="9cm">
          <text:p text:style-name="P6">Inférence : 30s /10 prevs (2,5 jours)</text:p>
          <draw:enhanced-geometry svg:viewBox="0 0 21600 21600" draw:type="rectangle" draw:enhanced-path="M 0 0 L 21600 0 21600 21600 0 21600 0 0 Z N"/>
        </draw:custom-shape>
        <anim:par presentation:node-type="timing-root">
          <anim:par smil:begin="id98.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5" presentation:class="page"/>
          <draw:frame presentation:style-name="pr24" draw:text-style-name="P2" draw:layer="layout" svg:width="17cm" svg:height="14cm" svg:x="2cm" svg:y="13cm" presentation:class="notes" presentation:placeholder="true">
            <draw:text-box/>
          </draw:frame>
        </presentation:notes>
      </draw:page>
      <draw:page draw:name="page16" draw:style-name="dp3" draw:master-page-name="Left_20_Bar" presentation:presentation-page-layout-name="AL3T1" xml:id="id99" draw:id="id99">
        <office:forms form:automatic-focus="false" form:apply-design-mode="false"/>
        <draw:custom-shape draw:style-name="gr43" draw:text-style-name="P27" draw:layer="layout" svg:width="8cm" svg:height="6.95cm" svg:x="10cm" svg:y="4.35cm">
          <text:p text:style-name="P26"><text:span text:style-name="T9">Expérimental</text:span></text:p>
          <draw:enhanced-geometry svg:viewBox="0 0 21600 21600" draw:glue-points="10800 0 0 10800 10800 21600 21600 10800" draw:text-areas="?f3 ?f3 ?f4 ?f4" draw:type="hexagon" draw:modifiers="5303.46071838609"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line draw:style-name="gr44" draw:text-style-name="P28" draw:layer="layout" svg:x1="14cm" svg:y1="12.192cm" svg:x2="14cm" svg:y2="15.75cm">
          <text:p/>
        </draw:line>
        <draw:frame presentation:style-name="pr25" draw:layer="layout" svg:width="14cm" svg:height="3.5cm" draw:transform="rotate (1.5707963267949) translate (0.5cm 14.75cm)" presentation:class="title" presentation:user-transformed="true">
          <draw:text-box>
            <text:p>Statut du projet</text:p>
          </draw:text-box>
        </draw:frame>
        <draw:frame presentation:style-name="pr26" draw:layer="layout" svg:width="8cm" svg:height="10cm" svg:x="19cm" svg:y="4cm" presentation:class="outline" presentation:user-transformed="true">
          <draw:text-box>
            <text:list text:style-name="L4">
              <text:list-item>
                <text:p>Statut : expérimental</text:p>
              </text:list-item>
              <text:list-item>
                <text:p>Signaux de résultats</text:p>
              </text:list-item>
              <text:list-item>
                <text:p>Code… *tousse* à structurer</text:p>
              </text:list-item>
              <text:list-item>
                <text:p>Dataset <text:s/>très restreint</text:p>
              </text:list-item>
            </text:list>
          </draw:text-box>
        </draw:frame>
        <anim:par presentation:node-type="timing-root">
          <anim:par smil:begin="id99.begin">
            <anim:transitionFilter smil:dur="0.5s" smil:type="fade" smil:subtype="fadeOverColor" smil:fadeColor="#000000"/>
          </anim:par>
          <anim:seq smil:dur="0s" presentation:node-type="main-sequence"/>
        </anim:par>
        <presentation:notes draw:style-name="dp2">
          <draw:page-thumbnail draw:style-name="gr2" draw:layer="layout" svg:width="17cm" svg:height="9.56cm" svg:x="2cm" svg:y="2.5cm" draw:page-number="16" presentation:class="page"/>
          <draw:frame presentation:style-name="pr27" draw:text-style-name="P2" draw:layer="layout" svg:width="17cm" svg:height="14cm" svg:x="2cm" svg:y="13cm" presentation:class="notes" presentation:placeholder="true">
            <draw:text-box/>
          </draw:frame>
        </presentation:notes>
      </draw:page>
      <draw:page draw:name="page17" draw:style-name="dp4" draw:master-page-name="Right_20_Bar" presentation:presentation-page-layout-name="AL3T1" xml:id="id100" draw:id="id100">
        <office:forms form:automatic-focus="false" form:apply-design-mode="false"/>
        <draw:custom-shape draw:style-name="gr43" draw:text-style-name="P27" draw:layer="layout" svg:width="8cm" svg:height="6.95cm" svg:x="10cm" svg:y="4.35cm">
          <text:p text:style-name="P26"><text:span text:style-name="T9">Fonctionnel</text:span></text:p>
          <draw:enhanced-geometry svg:viewBox="0 0 21600 21600" draw:glue-points="10800 0 0 10800 10800 21600 21600 10800" draw:text-areas="?f3 ?f3 ?f4 ?f4" draw:type="hexagon" draw:modifiers="5303.46071838609"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line draw:style-name="gr44" draw:text-style-name="P28" draw:layer="layout" svg:x1="14cm" svg:y1="3.556cm" svg:x2="14cm" svg:y2="0cm">
          <text:p/>
        </draw:line>
        <draw:frame presentation:style-name="pr28" draw:layer="layout" svg:width="14cm" svg:height="3.5cm" draw:transform="rotate (-1.5707963267949) translate (27.5cm 0.5cm)" presentation:class="title" presentation:user-transformed="true">
          <draw:text-box>
            <text:p>Cible du projet</text:p>
          </draw:text-box>
        </draw:frame>
        <draw:frame presentation:style-name="pr29" draw:layer="layout" svg:width="8cm" svg:height="10cm" svg:x="0.5cm" svg:y="4cm" presentation:class="outline" presentation:user-transformed="true">
          <draw:text-box>
            <text:list text:style-name="L4">
              <text:list-item>
                <text:p>Augmenter le dataset</text:p>
              </text:list-item>
              <text:list-item>
                <text:p>Complexifier le graphe (multigrid, icosaedre)</text:p>
              </text:list-item>
              <text:list-item>
                <text:p>Créer le programme d’inférence et les représentations graphiques</text:p>
              </text:list-item>
              <text:list-item>
                <text:p>Publication sur Github</text:p>
              </text:list-item>
            </text:list>
          </draw:text-box>
        </draw:frame>
        <anim:par presentation:node-type="timing-root">
          <anim:par smil:begin="id100.begin">
            <anim:transitionFilter smil:dur="0.5s" smil:type="pushWipe" smil:subtype="fromBottom"/>
          </anim:par>
          <anim:seq smil:dur="0s" presentation:node-type="main-sequence"/>
        </anim:par>
        <presentation:notes draw:style-name="dp2">
          <draw:page-thumbnail draw:style-name="gr2" draw:layer="layout" svg:width="17cm" svg:height="9.56cm" svg:x="2cm" svg:y="2.5cm" draw:page-number="17" presentation:class="page"/>
          <draw:frame presentation:style-name="pr30" draw:text-style-name="P2" draw:layer="layout" svg:width="17cm" svg:height="14cm" svg:x="2cm" svg:y="13cm" presentation:class="notes" presentation:placeholder="true">
            <draw:text-box/>
          </draw:frame>
        </presentation:notes>
      </draw:page>
      <draw:page draw:name="page18" draw:style-name="dp1" draw:master-page-name="White_2f_Blue_20_Chart" presentation:presentation-page-layout-name="AL3T1" xml:id="id101" draw:id="id101">
        <office:forms form:automatic-focus="false" form:apply-design-mode="false"/>
        <draw:frame presentation:style-name="pr11" draw:layer="layout" svg:width="9.8cm" svg:height="2cm" svg:x="0cm" svg:y="0.8cm" presentation:class="title" presentation:user-transformed="true">
          <draw:text-box>
            <text:p>Références</text:p>
          </draw:text-box>
        </draw:frame>
        <draw:frame presentation:style-name="pr12" draw:layer="layout" svg:width="25.2cm" svg:height="10.5cm" svg:x="1.4cm" svg:y="3.5cm" presentation:class="outline" presentation:user-transformed="true">
          <draw:text-box>
            <text:list text:style-name="L4">
              <text:list-item>
                <text:p text:style-name="P29"><text:span text:style-name="T10">Remi Lam et al. Learning skillful medium-range global weather forecasting.</text:span><text:span text:style-name="T10"><text:line-break/></text:span><text:span text:style-name="T10">Science382,1416-1421(2023).DOI:10.1126/science.adi2336</text:span><text:span text:style-name="T10"><text:line-break/></text:span><text:span text:style-name="T10"><text:a xlink:href="https://www.science.org/doi/10.1126/science.adi2336" xlink:type="simple">https://www.science.org/doi/10.1126/science.adi2336</text:a></text:span></text:p>
              </text:list-item>
              <text:list-item>
                <text:p text:style-name="P29"><text:span text:style-name="T10">Ilan Price, et al. GenCast: Diffusion-based ensemble forecasting for medium-range weather</text:span><text:span text:style-name="T10"><text:line-break/></text:span><text:span text:style-name="T10"><text:a xlink:href="https://arxiv.org/abs/2312.15796" xlink:type="simple">https://arxiv.org/abs/2312.15796</text:a></text:span></text:p>
              </text:list-item>
              <text:list-item>
                <text:p text:style-name="P29"><text:span text:style-name="T10">GraphCast et Gencast (code source)</text:span><text:span text:style-name="T10"><text:line-break/></text:span><text:span text:style-name="T10"><text:a xlink:href="https://github.com/google-deepmind/graphcast" xlink:type="simple">https://github.com/google-deepmind/graphcast</text:a></text:span></text:p>
              </text:list-item>
              <text:list-item>
                <text:p text:style-name="P29"><text:span text:style-name="T10">Learning shortest path with GraphNetowks in TF-GNN</text:span><text:span text:style-name="T10"><text:line-break/></text:span><text:span text:style-name="T10"><text:a xlink:href="https://colab.research.google.com/github/tensorflow/gnn/blob/master/examples/notebooks/" xlink:type="simple">https://colab.research.google.com/github/tensorflow/gnn/blob/master/examples/notebooks/</text:a></text:span></text:p>
              </text:list-item>
              <text:list-item>
                <text:p text:style-name="P29"><text:span text:style-name="T10">Tensorflow </text:span><text:span text:style-name="T10"><text:line-break/></text:span><text:span text:style-name="T10"><text:a xlink:href="https://www.tensorflow.org/" xlink:type="simple">https://www.tensorflow.org</text:a></text:span></text:p>
              </text:list-item>
              <text:list-item>
                <text:p text:style-name="P29"><text:span text:style-name="T10">Tensorflow GNN</text:span><text:span text:style-name="T10"><text:line-break/></text:span><text:span text:style-name="T10"><text:a xlink:href="https://github.com/tensorflow/gnn" xlink:type="simple">https://github.com/tensorflow/gnn</text:a></text:span></text:p>
              </text:list-item>
            </text:list>
          </draw:text-box>
        </draw:frame>
        <anim:par presentation:node-type="timing-root">
          <anim:par smil:begin="id101.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8" presentation:class="page"/>
          <draw:frame presentation:style-name="pr13" draw:text-style-name="P7" draw:layer="layout" svg:width="17cm" svg:height="14cm" svg:x="2cm" svg:y="13cm" presentation:class="notes" presentation:placeholder="true">
            <draw:text-box/>
          </draw:frame>
        </presentation:notes>
      </draw:page>
      <draw:page draw:name="page19" draw:style-name="dp1" draw:master-page-name="Freshes" presentation:presentation-page-layout-name="AL1T0" xml:id="id102" draw:id="id102">
        <office:forms form:automatic-focus="false" form:apply-design-mode="false"/>
        <draw:custom-shape draw:style-name="gr45" draw:text-style-name="P30" draw:layer="layout" svg:width="28cm" svg:height="2cm" svg:x="0cm" svg:y="9.2cm">
          <text:p/>
          <draw:enhanced-geometry svg:viewBox="0 0 21600 21600" draw:type="rectangle" draw:enhanced-path="M 0 0 L 21600 0 21600 21600 0 21600 0 0 Z N"/>
        </draw:custom-shape>
        <draw:frame presentation:style-name="pr1" draw:layer="layout" svg:width="24cm" svg:height="7cm" svg:x="2cm" svg:y="1.6cm" presentation:class="title">
          <draw:text-box>
            <text:p>Conclusion</text:p>
          </draw:text-box>
        </draw:frame>
        <draw:frame presentation:style-name="pr2" draw:layer="layout" svg:width="19cm" svg:height="5cm" svg:x="2cm" svg:y="9.2cm" presentation:class="subtitle" presentation:user-transformed="true">
          <draw:text-box>
            <text:p>Merci pour votre attention</text:p>
          </draw:text-box>
        </draw:frame>
        <anim:par presentation:node-type="timing-root">
          <anim:par smil:begin="id102.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9" presentation:class="page"/>
          <draw:frame presentation:style-name="pr3"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styles>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ain_5f_bg" draw:display-name="Main_bg" xlink:href="Pictures/1000000000000B8B0000067F5F2A6CFA.jpg" xlink:type="simple" xlink:show="embed" xlink:actuate="onLoad"/>
    <draw:marker draw:name="Arrow" svg:viewBox="0 0 20 30" svg:d="M10 0l-10 30h20z"/>
    <draw:marker draw:name="Arrow_20_short" draw:display-name="Arrow short" svg:viewBox="0 0 20 13" svg:d="M0 13l10-13 10 13z"/>
    <draw:marker draw:name="Circle" svg:viewBox="0 0 1131 1131" svg:d="M462 1118l-102-29-102-51-93-72-72-93-51-102-29-102-13-105 13-102 29-106 51-102 72-89 93-72 102-50 102-34 106-9 101 9 106 34 98 50 93 72 72 89 51 102 29 106 13 102-13 105-29 102-51 102-72 93-93 72-98 51-106 29-101 13z"/>
    <draw:stroke-dash draw:name="Long_20_Dash" draw:display-name="Long Dash" draw:style="rect" draw:dots1="1" draw:dots1-length="400%" draw:distance="300%"/>
    <style:default-style style:family="graphic">
      <style:graphic-properties svg:stroke-color="#3465a4" draw:fill-color="#0d84a1"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fr" fo:country="FR"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none" svg:stroke-width="0cm" svg:stroke-color="#3465a4" draw:marker-start-width="0.2cm" draw:marker-start-center="false" draw:marker-end-width="0.2cm" draw:marker-end-center="false" draw:fill="solid" draw:fill-color="#2499be"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draw:textarea-vertical-align="middle" draw:auto-grow-height="false"/>
      <style:paragraph-properties fo:text-align="center"/>
      <style:text-properties fo:font-size="18pt" fo:font-weight="normal" style:font-size-asian="18pt" style:font-size-complex="18pt"/>
    </style:style>
    <style:style style:name="Shapes" style:family="graphic" style:parent-style-name="Graphic">
      <style:graphic-properties draw:stroke="none" draw:fill="gradient" draw:fill-gradient-name="Shapes"/>
    </style:style>
    <style:style style:name="Filled" style:family="graphic" style:parent-style-name="Shapes">
      <style:graphic-properties draw:fill="solid" draw:fill-color="#ffffff" draw:opacity="100%"/>
    </style:style>
    <style:style style:name="Filled_20_Blue" style:display-name="Filled Blue" style:family="graphic" style:parent-style-name="Filled">
      <style:graphic-properties draw:fill-color="#0d84a1"/>
      <style:text-properties fo:color="#ffffff" loext:opacity="100%"/>
    </style:style>
    <style:style style:name="Filled_20_Green" style:display-name="Filled Green" style:family="graphic" style:parent-style-name="Filled">
      <style:graphic-properties draw:fill="gradient" draw:fill-gradient-name="Filled_20_Green"/>
      <style:text-properties fo:color="#ffffff" loext:opacity="100%"/>
    </style:style>
    <style:style style:name="Filled_20_Red" style:display-name="Filled Red" style:family="graphic" style:parent-style-name="Filled">
      <style:graphic-properties draw:fill="gradient" draw:fill-gradient-name="Filled_20_Red"/>
      <style:text-properties fo:color="#ffffff" loext:opacity="100%"/>
    </style:style>
    <style:style style:name="Filled_20_Yellow" style:display-name="Filled Yellow" style:family="graphic" style:parent-style-name="Filled">
      <style:graphic-properties draw:fill="gradient" draw:fill-gradient-name="Filled_20_Yellow"/>
      <style:text-properties fo:color="#ffffff" loext:opacity="100%"/>
    </style:style>
    <style:style style:name="Outlined" style:family="graphic" style:parent-style-name="Shapes">
      <style:graphic-properties draw:stroke="solid" svg:stroke-width="0.1cm" svg:stroke-color="#ffffff" svg:stroke-linecap="round" draw:fill="solid" draw:fill-color="#ffffff"/>
    </style:style>
    <style:style style:name="Outlined_20_Blue" style:display-name="Outlined Blue" style:family="graphic" style:parent-style-name="Outlined">
      <style:graphic-properties svg:stroke-color="#0d84a1"/>
      <style:text-properties fo:color="#0d84a1"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fo:font-size="18pt" style:font-size-asian="18pt"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Freshes-background" style:family="presentation">
      <style:graphic-properties draw:stroke="none" draw:fill="none"/>
      <style:text-properties style:letter-kerning="true"/>
    </style:style>
    <style:style style:name="Freshes-backgroundobjects" style:family="presentation">
      <style:graphic-properties draw:stroke="none" draw:fill="none" draw:fill-color="#0d84a1" draw:textarea-horizontal-align="justify" draw:shadow="hidden" draw:shadow-offset-x="0.2cm" draw:shadow-offset-y="0.2cm" draw:shadow-color="#808080" style:writing-mode="page"/>
      <style:paragraph-properties style:writing-mode="page"/>
    </style:style>
    <style:style style:name="Freshe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reshes-outline1" style:family="presentation">
      <style:graphic-properties draw:stroke="none" draw:fill="none" draw:auto-grow-height="false" draw:fit-to-size="false" style:shrink-to-fit="true" style:writing-mode="page">
        <text:list-style style:name="Freshe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reshes-outline2" style:family="presentation" style:parent-style-name="Freshes-outline1">
      <style:paragraph-properties fo:margin-top="0.4cm" fo:margin-bottom="0cm"/>
      <style:text-properties fo:font-size="28pt" style:font-size-asian="28pt" style:font-size-complex="28pt"/>
    </style:style>
    <style:style style:name="Freshes-outline3" style:family="presentation" style:parent-style-name="Freshes-outline2">
      <style:paragraph-properties fo:margin-top="0.3cm" fo:margin-bottom="0cm"/>
      <style:text-properties fo:font-size="24pt" style:font-size-asian="24pt" style:font-size-complex="24pt"/>
    </style:style>
    <style:style style:name="Freshes-outline4" style:family="presentation" style:parent-style-name="Freshes-outline3">
      <style:paragraph-properties fo:margin-top="0.2cm" fo:margin-bottom="0cm"/>
      <style:text-properties fo:font-size="20pt" style:font-size-asian="20pt" style:font-size-complex="20pt"/>
    </style:style>
    <style:style style:name="Freshes-outline5" style:family="presentation" style:parent-style-name="Freshes-outline4">
      <style:paragraph-properties fo:margin-top="0.1cm" fo:margin-bottom="0cm"/>
    </style:style>
    <style:style style:name="Freshes-outline6" style:family="presentation" style:parent-style-name="Freshes-outline5"/>
    <style:style style:name="Freshes-outline7" style:family="presentation" style:parent-style-name="Freshes-outline6"/>
    <style:style style:name="Freshes-outline8" style:family="presentation" style:parent-style-name="Freshes-outline7"/>
    <style:style style:name="Freshes-outline9" style:family="presentation" style:parent-style-name="Freshes-outline8"/>
    <style:style style:name="Freshes-subtitle" style:family="presentation">
      <style:graphic-properties draw:stroke="none" draw:fill="none" draw:fill-color="#ffffff" draw:textarea-vertical-align="top" draw:auto-grow-height="false" draw:fit-to-size="false" style:shrink-to-fit="true" fo:min-height="3.546cm" style:writing-mode="page">
        <text:list-style style:name="Freshes-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32pt" fo:letter-spacing="normal" fo:font-style="normal" fo:text-shadow="none"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text-emphasize="none" style:text-scale="100%" style:font-relief="none" style:text-overline-style="none" style:text-overline-color="font-color" fo:hyphenate="false" loext:hyphenation-no-caps="false"/>
    </style:style>
    <style:style style:name="Freshes-title" style:family="presentation">
      <style:graphic-properties draw:stroke="none" draw:fill="none" draw:opacity="100%" draw:textarea-vertical-align="middle" draw:auto-grow-height="false" draw:fit-to-size="false" style:shrink-to-fit="true" fo:min-height="1.36cm" draw:shadow="hidden" draw:shadow-offset-x="0cm" draw:shadow-offset-y="0.071cm" draw:shadow-opacity="100%" style:writing-mode="page">
        <text:list-style style:name="Fresh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72pt" fo:letter-spacing="normal" fo:font-style="normal" fo:text-shadow="none" style:text-underline-style="none" fo:font-weight="bold" style:text-underline-mode="continuous" style:text-overline-mode="continuous" style:text-line-through-mode="continuous" style:letter-kerning="true" fo:background-color="transparent" style:font-size-asian="72pt" style:font-style-asian="normal" style:font-weight-asian="bold" style:font-size-complex="72pt" style:font-style-complex="normal" style:font-weight-complex="bold" style:text-emphasize="none" style:text-scale="100%" style:font-relief="none" style:text-overline-style="none" style:text-overline-color="font-color" fo:hyphenate="false" loext:hyphenation-no-caps="false"/>
    </style:style>
    <style:style style:name="One_20_Bullet-background" style:display-name="One Bullet-background" style:family="presentation">
      <style:graphic-properties draw:stroke="none" draw:fill="bitmap" draw:fill-image-name="Main_5f_bg"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stroke="none" draw:fill="none" draw:textarea-horizontal-align="justify" style:writing-mode="page"/>
      <style:paragraph-properties style:writing-mode="page"/>
      <style:text-properties fo:color="#ffffff" loext:opacity="100%" style:letter-kerning="true"/>
    </style:style>
    <style:style style:name="One_20_Bullet-notes" style:display-name="One Bulle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style:writing-mode="page">
        <text:list-style style:name="One_20_Bullet-outline1" style:display-name="One Bulle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top="0.4cm" fo:margin-bottom="0cm"/>
      <style:text-properties fo:font-size="28pt" style:font-size-asian="28pt" style:font-size-complex="28pt"/>
    </style:style>
    <style:style style:name="One_20_Bullet-outline3" style:display-name="One Bullet-outline3" style:family="presentation" style:parent-style-name="One_20_Bullet-outline2">
      <style:paragraph-properties fo:margin-top="0.3cm" fo:margin-bottom="0cm"/>
      <style:text-properties fo:font-size="24pt" style:font-size-asian="24pt" style:font-size-complex="24pt"/>
    </style:style>
    <style:style style:name="One_20_Bullet-outline4" style:display-name="One Bullet-outline4" style:family="presentation" style:parent-style-name="One_20_Bullet-outline3">
      <style:paragraph-properties fo:margin-top="0.2cm" fo:margin-bottom="0cm"/>
      <style:text-properties fo:font-size="20pt" style:font-size-asian="20pt" style:font-size-complex="20pt"/>
    </style:style>
    <style:style style:name="One_20_Bullet-outline5" style:display-name="One Bullet-outline5" style:family="presentation" style:parent-style-name="One_20_Bullet-outline4">
      <style:paragraph-properties fo:margin-top="0.1cm" fo:margin-bottom="0cm"/>
    </style:style>
    <style:style style:name="One_20_Bullet-outline6" style:display-name="One Bullet-outline6" style:family="presentation" style:parent-style-name="One_20_Bullet-outline5"/>
    <style:style style:name="One_20_Bullet-outline7" style:display-name="One Bullet-outline7" style:family="presentation" style:parent-style-name="One_20_Bullet-outline6"/>
    <style:style style:name="One_20_Bullet-outline8" style:display-name="One Bullet-outline8" style:family="presentation" style:parent-style-name="One_20_Bullet-outline7"/>
    <style:style style:name="One_20_Bullet-outline9" style:display-name="One Bullet-outline9" style:family="presentation" style:parent-style-name="One_20_Bullet-outline8"/>
    <style:style style:name="One_20_Bullet-subtitle" style:display-name="One Bullet-subtitle" style:family="presentation">
      <style:graphic-properties draw:stroke="none" draw:fill="none" draw:textarea-vertical-align="middle" style:writing-mode="page">
        <text:list-style style:name="One_20_Bullet-subtitle" style:display-name="One Bullet-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draw:auto-grow-height="false" draw:fit-to-size="false" style:shrink-to-fit="true" style:writing-mode="page">
        <text:list-style style:name="One_20_Bullet-title" style:display-name="One Bullet-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wo_20_Bullets-notes" style:display-name="Two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style:writing-mode="page">
        <text:list-style style:name="Two_20_Bullets-outline1" style:display-name="Two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top="0.4cm" fo:margin-bottom="0cm"/>
      <style:text-properties fo:font-size="28pt" style:font-size-asian="28pt" style:font-size-complex="28pt"/>
    </style:style>
    <style:style style:name="Two_20_Bullets-outline3" style:display-name="Two Bullets-outline3" style:family="presentation" style:parent-style-name="Two_20_Bullets-outline2">
      <style:paragraph-properties fo:margin-top="0.3cm" fo:margin-bottom="0cm"/>
      <style:text-properties fo:font-size="24pt" style:font-size-asian="24pt" style:font-size-complex="24pt"/>
    </style:style>
    <style:style style:name="Two_20_Bullets-outline4" style:display-name="Two Bullets-outline4" style:family="presentation" style:parent-style-name="Two_20_Bullets-outline3">
      <style:paragraph-properties fo:margin-top="0.2cm" fo:margin-bottom="0cm"/>
      <style:text-properties fo:font-size="20pt" style:font-size-asian="20pt" style:font-size-complex="20pt"/>
    </style:style>
    <style:style style:name="Two_20_Bullets-outline5" style:display-name="Two Bullets-outline5" style:family="presentation" style:parent-style-name="Two_20_Bullets-outline4">
      <style:paragraph-properties fo:margin-top="0.1cm" fo:margin-bottom="0cm"/>
    </style:style>
    <style:style style:name="Two_20_Bullets-outline6" style:display-name="Two Bullets-outline6" style:family="presentation" style:parent-style-name="Two_20_Bullets-outline5"/>
    <style:style style:name="Two_20_Bullets-outline7" style:display-name="Two Bullets-outline7" style:family="presentation" style:parent-style-name="Two_20_Bullets-outline6"/>
    <style:style style:name="Two_20_Bullets-outline8" style:display-name="Two Bullets-outline8" style:family="presentation" style:parent-style-name="Two_20_Bullets-outline7"/>
    <style:style style:name="Two_20_Bullets-outline9" style:display-name="Two Bullets-outline9" style:family="presentation" style:parent-style-name="Two_20_Bullets-outline8"/>
    <style:style style:name="Two_20_Bullets-subtitle" style:display-name="Two Bullets-subtitle" style:family="presentation">
      <style:graphic-properties draw:stroke="none" draw:fill="none" draw:textarea-vertical-align="middle" style:writing-mode="pag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draw:auto-grow-height="false" draw:fit-to-size="false" style:shrink-to-fit="true" style:writing-mode="pag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hree_20_Bullets-notes" style:display-name="Three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style:writing-mode="page">
        <text:list-style style:name="Three_20_Bullets-outline1" style:display-name="Three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top="0.4cm" fo:margin-bottom="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top="0.3cm" fo:margin-bottom="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top="0.2cm" fo:margin-bottom="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top="0.1cm" fo:margin-bottom="0cm"/>
    </style:style>
    <style:style style:name="Three_20_Bullets-outline6" style:display-name="Three Bullets-outline6" style:family="presentation" style:parent-style-name="Three_20_Bullets-outline5"/>
    <style:style style:name="Three_20_Bullets-outline7" style:display-name="Three Bullets-outline7" style:family="presentation" style:parent-style-name="Three_20_Bullets-outline6"/>
    <style:style style:name="Three_20_Bullets-outline8" style:display-name="Three Bullets-outline8" style:family="presentation" style:parent-style-name="Three_20_Bullets-outline7"/>
    <style:style style:name="Three_20_Bullets-outline9" style:display-name="Three Bullets-outline9" style:family="presentation" style:parent-style-name="Three_20_Bullets-outline8"/>
    <style:style style:name="Three_20_Bullets-subtitle" style:display-name="Three Bullets-subtitle" style:family="presentation">
      <style:graphic-properties draw:stroke="none" draw:fill="none" draw:textarea-vertical-align="middle" style:writing-mode="pag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draw:auto-grow-height="false" draw:fit-to-size="false" style:shrink-to-fit="true" style:writing-mode="pag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72pt" fo:font-style="normal" fo:text-shadow="none" style:text-underline-style="none" fo:font-weight="bold" style:letter-kerning="true" fo:background-color="transparent" style:font-size-asian="72pt" style:font-style-asian="normal" style:font-weight-asian="bold" style:font-size-complex="72pt" style:font-style-complex="normal" style:font-weight-complex="bold"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Four_20_Bullets-notes" style:display-name="Four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style:writing-mode="page">
        <text:list-style style:name="Four_20_Bullets-outline1" style:display-name="Four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top="0.4cm" fo:margin-bottom="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top="0.3cm" fo:margin-bottom="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top="0.2cm" fo:margin-bottom="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top="0.1cm" fo:margin-bottom="0cm"/>
    </style:style>
    <style:style style:name="Four_20_Bullets-outline6" style:display-name="Four Bullets-outline6" style:family="presentation" style:parent-style-name="Four_20_Bullets-outline5"/>
    <style:style style:name="Four_20_Bullets-outline7" style:display-name="Four Bullets-outline7" style:family="presentation" style:parent-style-name="Four_20_Bullets-outline6"/>
    <style:style style:name="Four_20_Bullets-outline8" style:display-name="Four Bullets-outline8" style:family="presentation" style:parent-style-name="Four_20_Bullets-outline7"/>
    <style:style style:name="Four_20_Bullets-outline9" style:display-name="Four Bullets-outline9" style:family="presentation" style:parent-style-name="Four_20_Bullets-outline8"/>
    <style:style style:name="Four_20_Bullets-subtitle" style:display-name="Four Bullets-subtitle" style:family="presentation">
      <style:graphic-properties draw:stroke="none" draw:fill="none" draw:textarea-vertical-align="middle" style:writing-mode="pag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draw:auto-grow-height="false" draw:fit-to-size="false" style:shrink-to-fit="true" style:writing-mode="pag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d84a1"/>
      <style:text-properties style:letter-kerning="true"/>
    </style:style>
    <style:style style:name="Blue_2f_White_20_Chart-backgroundobjects" style:display-name="Blue/Whit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Blue_2f_White_20_Chart-notes" style:display-name="Blue/Whit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style:writing-mode="pag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top="0.4cm" fo:margin-bottom="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top="0.3cm" fo:margin-bottom="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top="0.2cm" fo:margin-bottom="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top="0.1cm" fo:margin-bottom="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top="0.1cm" fo:margin-bottom="0cm"/>
    </style:style>
    <style:style style:name="Blue_2f_White_20_Chart-outline7" style:display-name="Blue/White Chart-outline7" style:family="presentation" style:parent-style-name="Blue_2f_White_20_Chart-outline6"/>
    <style:style style:name="Blue_2f_White_20_Chart-outline8" style:display-name="Blue/White Chart-outline8" style:family="presentation" style:parent-style-name="Blue_2f_White_20_Chart-outline7"/>
    <style:style style:name="Blue_2f_White_20_Chart-outline9" style:display-name="Blue/White Chart-outline9" style:family="presentation" style:parent-style-name="Blue_2f_White_20_Chart-outline8"/>
    <style:style style:name="Blue_2f_White_20_Chart-subtitle" style:display-name="Blue/White Chart-subtitle" style:family="presentation">
      <style:graphic-properties draw:stroke="none" draw:fill="none" draw:textarea-vertical-align="middle" style:writing-mode="pag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draw:auto-grow-height="false" draw:fit-to-size="false" style:shrink-to-fit="true" style:writing-mode="pag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White_2f_Blue_20_Chart-notes" style:display-name="White/Blu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style:writing-mode="page">
        <text:list-style style:name="White_2f_Blue_20_Chart-outline1" style:display-name="White/Blue Char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top="0.4cm" fo:margin-bottom="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top="0.3cm" fo:margin-bottom="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top="0.2cm" fo:margin-bottom="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top="0.1cm" fo:margin-bottom="0cm"/>
    </style:style>
    <style:style style:name="White_2f_Blue_20_Chart-outline6" style:display-name="White/Blue Chart-outline6" style:family="presentation" style:parent-style-name="White_2f_Blue_20_Chart-outline5"/>
    <style:style style:name="White_2f_Blue_20_Chart-outline7" style:display-name="White/Blue Chart-outline7" style:family="presentation" style:parent-style-name="White_2f_Blue_20_Chart-outline6"/>
    <style:style style:name="White_2f_Blue_20_Chart-outline8" style:display-name="White/Blue Chart-outline8" style:family="presentation" style:parent-style-name="White_2f_Blue_20_Chart-outline7"/>
    <style:style style:name="White_2f_Blue_20_Chart-outline9" style:display-name="White/Blue Chart-outline9" style:family="presentation" style:parent-style-name="White_2f_Blue_20_Chart-outline8"/>
    <style:style style:name="White_2f_Blue_20_Chart-subtitle" style:display-name="White/Blue Chart-subtitle" style:family="presentation">
      <style:graphic-properties draw:stroke="none" draw:fill="none" draw:textarea-vertical-align="middle" style:writing-mode="pag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draw:auto-grow-height="false" draw:fit-to-size="false" style:shrink-to-fit="true" style:writing-mode="pag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Diagram-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style:writing-mode="pag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top="0.4cm" fo:margin-bottom="0cm"/>
      <style:text-properties fo:font-size="28pt" style:font-size-asian="28pt" style:font-size-complex="28pt"/>
    </style:style>
    <style:style style:name="Diagram-outline3" style:family="presentation" style:parent-style-name="Diagram-outline2">
      <style:paragraph-properties fo:margin-top="0.3cm" fo:margin-bottom="0cm"/>
      <style:text-properties fo:font-size="24pt" style:font-size-asian="24pt" style:font-size-complex="24pt"/>
    </style:style>
    <style:style style:name="Diagram-outline4" style:family="presentation" style:parent-style-name="Diagram-outline3">
      <style:paragraph-properties fo:margin-top="0.2cm" fo:margin-bottom="0cm"/>
      <style:text-properties fo:font-size="20pt" style:font-size-asian="20pt" style:font-size-complex="20pt"/>
    </style:style>
    <style:style style:name="Diagram-outline5" style:family="presentation" style:parent-style-name="Diagram-outline4">
      <style:paragraph-properties fo:margin-top="0.1cm" fo:margin-bottom="0cm"/>
    </style:style>
    <style:style style:name="Diagram-outline6" style:family="presentation" style:parent-style-name="Diagram-outline5"/>
    <style:style style:name="Diagram-outline7" style:family="presentation" style:parent-style-name="Diagram-outline6"/>
    <style:style style:name="Diagram-outline8" style:family="presentation" style:parent-style-name="Diagram-outline7"/>
    <style:style style:name="Diagram-outline9" style:family="presentation" style:parent-style-name="Diagram-outline8"/>
    <style:style style:name="Diagram-subtitle" style:family="presentation">
      <style:graphic-properties draw:stroke="solid" svg:stroke-width="0.1cm" svg:stroke-color="#0d84a1" svg:stroke-linecap="round" draw:fill="solid" draw:fill-color="#ffffff" draw:textarea-horizontal-align="center" draw:textarea-vertical-align="middle" draw:auto-grow-height="false" draw:fit-to-size="false" style:shrink-to-fit="true" style:writing-mode="pag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text-emphasize="none" style:font-relief="none" style:text-overline-style="none" style:text-overline-color="font-color"/>
    </style:style>
    <style:style style:name="Diagram-title" style:family="presentation">
      <style:graphic-properties draw:stroke="none" draw:fill="none" draw:textarea-vertical-align="middle" draw:auto-grow-height="false" draw:fit-to-size="false" style:shrink-to-fit="true" style:writing-mode="pag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ab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style:writing-mode="page">
        <text:list-style style:name="Table-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top="0.4cm" fo:margin-bottom="0cm"/>
      <style:text-properties fo:font-size="28pt" style:font-size-asian="28pt" style:font-size-complex="28pt"/>
    </style:style>
    <style:style style:name="Table-outline3" style:family="presentation" style:parent-style-name="Table-outline2">
      <style:paragraph-properties fo:margin-top="0.3cm" fo:margin-bottom="0cm"/>
      <style:text-properties fo:font-size="24pt" style:font-size-asian="24pt" style:font-size-complex="24pt"/>
    </style:style>
    <style:style style:name="Table-outline4" style:family="presentation" style:parent-style-name="Table-outline3">
      <style:paragraph-properties fo:margin-top="0.2cm" fo:margin-bottom="0cm"/>
      <style:text-properties fo:font-size="20pt" style:font-size-asian="20pt" style:font-size-complex="20pt"/>
    </style:style>
    <style:style style:name="Table-outline5" style:family="presentation" style:parent-style-name="Table-outline4">
      <style:paragraph-properties fo:margin-top="0.1cm" fo:margin-bottom="0cm"/>
    </style:style>
    <style:style style:name="Table-outline6" style:family="presentation" style:parent-style-name="Table-outline5"/>
    <style:style style:name="Table-outline7" style:family="presentation" style:parent-style-name="Table-outline6"/>
    <style:style style:name="Table-outline8" style:family="presentation" style:parent-style-name="Table-outline7"/>
    <style:style style:name="Table-outline9" style:family="presentation" style:parent-style-name="Table-outline8"/>
    <style:style style:name="Table-subtitle" style:family="presentation">
      <style:graphic-properties draw:stroke="none" draw:fill="none" draw:textarea-vertical-align="middle" style:writing-mode="pag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draw:auto-grow-height="false" draw:fit-to-size="false" style:shrink-to-fit="true" style:writing-mode="pag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Left_20_Bar-notes" style:display-name="Lef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style:writing-mode="page">
        <text:list-style style:name="Left_20_Bar-outline1" style:display-name="Lef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top="0.4cm" fo:margin-bottom="0cm"/>
      <style:text-properties fo:font-size="28pt" style:font-size-asian="28pt" style:font-size-complex="28pt"/>
    </style:style>
    <style:style style:name="Left_20_Bar-outline3" style:display-name="Left Bar-outline3" style:family="presentation" style:parent-style-name="Left_20_Bar-outline2">
      <style:paragraph-properties fo:margin-top="0.3cm" fo:margin-bottom="0cm"/>
      <style:text-properties fo:font-size="24pt" style:font-size-asian="24pt" style:font-size-complex="24pt"/>
    </style:style>
    <style:style style:name="Left_20_Bar-outline4" style:display-name="Left Bar-outline4" style:family="presentation" style:parent-style-name="Left_20_Bar-outline3">
      <style:paragraph-properties fo:margin-top="0.2cm" fo:margin-bottom="0cm"/>
      <style:text-properties fo:font-size="20pt" style:font-size-asian="20pt" style:font-size-complex="20pt"/>
    </style:style>
    <style:style style:name="Left_20_Bar-outline5" style:display-name="Left Bar-outline5" style:family="presentation" style:parent-style-name="Left_20_Bar-outline4">
      <style:paragraph-properties fo:margin-top="0.1cm" fo:margin-bottom="0cm"/>
    </style:style>
    <style:style style:name="Left_20_Bar-outline6" style:display-name="Left Bar-outline6" style:family="presentation" style:parent-style-name="Left_20_Bar-outline5"/>
    <style:style style:name="Left_20_Bar-outline7" style:display-name="Left Bar-outline7" style:family="presentation" style:parent-style-name="Left_20_Bar-outline6"/>
    <style:style style:name="Left_20_Bar-outline8" style:display-name="Left Bar-outline8" style:family="presentation" style:parent-style-name="Left_20_Bar-outline7"/>
    <style:style style:name="Left_20_Bar-outline9" style:display-name="Left Bar-outline9" style:family="presentation" style:parent-style-name="Left_20_Bar-outline8"/>
    <style:style style:name="Left_20_Bar-subtitle" style:display-name="Left Bar-subtitle" style:family="presentation">
      <style:graphic-properties draw:stroke="none" draw:fill="none" draw:textarea-vertical-align="middle" style:writing-mode="pag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draw:auto-grow-height="false" draw:fit-to-size="false" style:shrink-to-fit="true" style:writing-mode="pag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Right_20_Bar-notes" style:display-name="Righ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style:writing-mode="page">
        <text:list-style style:name="Right_20_Bar-outline1" style:display-name="Righ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top="0.4cm" fo:margin-bottom="0cm"/>
      <style:text-properties fo:font-size="28pt" style:font-size-asian="28pt" style:font-size-complex="28pt"/>
    </style:style>
    <style:style style:name="Right_20_Bar-outline3" style:display-name="Right Bar-outline3" style:family="presentation" style:parent-style-name="Right_20_Bar-outline2">
      <style:paragraph-properties fo:margin-top="0.3cm" fo:margin-bottom="0cm"/>
      <style:text-properties fo:font-size="24pt" style:font-size-asian="24pt" style:font-size-complex="24pt"/>
    </style:style>
    <style:style style:name="Right_20_Bar-outline4" style:display-name="Right Bar-outline4" style:family="presentation" style:parent-style-name="Right_20_Bar-outline3">
      <style:paragraph-properties fo:margin-top="0.2cm" fo:margin-bottom="0cm"/>
      <style:text-properties fo:font-size="20pt" style:font-size-asian="20pt" style:font-size-complex="20pt"/>
    </style:style>
    <style:style style:name="Right_20_Bar-outline5" style:display-name="Right Bar-outline5" style:family="presentation" style:parent-style-name="Right_20_Bar-outline4">
      <style:paragraph-properties fo:margin-top="0.1cm" fo:margin-bottom="0cm"/>
    </style:style>
    <style:style style:name="Right_20_Bar-outline6" style:display-name="Right Bar-outline6" style:family="presentation" style:parent-style-name="Right_20_Bar-outline5"/>
    <style:style style:name="Right_20_Bar-outline7" style:display-name="Right Bar-outline7" style:family="presentation" style:parent-style-name="Right_20_Bar-outline6"/>
    <style:style style:name="Right_20_Bar-outline8" style:display-name="Right Bar-outline8" style:family="presentation" style:parent-style-name="Right_20_Bar-outline7"/>
    <style:style style:name="Right_20_Bar-outline9" style:display-name="Right Bar-outline9" style:family="presentation" style:parent-style-name="Right_20_Bar-outline8"/>
    <style:style style:name="Right_20_Bar-subtitle" style:display-name="Right Bar-subtitle" style:family="presentation">
      <style:graphic-properties draw:stroke="none" draw:fill="none" draw:textarea-vertical-align="middle" style:writing-mode="pag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draw:auto-grow-height="false" draw:fit-to-size="false" style:shrink-to-fit="true" style:writing-mode="pag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5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Main_5f_bg"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solid" draw:fill-color="#0d84a1"/>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cm" loext:decorative="false"/>
      <style:paragraph-properties style:writing-mode="lr-tb"/>
    </style:style>
    <style:style style:name="Mgr3" style:family="graphic" style:parent-style-name="Object_20_with_20_no_20_fill_20_and_20_no_20_line">
      <style:graphic-properties draw:stroke="none" draw:fill="none" style:mirror="none" style:protect="position size" loext:decorative="false"/>
    </style:style>
    <style:style style:name="Mgr4" style:family="graphic" style:parent-style-name="Filled_20_Blue">
      <style:graphic-properties draw:fill="solid" draw:fill-color="#0d84a1" draw:opacity="45%" style:protect="position size" loext:decorative="fals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loext:decorative="false"/>
    </style:style>
    <style:style style:name="Mgr7" style:family="graphic" style:parent-style-name="Filled">
      <style:graphic-properties draw:fill="solid" draw:fill-color="#ffffff" loext:decorative="false"/>
    </style:style>
    <style:style style:name="Mgr8" style:family="graphic" style:parent-style-name="Filled_20_Blue">
      <style:graphic-properties draw:fill="solid" draw:fill-color="#0d84a1" loext:decorative="false"/>
    </style:style>
    <style:style style:name="Mgr9" style:family="graphic" style:parent-style-name="Filled_20_Blue">
      <style:graphic-properties draw:fill="solid" draw:fill-color="#0d84a1" style:protect="position size" loext:decorative="false"/>
    </style:style>
    <style:style style:name="Mpr1" style:family="presentation" style:parent-style-name="Freshes-backgroundobjects">
      <style:graphic-properties draw:fill="none" draw:fill-color="#ffffff" fo:min-height="1.484cm" loext:decorative="false"/>
      <style:paragraph-properties style:writing-mode="lr-tb"/>
    </style:style>
    <style:style style:name="Mpr2" style:family="presentation" style:parent-style-name="Freshes-backgroundobjects">
      <style:graphic-properties draw:fill="none" draw:fill-color="#ffffff" draw:textarea-vertical-align="bottom" fo:min-height="1.484cm" loext:decorative="false"/>
      <style:paragraph-properties style:writing-mode="lr-tb"/>
    </style:style>
    <style:style style:name="Mpr3" style:family="presentation" style:parent-style-name="One_20_Bullet-backgroundobjects">
      <style:graphic-properties draw:fill="none" draw:fill-color="#ffffff" fo:min-height="0.674cm" loext:decorative="false"/>
      <style:paragraph-properties style:writing-mode="lr-tb"/>
    </style:style>
    <style:style style:name="Mpr4" style:family="presentation" style:parent-style-name="One_20_Bullet-backgroundobjects">
      <style:graphic-properties draw:fill="none" draw:fill-color="#ffffff" fo:min-height="1.484cm" loext:decorative="false"/>
      <style:paragraph-properties style:writing-mode="lr-tb"/>
    </style:style>
    <style:style style:name="Mpr5" style:family="presentation" style:parent-style-name="One_20_Bullet-backgroundobjects">
      <style:graphic-properties draw:fill="none" draw:fill-color="#ffffff" draw:textarea-vertical-align="bottom" fo:min-height="1.484cm" loext:decorative="false"/>
      <style:paragraph-properties style:writing-mode="lr-tb"/>
    </style:style>
    <style:style style:name="Mpr6" style:family="presentation" style:parent-style-name="Two_20_Bullets-backgroundobjects">
      <style:graphic-properties draw:fill="none" draw:fill-color="#ffffff" fo:min-height="0.674cm" loext:decorative="false"/>
      <style:paragraph-properties style:writing-mode="lr-tb"/>
    </style:style>
    <style:style style:name="Mpr7" style:family="presentation" style:parent-style-name="Two_20_Bullets-backgroundobjects">
      <style:graphic-properties draw:fill="none" draw:fill-color="#ffffff" fo:min-height="1.484cm" loext:decorative="false"/>
      <style:paragraph-properties style:writing-mode="lr-tb"/>
    </style:style>
    <style:style style:name="Mpr8" style:family="presentation" style:parent-style-name="Two_20_Bullets-backgroundobjects">
      <style:graphic-properties draw:fill="none" draw:fill-color="#ffffff" draw:textarea-vertical-align="bottom" fo:min-height="1.484cm" loext:decorative="false"/>
      <style:paragraph-properties style:writing-mode="lr-tb"/>
    </style:style>
    <style:style style:name="Mpr9" style:family="presentation" style:parent-style-name="Three_20_Bullets-backgroundobjects">
      <style:graphic-properties draw:fill="none" draw:fill-color="#ffffff" fo:min-height="0.674cm" loext:decorative="false"/>
      <style:paragraph-properties style:writing-mode="lr-tb"/>
    </style:style>
    <style:style style:name="Mpr10" style:family="presentation" style:parent-style-name="Three_20_Bullets-backgroundobjects">
      <style:graphic-properties draw:fill="none" draw:fill-color="#ffffff" fo:min-height="1.484cm" loext:decorative="false"/>
      <style:paragraph-properties style:writing-mode="lr-tb"/>
    </style:style>
    <style:style style:name="Mpr11" style:family="presentation" style:parent-style-name="Three_20_Bullets-backgroundobjects">
      <style:graphic-properties draw:fill="none" draw:fill-color="#ffffff" draw:textarea-vertical-align="bottom" fo:min-height="1.484cm" loext:decorative="false"/>
      <style:paragraph-properties style:writing-mode="lr-tb"/>
    </style:style>
    <style:style style:name="Mpr12" style:family="presentation" style:parent-style-name="Four_20_Bullets-backgroundobjects">
      <style:graphic-properties draw:fill="none" draw:fill-color="#ffffff" fo:min-height="0.674cm" loext:decorative="false"/>
      <style:paragraph-properties style:writing-mode="lr-tb"/>
    </style:style>
    <style:style style:name="Mpr13" style:family="presentation" style:parent-style-name="Four_20_Bullets-backgroundobjects">
      <style:graphic-properties draw:fill="none" draw:fill-color="#ffffff" fo:min-height="1.484cm" loext:decorative="false"/>
      <style:paragraph-properties style:writing-mode="lr-tb"/>
    </style:style>
    <style:style style:name="Mpr14" style:family="presentation" style:parent-style-name="Four_20_Bullets-backgroundobjects">
      <style:graphic-properties draw:fill="none" draw:fill-color="#ffffff" draw:textarea-vertical-align="bottom" fo:min-height="1.484cm" loext:decorative="false"/>
      <style:paragraph-properties style:writing-mode="lr-tb"/>
    </style:style>
    <style:style style:name="Mpr15" style:family="presentation" style:parent-style-name="Blue_2f_White_20_Chart-backgroundobjects">
      <style:graphic-properties draw:fill="none" draw:fill-color="#ffffff" fo:min-height="0.674cm" loext:decorative="false"/>
      <style:paragraph-properties style:writing-mode="lr-tb"/>
    </style:style>
    <style:style style:name="Mpr16" style:family="presentation" style:parent-style-name="Blue_2f_White_20_Chart-backgroundobjects">
      <style:graphic-properties draw:fill="none" draw:fill-color="#ffffff" fo:min-height="1.484cm" loext:decorative="false"/>
      <style:paragraph-properties style:writing-mode="lr-tb"/>
    </style:style>
    <style:style style:name="Mpr17" style:family="presentation" style:parent-style-name="Blue_2f_White_20_Chart-backgroundobjects">
      <style:graphic-properties draw:fill="none" draw:fill-color="#ffffff" draw:textarea-vertical-align="bottom" fo:min-height="1.484cm" loext:decorative="false"/>
      <style:paragraph-properties style:writing-mode="lr-tb"/>
    </style:style>
    <style:style style:name="Mpr18" style:family="presentation" style:parent-style-name="White_2f_Blue_20_Chart-backgroundobjects">
      <style:graphic-properties draw:fill="none" draw:fill-color="#ffffff" fo:min-height="0.674cm" loext:decorative="false"/>
      <style:paragraph-properties style:writing-mode="lr-tb"/>
    </style:style>
    <style:style style:name="Mpr19" style:family="presentation" style:parent-style-name="White_2f_Blue_20_Chart-backgroundobjects">
      <style:graphic-properties draw:fill="none" draw:fill-color="#ffffff" fo:min-height="1.484cm" loext:decorative="false"/>
      <style:paragraph-properties style:writing-mode="lr-tb"/>
    </style:style>
    <style:style style:name="Mpr20" style:family="presentation" style:parent-style-name="White_2f_Blue_20_Chart-backgroundobjects">
      <style:graphic-properties draw:fill="none" draw:fill-color="#ffffff" draw:textarea-vertical-align="bottom" fo:min-height="1.484cm" loext:decorative="false"/>
      <style:paragraph-properties style:writing-mode="lr-tb"/>
    </style:style>
    <style:style style:name="Mpr21" style:family="presentation" style:parent-style-name="Diagram-backgroundobjects">
      <style:graphic-properties draw:fill="none" draw:fill-color="#ffffff" fo:min-height="0.674cm" loext:decorative="false"/>
      <style:paragraph-properties style:writing-mode="lr-tb"/>
    </style:style>
    <style:style style:name="Mpr22" style:family="presentation" style:parent-style-name="Diagram-backgroundobjects">
      <style:graphic-properties draw:fill="none" draw:fill-color="#ffffff" fo:min-height="1.484cm" loext:decorative="false"/>
      <style:paragraph-properties style:writing-mode="lr-tb"/>
    </style:style>
    <style:style style:name="Mpr23" style:family="presentation" style:parent-style-name="Diagram-backgroundobjects">
      <style:graphic-properties draw:fill="none" draw:fill-color="#ffffff" draw:textarea-vertical-align="bottom" fo:min-height="1.484cm" loext:decorative="false"/>
      <style:paragraph-properties style:writing-mode="lr-tb"/>
    </style:style>
    <style:style style:name="Mpr24" style:family="presentation" style:parent-style-name="Table-backgroundobjects">
      <style:graphic-properties draw:fill="none" draw:fill-color="#ffffff" fo:min-height="0.674cm" loext:decorative="false"/>
      <style:paragraph-properties style:writing-mode="lr-tb"/>
    </style:style>
    <style:style style:name="Mpr25" style:family="presentation" style:parent-style-name="Table-backgroundobjects">
      <style:graphic-properties draw:fill="none" draw:fill-color="#ffffff" fo:min-height="1.484cm" loext:decorative="false"/>
      <style:paragraph-properties style:writing-mode="lr-tb"/>
    </style:style>
    <style:style style:name="Mpr26" style:family="presentation" style:parent-style-name="Table-backgroundobjects">
      <style:graphic-properties draw:fill="none" draw:fill-color="#ffffff" draw:textarea-vertical-align="bottom" fo:min-height="1.484cm" loext:decorative="false"/>
      <style:paragraph-properties style:writing-mode="lr-tb"/>
    </style:style>
    <style:style style:name="Mpr27" style:family="presentation" style:parent-style-name="Left_20_Bar-backgroundobjects">
      <style:graphic-properties draw:fill="none" draw:fill-color="#ffffff" fo:min-height="0.674cm" loext:decorative="false"/>
      <style:paragraph-properties style:writing-mode="lr-tb"/>
    </style:style>
    <style:style style:name="Mpr28" style:family="presentation" style:parent-style-name="Left_20_Bar-backgroundobjects">
      <style:graphic-properties draw:fill="none" draw:fill-color="#ffffff" fo:min-height="1.484cm" loext:decorative="false"/>
      <style:paragraph-properties style:writing-mode="lr-tb"/>
    </style:style>
    <style:style style:name="Mpr29" style:family="presentation" style:parent-style-name="Left_20_Bar-backgroundobjects">
      <style:graphic-properties draw:fill="none" draw:fill-color="#ffffff" draw:textarea-vertical-align="bottom" fo:min-height="1.484cm" loext:decorative="false"/>
      <style:paragraph-properties style:writing-mode="lr-tb"/>
    </style:style>
    <style:style style:name="Mpr30" style:family="presentation" style:parent-style-name="Right_20_Bar-backgroundobjects">
      <style:graphic-properties draw:fill="none" draw:fill-color="#ffffff" fo:min-height="0.674cm" loext:decorative="false"/>
      <style:paragraph-properties style:writing-mode="lr-tb"/>
    </style:style>
    <style:style style:name="Mpr31" style:family="presentation" style:parent-style-name="Right_20_Bar-backgroundobjects">
      <style:graphic-properties draw:fill="none" draw:fill-color="#ffffff" fo:min-height="1.484cm" loext:decorative="false"/>
      <style:paragraph-properties style:writing-mode="lr-tb"/>
    </style:style>
    <style:style style:name="Mpr32" style:family="presentation" style:parent-style-name="Right_20_Bar-backgroundobjects">
      <style:graphic-properties draw:fill="none" draw:fill-color="#ffffff" draw:textarea-vertical-align="bottom" fo:min-height="1.484cm" loext:decorative="false"/>
      <style:paragraph-properties style:writing-mode="lr-tb"/>
    </style:style>
    <style:style style:name="MP1" style:family="paragraph">
      <style:text-properties fo:color="#000000" loext:opacity="100%" fo:font-size="14pt" style:font-size-asian="14pt" style:font-size-complex="14pt"/>
    </style:style>
    <style:style style:name="MP2" style:family="paragraph">
      <loext:graphic-properties draw:fill="none" draw:fill-color="#ffffff"/>
      <style:text-properties fo:color="#000000" loext:opacity="100%" fo:font-size="14pt" style:font-size-asian="14pt" style:font-size-complex="14pt"/>
    </style:style>
    <style:style style:name="MP3" style:family="paragraph">
      <style:paragraph-properties fo:text-align="end"/>
      <style:text-properties fo:color="#000000" loext:opacity="100%" fo:font-size="14pt" style:font-size-asian="14pt" style:font-size-complex="14pt"/>
    </style:style>
    <style:style style:name="MP4" style:family="paragraph">
      <loext:graphic-properties draw:fill="none" draw:fill-color="#ffffff"/>
      <style:paragraph-properties fo:text-align="end"/>
      <style:text-properties fo:color="#000000" loext:opacity="100%" fo:font-size="14pt" style:font-size-asian="14pt" style:font-size-complex="14pt"/>
    </style:style>
    <style:style style:name="MP5" style:family="paragraph">
      <loext:graphic-properties draw:fill="none"/>
    </style:style>
    <style:style style:name="MP6" style:family="paragraph">
      <loext:graphic-properties draw:fill="solid" draw:fill-color="#0d84a1" draw:opacity="45%"/>
      <style:text-properties fo:color="#ffffff" loext:opacity="100%"/>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solid" draw:fill-color="#ffffff"/>
      <style:text-properties fo:color="#000000" loext:opacity="100%"/>
    </style:style>
    <style:style style:name="MP10" style:family="paragraph">
      <loext:graphic-properties draw:fill="solid" draw:fill-color="#0d84a1"/>
      <style:text-properties fo:color="#ffffff" loext:opacity="100%"/>
    </style:style>
    <style:style style:name="MT1" style:family="text">
      <style:text-properties fo:color="#000000" loext:opacity="100%" fo:font-size="14pt" style:font-size-asian="14pt" style:font-size-complex="14pt"/>
    </style:style>
    <style:style style:name="MT2" style:family="text">
      <style:text-properties fo:color="#ffffff" loext:opacity="100%" fo:font-size="14pt" style:font-size-asian="14pt" style:font-size-complex="14pt"/>
    </style:style>
    <style:style style:name="MT3"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9cm" svg:height="5.062cm" svg:x="1cm" svg:y="3.742cm"/>
      <draw:page-thumbnail draw:layer="backgroundobjects" svg:width="9cm" svg:height="5.062cm" svg:x="1cm" svg:y="12.318cm"/>
      <draw:page-thumbnail draw:layer="backgroundobjects" svg:width="9cm" svg:height="5.062cm" svg:x="1cm" svg:y="20.894cm"/>
      <draw:page-thumbnail draw:layer="backgroundobjects" svg:width="9cm" svg:height="5.062cm" svg:x="11cm" svg:y="3.742cm"/>
      <draw:page-thumbnail draw:layer="backgroundobjects" svg:width="9cm" svg:height="5.062cm" svg:x="11cm" svg:y="12.318cm"/>
      <draw:page-thumbnail draw:layer="backgroundobjects" svg:width="9cm" svg:height="5.062cm" svg:x="11cm" svg:y="20.894cm"/>
    </style:handout-master>
    <style:master-page style:name="Freshe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8cm" svg:height="15.75cm" svg:x="0cm" svg:y="0cm">
        <draw:image xlink:href="Pictures/1000000000000B8B0000067F5F2A6CFA.jpg" xlink:type="simple" xlink:show="embed" xlink:actuate="onLoad" draw:mime-type="image/jpeg">
          <text:p/>
        </draw:image>
      </draw:frame>
      <draw:frame presentation:style-name="Freshes-title" draw:layer="backgroundobjects" svg:width="24cm" svg:height="7cm" svg:x="2cm" svg:y="1.6cm" presentation:class="title" presentation:placeholder="true">
        <draw:text-box/>
      </draw:frame>
      <draw:frame presentation:style-name="Freshes-outline1" draw:layer="backgroundobjects" svg:width="19cm" svg:height="5.5cm" svg:x="2cm" svg:y="9.2cm" presentation:class="outline" presentation:placeholder="true">
        <draw:text-box/>
      </draw:frame>
      <presentation:notes style:page-layout-name="PM0">
        <draw:page-thumbnail presentation:style-name="Freshes-title" draw:layer="backgroundobjects" svg:width="17cm" svg:height="9.56cm" svg:x="2cm" svg:y="2.5cm" presentation:class="page"/>
        <draw:frame presentation:style-name="Freshes-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One_20_Bullet" style:display-name="One Bullet"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6" draw:layer="backgroundobjects" svg:width="28cm" svg:height="15.75cm" svg:x="0cm" svg:y="0cm">
        <text:p/>
        <draw:enhanced-geometry svg:viewBox="0 0 21600 21600" draw:type="rectangle" draw:enhanced-path="M 0 0 L 21600 0 21600 21600 0 21600 0 0 Z N"/>
      </draw:custom-shape>
      <draw:frame presentation:style-name="One_20_Bullet-title" draw:layer="backgroundobjects" svg:width="25cm" svg:height="2.6cm" svg:x="1.5cm" svg:y="0.6cm" presentation:class="title" presentation:placeholder="true">
        <draw:text-box/>
      </draw:frame>
      <draw:frame presentation:style-name="One_20_Bullet-outline1" draw:layer="backgroundobjects" svg:width="25.2cm" svg:height="9.132cm" svg:x="1.4cm" svg:y="3.685cm" presentation:class="outline" presentation:placeholder="true">
        <draw:text-box/>
      </draw:frame>
      <draw:frame presentation:style-name="Mpr3" draw:text-style-name="MP2" draw:layer="backgroundobjects" svg:width="6.52cm" svg:height="0.674cm" svg:x="1.4cm" svg:y="14.8cm" presentation:class="date-time">
        <draw:text-box>
          <text:p text:style-name="MP1"><text:span text:style-name="MT2"><presentation:date-time/></text:span></text:p>
        </draw:text-box>
      </draw:frame>
      <draw:frame presentation:style-name="Mpr3" draw:text-style-name="MP8" draw:layer="backgroundobjects" svg:width="9cm" svg:height="0.674cm" svg:x="9.5cm" svg:y="14.8cm" presentation:class="footer">
        <draw:text-box>
          <text:p text:style-name="MP7"><text:span text:style-name="MT3"><presentation:footer/></text:span></text:p>
        </draw:text-box>
      </draw:frame>
      <draw:frame presentation:style-name="Mpr3" draw:text-style-name="MP4" draw:layer="backgroundobjects" svg:width="6.52cm" svg:height="0.674cm" svg:x="20.08cm" svg:y="14.8cm" presentation:class="page-number">
        <draw:text-box>
          <text:p text:style-name="MP3"><text:span text:style-name="MT2"><text:page-number>&lt;numéro&gt;</text:page-number></text:span></text:p>
        </draw:text-box>
      </draw:frame>
      <presentation:notes style:page-layout-name="PM0">
        <draw:page-thumbnail presentation:style-name="One_20_Bullet-title" draw:layer="backgroundobjects" svg:width="17cm" svg:height="9.56cm" svg:x="2cm" svg:y="2.5cm" presentation:class="page"/>
        <draw:frame presentation:style-name="One_20_Bulle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wo_20_Bullets" style:display-name="Two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6.855cm" svg:height="15.75cm" svg:x="0cm" svg:y="0cm">
        <draw:image xlink:href="Pictures/10000000000002D50000067FA0EA658A.jpg" xlink:type="simple" xlink:show="embed" xlink:actuate="onLoad" draw:mime-type="image/jpeg">
          <text:p/>
        </draw:image>
      </draw:frame>
      <draw:frame presentation:style-name="Two_20_Bullets-title" draw:layer="backgroundobjects" svg:width="19.5cm" svg:height="2.628cm" svg:x="7cm" svg:y="0.6cm" presentation:class="title" presentation:placeholder="true">
        <draw:text-box/>
      </draw:frame>
      <draw:frame presentation:style-name="Two_20_Bullets-outline1" draw:layer="backgroundobjects" svg:width="19.5cm" svg:height="9.132cm" svg:x="7cm" svg:y="3.685cm" presentation:class="outline" presentation:placeholder="true">
        <draw:text-box/>
      </draw:frame>
      <draw:frame presentation:style-name="Mpr6" draw:text-style-name="MP2" draw:layer="backgroundobjects" svg:width="6.52cm" svg:height="0.674cm" svg:x="1.4cm" svg:y="14.8cm" presentation:class="date-time">
        <draw:text-box>
          <text:p text:style-name="MP1"><text:span text:style-name="MT2"><presentation:date-time/></text:span></text:p>
        </draw:text-box>
      </draw:frame>
      <draw:frame presentation:style-name="Mpr6" draw:text-style-name="MP8" draw:layer="backgroundobjects" svg:width="9cm" svg:height="0.674cm" svg:x="9.5cm" svg:y="14.8cm" presentation:class="footer">
        <draw:text-box>
          <text:p text:style-name="MP7"><text:span text:style-name="MT3"><presentation:footer/></text:span></text:p>
        </draw:text-box>
      </draw:frame>
      <draw:frame presentation:style-name="Mpr6"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Two_20_Bullets-title" draw:layer="backgroundobjects" svg:width="17cm" svg:height="9.56cm" svg:x="2cm" svg:y="2.5cm" presentation:class="page"/>
        <draw:frame presentation:style-name="Two_20_Bullet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hree_20_Bullets" style:display-name="Three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6" draw:text-style-name="MP5" draw:layer="backgroundobjects" svg:width="6.856cm" svg:height="28cm" draw:transform="rotate (1.5707963267949) translate (0cm 6.856cm)">
        <draw:image xlink:href="Pictures/10000000000001980000067F56384566.jpg" xlink:type="simple" xlink:show="embed" xlink:actuate="onLoad" draw:mime-type="image/jpeg">
          <text:p/>
        </draw:image>
      </draw:frame>
      <draw:frame presentation:style-name="Three_20_Bullets-title" draw:layer="backgroundobjects" svg:width="25.2cm" svg:height="5cm" svg:x="1.4cm" svg:y="0.9cm" presentation:class="title" presentation:placeholder="true">
        <draw:text-box/>
      </draw:frame>
      <draw:frame presentation:style-name="Three_20_Bullets-outline1" draw:layer="backgroundobjects" svg:width="25.2cm" svg:height="7cm" svg:x="1.4cm" svg:y="7cm" presentation:class="outline" presentation:placeholder="true">
        <draw:text-box/>
      </draw:frame>
      <draw:frame presentation:style-name="Mpr9" draw:text-style-name="MP2" draw:layer="backgroundobjects" svg:width="6.52cm" svg:height="0.674cm" svg:x="1.4cm" svg:y="14.8cm" presentation:class="date-time">
        <draw:text-box>
          <text:p text:style-name="MP1"><text:span text:style-name="MT1"><presentation:date-time/></text:span></text:p>
        </draw:text-box>
      </draw:frame>
      <draw:frame presentation:style-name="Mpr9" draw:text-style-name="MP8" draw:layer="backgroundobjects" svg:width="9cm" svg:height="0.674cm" svg:x="9.5cm" svg:y="14.8cm" presentation:class="footer">
        <draw:text-box>
          <text:p text:style-name="MP7"><text:span text:style-name="MT3"><presentation:footer/></text:span></text:p>
        </draw:text-box>
      </draw:frame>
      <draw:frame presentation:style-name="Mpr9"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Three_20_Bullets-title" draw:layer="backgroundobjects" svg:width="17cm" svg:height="9.56cm" svg:x="2cm" svg:y="2.5cm" presentation:class="page"/>
        <draw:frame presentation:style-name="Three_20_Bullets-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Four_20_Bullets" style:display-name="Four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11.4cm" svg:height="6.094cm" svg:x="16.6cm" svg:y="9.654cm">
        <draw:image xlink:href="Pictures/10000000000006D7000003A64625AE57.jpg" xlink:type="simple" xlink:show="embed" xlink:actuate="onLoad" draw:mime-type="image/jpeg">
          <text:p/>
        </draw:image>
      </draw:frame>
      <draw:frame draw:style-name="Mgr5" draw:text-style-name="MP5" draw:layer="backgroundobjects" svg:width="7.62cm" svg:height="5.587cm" svg:x="16.6cm" svg:y="0cm">
        <draw:image xlink:href="Pictures/1000000000000491000003595F7E172A.jpg" xlink:type="simple" xlink:show="embed" xlink:actuate="onLoad" draw:mime-type="image/jpeg">
          <text:p/>
        </draw:image>
      </draw:frame>
      <draw:frame presentation:style-name="Four_20_Bullets-title" draw:layer="backgroundobjects" svg:width="15.8cm" svg:height="2.628cm" svg:x="0.8cm" svg:y="0.6cm" presentation:class="title" presentation:placeholder="true">
        <draw:text-box/>
      </draw:frame>
      <draw:frame presentation:style-name="Four_20_Bullets-outline1" draw:layer="backgroundobjects" svg:width="15.8cm" svg:height="10.5cm" svg:x="0.8cm" svg:y="3.685cm" presentation:class="outline" presentation:placeholder="true">
        <draw:text-box/>
      </draw:frame>
      <draw:frame presentation:style-name="Mpr12" draw:text-style-name="MP2" draw:layer="backgroundobjects" svg:width="6.52cm" svg:height="0.674cm" svg:x="1.4cm" svg:y="14.8cm" presentation:class="date-time">
        <draw:text-box>
          <text:p text:style-name="MP1"><text:span text:style-name="MT1"><presentation:date-time/></text:span></text:p>
        </draw:text-box>
      </draw:frame>
      <draw:frame presentation:style-name="Mpr12" draw:text-style-name="MP8" draw:layer="backgroundobjects" svg:width="9cm" svg:height="0.674cm" svg:x="9.5cm" svg:y="14.8cm" presentation:class="footer">
        <draw:text-box>
          <text:p text:style-name="MP7"><text:span text:style-name="MT3"><presentation:footer/></text:span></text:p>
        </draw:text-box>
      </draw:frame>
      <draw:frame presentation:style-name="Mpr12"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Four_20_Bullets-title" draw:layer="backgroundobjects" svg:width="17cm" svg:height="9.56cm" svg:x="2cm" svg:y="2.5cm" presentation:class="page"/>
        <draw:frame presentation:style-name="Four_20_Bullets-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ue_2f_White_20_Chart" style:display-name="Blue/White Chart"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7" draw:text-style-name="MP9" draw:layer="backgroundobjects" svg:width="10cm" svg:height="1.6cm" svg:x="0cm" svg:y="1cm">
        <text:p/>
        <draw:enhanced-geometry svg:viewBox="0 0 21600 21600" draw:type="rectangle" draw:enhanced-path="M 0 0 L 21600 0 21600 21600 0 21600 0 0 Z N"/>
      </draw:custom-shape>
      <draw:frame presentation:style-name="Blue_2f_White_20_Chart-title" draw:layer="backgroundobjects" svg:width="9.8cm" svg:height="2cm" svg:x="0cm" svg:y="0.8cm" presentation:class="title" presentation:placeholder="true">
        <draw:text-box/>
      </draw:frame>
      <draw:frame presentation:style-name="Blue_2f_White_20_Chart-outline1" draw:layer="backgroundobjects" svg:width="25.2cm" svg:height="10.5cm" svg:x="1.4cm" svg:y="3.5cm" presentation:class="outline" presentation:placeholder="true">
        <draw:text-box/>
      </draw:frame>
      <draw:frame presentation:style-name="Mpr15" draw:text-style-name="MP2" draw:layer="backgroundobjects" svg:width="6.52cm" svg:height="0.674cm" svg:x="1.4cm" svg:y="14.8cm" presentation:class="date-time">
        <draw:text-box>
          <text:p text:style-name="MP1"><text:span text:style-name="MT2"><presentation:date-time/></text:span></text:p>
        </draw:text-box>
      </draw:frame>
      <draw:frame presentation:style-name="Mpr15" draw:text-style-name="MP8" draw:layer="backgroundobjects" svg:width="9cm" svg:height="0.674cm" svg:x="9.5cm" svg:y="14.8cm" presentation:class="footer">
        <draw:text-box>
          <text:p text:style-name="MP7"><text:span text:style-name="MT3"><presentation:footer/></text:span></text:p>
        </draw:text-box>
      </draw:frame>
      <draw:frame presentation:style-name="Mpr15" draw:text-style-name="MP4" draw:layer="backgroundobjects" svg:width="6.52cm" svg:height="0.674cm" svg:x="20.08cm" svg:y="14.8cm" presentation:class="page-number">
        <draw:text-box>
          <text:p text:style-name="MP3"><text:span text:style-name="MT2"><text:page-number>&lt;numéro&gt;</text:page-number></text:span></text:p>
        </draw:text-box>
      </draw:frame>
      <presentation:notes style:page-layout-name="PM0">
        <draw:page-thumbnail presentation:style-name="Blue_2f_White_20_Chart-title" draw:layer="backgroundobjects" svg:width="17cm" svg:height="9.56cm" svg:x="2cm" svg:y="2.5cm" presentation:class="page"/>
        <draw:frame presentation:style-name="Blue_2f_White_20_Chart-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White_2f_Blue_20_Chart" style:display-name="White/Blue Char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10cm" svg:height="1.6cm" svg:x="0cm" svg:y="1cm">
        <text:p/>
        <draw:enhanced-geometry svg:viewBox="0 0 21600 21600" draw:type="rectangle" draw:enhanced-path="M 0 0 L 21600 0 21600 21600 0 21600 0 0 Z N"/>
      </draw:custom-shape>
      <draw:frame presentation:style-name="White_2f_Blue_20_Chart-title" draw:layer="backgroundobjects" svg:width="9.8cm" svg:height="2cm" svg:x="0cm" svg:y="0.8cm" presentation:class="title" presentation:placeholder="true">
        <draw:text-box/>
      </draw:frame>
      <draw:frame presentation:style-name="White_2f_Blue_20_Chart-outline1" draw:layer="backgroundobjects" svg:width="25.2cm" svg:height="10.5cm" svg:x="1.4cm" svg:y="3.5cm" presentation:class="outline" presentation:placeholder="true">
        <draw:text-box/>
      </draw:frame>
      <draw:frame presentation:style-name="Mpr18" draw:text-style-name="MP2" draw:layer="backgroundobjects" svg:width="6.52cm" svg:height="0.674cm" svg:x="1.4cm" svg:y="14.8cm" presentation:class="date-time">
        <draw:text-box>
          <text:p text:style-name="MP1"><text:span text:style-name="MT1"><presentation:date-time/></text:span></text:p>
        </draw:text-box>
      </draw:frame>
      <draw:frame presentation:style-name="Mpr18" draw:text-style-name="MP8" draw:layer="backgroundobjects" svg:width="9cm" svg:height="0.674cm" svg:x="9.5cm" svg:y="14.8cm" presentation:class="footer">
        <draw:text-box>
          <text:p text:style-name="MP7"><text:span text:style-name="MT3"><presentation:footer/></text:span></text:p>
        </draw:text-box>
      </draw:frame>
      <draw:frame presentation:style-name="Mpr18"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White_2f_Blue_20_Chart-title" draw:layer="backgroundobjects" svg:width="17cm" svg:height="9.56cm" svg:x="2cm" svg:y="2.5cm" presentation:class="page"/>
        <draw:frame presentation:style-name="White_2f_Blue_20_Chart-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iagram"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9" draw:text-style-name="MP10" draw:layer="backgroundobjects" svg:width="6.857cm" svg:height="15.75cm" draw:transform="rotate (-3.14159265358979) translate (28cm 15.75cm)" svg:viewBox="0 0 6858 15751" svg:d="M0 15751c0-5250 0-10501 0-15751 677 0 4572 0 6858 0-2253 5250-4505 10501-6758 15751-33 0 577 0-100 0z">
        <text:p/>
      </draw:path>
      <draw:path draw:style-name="Mgr9" draw:text-style-name="MP10" draw:layer="backgroundobjects" svg:width="6.857cm" svg:height="15.75cm" svg:x="0cm" svg:y="0cm" svg:viewBox="0 0 6858 15751" svg:d="M0 15751c0-5250 0-10501 0-15751 677 0 4572 0 6858 0-2253 5250-4505 10501-6758 15751-33 0 577 0-100 0z">
        <text:p/>
      </draw:path>
      <draw:frame presentation:style-name="Diagram-title" draw:layer="backgroundobjects" svg:width="25.2cm" svg:height="3cm" svg:x="1.4cm" svg:y="0.6cm" presentation:class="title" presentation:placeholder="true">
        <draw:text-box/>
      </draw:frame>
      <draw:frame presentation:style-name="Diagram-outline1" draw:layer="backgroundobjects" svg:width="25.2cm" svg:height="10cm" svg:x="1.4cm" svg:y="4cm" presentation:class="outline" presentation:placeholder="true">
        <draw:text-box/>
      </draw:frame>
      <draw:frame presentation:style-name="Mpr21" draw:text-style-name="MP2" draw:layer="backgroundobjects" svg:width="6.52cm" svg:height="0.674cm" svg:x="1.4cm" svg:y="14.8cm" presentation:class="date-time">
        <draw:text-box>
          <text:p text:style-name="MP1"><text:span text:style-name="MT1"><presentation:date-time/></text:span></text:p>
        </draw:text-box>
      </draw:frame>
      <draw:frame presentation:style-name="Mpr21" draw:text-style-name="MP8" draw:layer="backgroundobjects" svg:width="9cm" svg:height="0.674cm" svg:x="9.5cm" svg:y="14.8cm" presentation:class="footer">
        <draw:text-box>
          <text:p text:style-name="MP7"><text:span text:style-name="MT3"><presentation:footer/></text:span></text:p>
        </draw:text-box>
      </draw:frame>
      <draw:frame presentation:style-name="Mpr21" draw:text-style-name="MP4" draw:layer="backgroundobjects" svg:width="6.52cm" svg:height="0.674cm" svg:x="20.08cm" svg:y="14.8cm" presentation:class="page-number">
        <draw:text-box>
          <text:p text:style-name="MP3"><text:span text:style-name="MT2"><text:page-number>&lt;numéro&gt;</text:page-number></text:span></text:p>
        </draw:text-box>
      </draw:frame>
      <presentation:notes style:page-layout-name="PM0">
        <draw:page-thumbnail presentation:style-name="Diagram-title" draw:layer="backgroundobjects" svg:width="17cm" svg:height="9.56cm" svg:x="2cm" svg:y="2.5cm" presentation:class="page"/>
        <draw:frame presentation:style-name="Diagram-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ab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8" draw:text-style-name="MP10" draw:layer="backgroundobjects" svg:width="28cm" svg:height="4.571cm" svg:x="0cm" svg:y="0cm" svg:viewBox="0 0 28001 4572" draw:points="0,4572 0,0 28001,0">
        <text:p/>
      </draw:polygon>
      <draw:polygon draw:style-name="Mgr8" draw:text-style-name="MP10" draw:layer="backgroundobjects" svg:width="16.6cm" svg:height="2.3cm" svg:x="11.4cm" svg:y="13.45cm" svg:viewBox="0 0 16601 2301" draw:points="0,2301 16601,2301 16601,0">
        <text:p/>
      </draw:polygon>
      <draw:frame presentation:style-name="Table-title" draw:layer="backgroundobjects" svg:width="25.2cm" svg:height="3cm" svg:x="1.4cm" svg:y="0.6cm" presentation:class="title" presentation:placeholder="true">
        <draw:text-box/>
      </draw:frame>
      <draw:frame presentation:style-name="Table-outline1" draw:layer="backgroundobjects" svg:width="25.19cm" svg:height="9.132cm" svg:x="1.4cm" svg:y="3.685cm" presentation:class="outline" presentation:placeholder="true">
        <draw:text-box/>
      </draw:frame>
      <draw:frame presentation:style-name="Mpr24" draw:text-style-name="MP2" draw:layer="backgroundobjects" svg:width="6.52cm" svg:height="0.674cm" svg:x="1.4cm" svg:y="14.8cm" presentation:class="date-time">
        <draw:text-box>
          <text:p text:style-name="MP1"><text:span text:style-name="MT1"><presentation:date-time/></text:span></text:p>
        </draw:text-box>
      </draw:frame>
      <draw:frame presentation:style-name="Mpr24" draw:text-style-name="MP8" draw:layer="backgroundobjects" svg:width="9cm" svg:height="0.674cm" svg:x="9.5cm" svg:y="14.8cm" presentation:class="footer">
        <draw:text-box>
          <text:p text:style-name="MP7"><text:span text:style-name="MT3"><presentation:footer/></text:span></text:p>
        </draw:text-box>
      </draw:frame>
      <draw:frame presentation:style-name="Mpr24" draw:text-style-name="MP4" draw:layer="backgroundobjects" svg:width="6.52cm" svg:height="0.674cm" svg:x="20.08cm" svg:y="14.8cm" presentation:class="page-number">
        <draw:text-box>
          <text:p text:style-name="MP3"><text:span text:style-name="MT2"><text:page-number>&lt;numéro&gt;</text:page-number></text:span></text:p>
        </draw:text-box>
      </draw:frame>
      <presentation:notes style:page-layout-name="PM0">
        <draw:page-thumbnail presentation:style-name="Table-title" draw:layer="backgroundobjects" svg:width="17cm" svg:height="9.56cm" svg:x="2cm" svg:y="2.5cm" presentation:class="page"/>
        <draw:frame presentation:style-name="Table-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Left_20_Bar" style:display-name="Left Ba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0cm" svg:y="0cm">
        <text:p/>
        <draw:enhanced-geometry svg:viewBox="0 0 21600 21600" draw:type="rectangle" draw:enhanced-path="M 0 0 L 21600 0 21600 21600 0 21600 0 0 Z N"/>
      </draw:custom-shape>
      <draw:frame presentation:style-name="Left_20_Bar-title" draw:layer="backgroundobjects" svg:width="14cm" svg:height="3.5cm" draw:transform="rotate (1.5707963267949) translate (0.5cm 14.75cm)" presentation:class="title" presentation:placeholder="true">
        <draw:text-box/>
      </draw:frame>
      <draw:frame presentation:style-name="Left_20_Bar-outline1" draw:layer="backgroundobjects" svg:width="21cm" svg:height="13cm" svg:x="5.5cm" svg:y="0.5cm" presentation:class="outline" presentation:placeholder="true">
        <draw:text-box/>
      </draw:frame>
      <draw:frame presentation:style-name="Mpr27" draw:text-style-name="MP2" draw:layer="backgroundobjects" svg:width="6.52cm" svg:height="0.674cm" svg:x="1.4cm" svg:y="14.8cm" presentation:class="date-time">
        <draw:text-box>
          <text:p text:style-name="MP1"><text:span text:style-name="MT2"><presentation:date-time/></text:span></text:p>
        </draw:text-box>
      </draw:frame>
      <draw:frame presentation:style-name="Mpr27" draw:text-style-name="MP8" draw:layer="backgroundobjects" svg:width="9cm" svg:height="0.674cm" svg:x="9.5cm" svg:y="14.8cm" presentation:class="footer">
        <draw:text-box>
          <text:p text:style-name="MP7"><text:span text:style-name="MT3"><presentation:footer/></text:span></text:p>
        </draw:text-box>
      </draw:frame>
      <draw:frame presentation:style-name="Mpr27"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Left_20_Bar-title" draw:layer="backgroundobjects" svg:width="17cm" svg:height="9.56cm" svg:x="2cm" svg:y="2.5cm" presentation:class="page"/>
        <draw:frame presentation:style-name="Left_20_Bar-notes" draw:layer="backgroundobjects" svg:width="17cm" svg:height="14cm" svg:x="2cm" svg:y="13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Right_20_Bar" style:display-name="Right Ba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23.5cm" svg:y="0cm">
        <text:p/>
        <draw:enhanced-geometry svg:viewBox="0 0 21600 21600" draw:type="rectangle" draw:enhanced-path="M 0 0 L 21600 0 21600 21600 0 21600 0 0 Z N"/>
      </draw:custom-shape>
      <draw:frame presentation:style-name="Right_20_Bar-title" draw:layer="backgroundobjects" svg:width="14cm" svg:height="3.5cm" draw:transform="rotate (-1.5707963267949) translate (27.5cm 0.5cm)" presentation:class="title" presentation:placeholder="true">
        <draw:text-box/>
      </draw:frame>
      <draw:frame presentation:style-name="Right_20_Bar-outline1" draw:layer="backgroundobjects" svg:width="21cm" svg:height="13cm" svg:x="0.5cm" svg:y="0.5cm" presentation:class="outline" presentation:placeholder="true">
        <draw:text-box/>
      </draw:frame>
      <draw:frame presentation:style-name="Mpr30" draw:text-style-name="MP2" draw:layer="backgroundobjects" svg:width="6.52cm" svg:height="0.674cm" svg:x="1.4cm" svg:y="14.8cm" presentation:class="date-time">
        <draw:text-box>
          <text:p text:style-name="MP1"><text:span text:style-name="MT1"><presentation:date-time/></text:span></text:p>
        </draw:text-box>
      </draw:frame>
      <draw:frame presentation:style-name="Mpr30" draw:text-style-name="MP8" draw:layer="backgroundobjects" svg:width="9cm" svg:height="0.674cm" svg:x="9.5cm" svg:y="14.8cm" presentation:class="footer">
        <draw:text-box>
          <text:p text:style-name="MP7"><text:span text:style-name="MT3"><presentation:footer/></text:span></text:p>
        </draw:text-box>
      </draw:frame>
      <draw:frame presentation:style-name="Mpr30" draw:text-style-name="MP4" draw:layer="backgroundobjects" svg:width="6.52cm" svg:height="0.674cm" svg:x="20.08cm" svg:y="14.8cm" presentation:class="page-number">
        <draw:text-box>
          <text:p text:style-name="MP3"><text:span text:style-name="MT2"><text:page-number>&lt;numéro&gt;</text:page-number></text:span></text:p>
        </draw:text-box>
      </draw:frame>
      <presentation:notes style:page-layout-name="PM0">
        <draw:page-thumbnail presentation:style-name="Right_20_Bar-title" draw:layer="backgroundobjects" svg:width="17cm" svg:height="9.56cm" svg:x="2cm" svg:y="2.5cm" presentation:class="page"/>
        <draw:frame presentation:style-name="Right_20_Bar-notes" draw:layer="backgroundobjects" svg:width="17cm" svg:height="14cm" svg:x="2cm" svg:y="13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Freshes</dc:title>
    <dc:description>
               Freshes - LibreOffice Impress Template
                        by Risyad Rais

Freshes Template is supposed to be a template for LibreOffice
Impress. But I guess calling it a placeholder or sample slides might be even
more suitable since it's not really optimized properly for LibreOffice Impress
Workflow.
This template is made as an answer to Indonesian LibreOffice Community and
Gimpscape ID's call-to-arms to contribute to the 10th anniversary of
LibreOffice celebration.
##How to
###Normal slides
1. Duplicate the slide you want to edit
2. Edit the texts
3. Rearrange the slides and remove the ones you don't need
###Icons
To change icons, go to: "Insert -&gt; Special Character"
and choose the one you like.
###Chart slides
1. Double click the chart
2. Edit Data Table
##Features
1. A fresh looking first and last slide with huge typography
2. Covered single bullet to four bullets slides
3. Charts available in two styles: Collumns and Lines
4. A very mediocre looking Diagram and Table slide
5. Timeline slides
6. Super simple Closing slide
If you tried this and have any suggestions, feel free to send a mail: satmo54[at]gmail[dot]com
##Acknowledgements
Here's some resources I used to make this template:
###Images
Images used here are licensed under [Unsplash License](https://unsplash.com/license).
1. [White clouds and blue skies](https://unsplash.com/photos/DbwYNr8RPbg) by Resul on Unsplash.
2. [Four on flight hot air balloons](https://unsplash.com/photos/HcuKlhq4osM) by C.Valdez on Unsplash.
##License
This template is released under CC by SA 4.0 License. Other resources used in
this template have their own respective licenses you might want to check.
    </dc:description>
    <meta:generator>LibreOffice/25.2.4.3$Linux_X86_64 LibreOffice_project/520$Build-3</meta:generator>
    <meta:creation-date>2025-05-04T08:37:27.076370469</meta:creation-date>
    <meta:editing-duration>PT19H49M34S</meta:editing-duration>
    <meta:editing-cycles>231</meta:editing-cycles>
    <dc:date>2025-07-18T15:19:42.608585924</dc:date>
    <meta:print-date>2025-05-11T19:36:35.128596092</meta:print-date>
    <meta:printed-by>Fichiers PDF</meta:printed-by>
    <meta:document-statistic meta:object-count="1777"/>
  </office:meta>
</office:document-meta>
</file>

<file path=Object 1/content.xml><?xml version="1.0" encoding="utf-8"?>
<math xmlns="http://www.w3.org/1998/Math/MathML" display="block">
  <semantics>
    <mrow>
      <mover accent="true">
        <msup>
          <mi>X</mi>
          <mrow>
            <mi>t</mi>
            <mo stretchy="false">+</mo>
            <mn>1</mn>
          </mrow>
        </msup>
        <mo stretchy="false">^</mo>
      </mover>
      <mo stretchy="false">=</mo>
      <mrow>
        <msup>
          <mi>X</mi>
          <mi>t</mi>
        </msup>
        <mo stretchy="false">+</mo>
        <mover accent="true">
          <msubsup>
            <mi>y</mi>
            <mi>i</mi>
            <mi>G</mi>
          </msubsup>
          <mo stretchy="false">^</mo>
        </mover>
      </mrow>
    </mrow>
    <annotation encoding="StarMath 5.0">hat X^{t+1} = X^{t} + hat y^{G}_i</annotation>
  </semantics>
</math>
</file>

<file path=Object 10/content.xml><?xml version="1.0" encoding="utf-8"?>
<math xmlns="http://www.w3.org/1998/Math/MathML" display="block">
  <semantics>
    <msubsup>
      <mi>v</mi>
      <mi>s</mi>
      <mi>G</mi>
    </msubsup>
    <annotation encoding="StarMath 5.0">v^G_s </annotation>
  </semantics>
</math>
</file>

<file path=Object 11/content.xml><?xml version="1.0" encoding="utf-8"?>
<math xmlns="http://www.w3.org/1998/Math/MathML" display="block">
  <semantics>
    <mrow>
      <msubsup>
        <mi>v</mi>
        <mi>i</mi>
        <mi>M</mi>
      </msubsup>
      <mo stretchy="false">←</mo>
      <mrow>
        <msubsup>
          <mi>v</mi>
          <mi>i</mi>
          <mi>M</mi>
        </msubsup>
        <mo stretchy="false">+</mo>
        <msubsup>
          <mi>v</mi>
          <mi>i</mi>
          <mi>M</mi>
        </msubsup>
      </mrow>
      <mi>'</mi>
    </mrow>
    <annotation encoding="StarMath 5.0">v^M_i leftarrow v^M_i + v^M_i'
</annotation>
  </semantics>
</math>
</file>

<file path=Object 12/content.xml><?xml version="1.0" encoding="utf-8"?>
<math xmlns="http://www.w3.org/1998/Math/MathML" display="block">
  <semantics>
    <mrow>
      <msubsup>
        <mi>e</mi>
        <mrow>
          <msubsup>
            <mi>v</mi>
            <mi>s</mi>
            <mi>G</mi>
          </msubsup>
          <mo stretchy="false">→</mo>
          <msubsup>
            <mi>v</mi>
            <mi>r</mi>
            <mi>G</mi>
          </msubsup>
        </mrow>
        <mi>G</mi>
      </msubsup>
      <mo stretchy="false">←</mo>
      <mrow>
        <msubsup>
          <mi>e</mi>
          <mrow>
            <msubsup>
              <mi>v</mi>
              <mi>s</mi>
              <mi>G</mi>
            </msubsup>
            <mo stretchy="false">→</mo>
            <msubsup>
              <mi>v</mi>
              <mi>r</mi>
              <mi>G</mi>
            </msubsup>
          </mrow>
          <mi>G</mi>
        </msubsup>
        <mo stretchy="false">+</mo>
        <msubsup>
          <mi>e</mi>
          <mrow>
            <msubsup>
              <mi>v</mi>
              <mi>s</mi>
              <mi>G</mi>
            </msubsup>
            <mo stretchy="false">→</mo>
            <msubsup>
              <mi>v</mi>
              <mi>r</mi>
              <mi>G</mi>
            </msubsup>
          </mrow>
          <mi>G</mi>
        </msubsup>
      </mrow>
      <mi>'</mi>
    </mrow>
    <annotation encoding="StarMath 5.0">e^G_{v^G_s toward v^G_r} leftarrow e^G_{v^G_s toward v^G_r} + e^G_{v^G_s toward v^G_r}'</annotation>
  </semantics>
</math>
</file>

<file path=Object 13/content.xml><?xml version="1.0" encoding="utf-8"?>
<math xmlns="http://www.w3.org/1998/Math/MathML" display="block">
  <semantics>
    <mrow>
      <mrow>
        <mover accent="true">
          <msup>
            <mi>X</mi>
            <mrow>
              <mi>t</mi>
              <mo stretchy="false">+</mo>
              <mn>1</mn>
            </mrow>
          </msup>
          <mo stretchy="false">^</mo>
        </mover>
        <mo stretchy="false">=</mo>
        <mover accent="true">
          <msubsup>
            <mi>y</mi>
            <mi>i</mi>
            <mi>G</mi>
          </msubsup>
          <mo stretchy="false">^</mo>
        </mover>
        <mo stretchy="false">=</mo>
        <msubsup>
          <mi mathvariant="italic">MLP</mi>
          <msup>
            <mi>ν</mi>
            <mi>G</mi>
          </msup>
          <mi mathvariant="italic">output</mi>
        </msubsup>
      </mrow>
      <mrow>
        <mo fence="true" form="prefix" stretchy="false">(</mo>
        <mrow>
          <msubsup>
            <mi>v</mi>
            <mi>i</mi>
            <mi>G</mi>
          </msubsup>
        </mrow>
        <mo fence="true" form="postfix" stretchy="false">)</mo>
      </mrow>
    </mrow>
    <annotation encoding="StarMath 5.0">hat X^{t+1} = hat y^{G}_i = MLP^{output}_{%inu^G}(v^{G}_{i} )</annotation>
  </semantics>
</math>
</file>

<file path=Object 14/content.xml><?xml version="1.0" encoding="utf-8"?>
<math xmlns="http://www.w3.org/1998/Math/MathML" display="block">
  <semantics>
    <msubsup>
      <mi>v</mi>
      <mi>r</mi>
      <mi>G</mi>
    </msubsup>
    <annotation encoding="StarMath 5.0">v^G_r </annotation>
  </semantics>
</math>
</file>

<file path=Object 15/content.xml><?xml version="1.0" encoding="utf-8"?>
<math xmlns="http://www.w3.org/1998/Math/MathML" display="block">
  <semantics>
    <msubsup>
      <mi>e</mi>
      <mrow>
        <msubsup>
          <mi>v</mi>
          <mi>s</mi>
          <mi>G</mi>
        </msubsup>
        <mo stretchy="false">→</mo>
        <msubsup>
          <mi>v</mi>
          <mi>r</mi>
          <mi>G</mi>
        </msubsup>
      </mrow>
      <mi>G</mi>
    </msubsup>
    <annotation encoding="StarMath 5.0">e^G_{v^G_s toward v^G_r}</annotation>
  </semantics>
</math>
</file>

<file path=Object 16/content.xml><?xml version="1.0" encoding="utf-8"?>
<math xmlns="http://www.w3.org/1998/Math/MathML" display="block">
  <semantics>
    <msubsup>
      <mi>e</mi>
      <mrow>
        <msubsup>
          <mi>v</mi>
          <msub>
            <mi>s</mi>
            <mn>2</mn>
          </msub>
          <mi>G</mi>
        </msubsup>
        <mo stretchy="false">→</mo>
        <msubsup>
          <mi>v</mi>
          <mi>i</mi>
          <mi>G</mi>
        </msubsup>
      </mrow>
      <mi>G</mi>
    </msubsup>
    <annotation encoding="StarMath 5.0">e^G_{v^G_{s_2} toward v^G_i}</annotation>
  </semantics>
</math>
</file>

<file path=Object 17/content.xml><?xml version="1.0" encoding="utf-8"?>
<math xmlns="http://www.w3.org/1998/Math/MathML" display="block">
  <semantics>
    <msubsup>
      <mi>e</mi>
      <mrow>
        <msubsup>
          <mi>v</mi>
          <msub>
            <mi>s</mi>
            <mn>3</mn>
          </msub>
          <mi>G</mi>
        </msubsup>
        <mo stretchy="false">→</mo>
        <msubsup>
          <mi>v</mi>
          <mi>i</mi>
          <mi>G</mi>
        </msubsup>
      </mrow>
      <mi>G</mi>
    </msubsup>
    <annotation encoding="StarMath 5.0">e^G_{v^G_{s_3} toward v^G_i}</annotation>
  </semantics>
</math>
</file>

<file path=Object 18/content.xml><?xml version="1.0" encoding="utf-8"?>
<math xmlns="http://www.w3.org/1998/Math/MathML" display="block">
  <semantics>
    <msubsup>
      <mi>e</mi>
      <mrow>
        <msubsup>
          <mi>v</mi>
          <msub>
            <mi>s</mi>
            <mn>1</mn>
          </msub>
          <mi>G</mi>
        </msubsup>
        <mo stretchy="false">→</mo>
        <msubsup>
          <mi>v</mi>
          <mi>i</mi>
          <mi>G</mi>
        </msubsup>
      </mrow>
      <mi>G</mi>
    </msubsup>
    <annotation encoding="StarMath 5.0">e^G_{v^G_{s_1} toward v^G_i}</annotation>
  </semantics>
</math>
</file>

<file path=Object 19/content.xml><?xml version="1.0" encoding="utf-8"?>
<math xmlns="http://www.w3.org/1998/Math/MathML" display="block">
  <semantics>
    <msubsup>
      <mi>e</mi>
      <mrow>
        <msubsup>
          <mi>v</mi>
          <msub>
            <mi>s</mi>
            <mn>0</mn>
          </msub>
          <mi>G</mi>
        </msubsup>
        <mo stretchy="false">→</mo>
        <msubsup>
          <mi>v</mi>
          <mi>i</mi>
          <mi>G</mi>
        </msubsup>
      </mrow>
      <mi>G</mi>
    </msubsup>
    <annotation encoding="StarMath 5.0">e^G_{v^G_{s_0} toward v^G_i}</annotation>
  </semantics>
</math>
</file>

<file path=Object 2/content.xml><?xml version="1.0" encoding="utf-8"?>
<math xmlns="http://www.w3.org/1998/Math/MathML" display="block">
  <semantics>
    <mrow>
      <mrow>
        <msubsup>
          <mi>v</mi>
          <mi>i</mi>
          <mi>G</mi>
        </msubsup>
        <mo stretchy="false">=</mo>
        <msubsup>
          <mi mathvariant="italic">MLP</mi>
          <msup>
            <mi>ν</mi>
            <mi>G</mi>
          </msup>
          <mi mathvariant="italic">embedder</mi>
        </msubsup>
      </mrow>
      <mrow>
        <mo fence="true" form="prefix" stretchy="false">(</mo>
        <mrow>
          <msubsup>
            <mi>v</mi>
            <mi>i</mi>
            <mrow>
              <mi>G</mi>
              <mi>,</mi>
              <mi mathvariant="italic">features</mi>
            </mrow>
          </msubsup>
        </mrow>
        <mo fence="true" form="postfix" stretchy="false">)</mo>
      </mrow>
    </mrow>
    <annotation encoding="StarMath 5.0">v^G_i = MLP^{embedder}_{%inu^G}(v^{G,features}_{i} )</annotation>
  </semantics>
</math>
</file>

<file path=Object 20/content.xml><?xml version="1.0" encoding="utf-8"?>
<math xmlns="http://www.w3.org/1998/Math/MathML" display="block">
  <semantics>
    <msubsup>
      <mi>v</mi>
      <mi>i</mi>
      <mi>G</mi>
    </msubsup>
    <annotation encoding="StarMath 5.0">v^G_i</annotation>
  </semantics>
</math>
</file>

<file path=Object 21/content.xml><?xml version="1.0" encoding="utf-8"?>
<math xmlns="http://www.w3.org/1998/Math/MathML" display="block">
  <semantics>
    <mrow>
      <mrow>
        <msubsup>
          <mi>e</mi>
          <mrow>
            <msubsup>
              <mi>v</mi>
              <mi>s</mi>
              <mi>G</mi>
            </msubsup>
            <mo stretchy="false">→</mo>
            <msubsup>
              <mi>v</mi>
              <mi>r</mi>
              <mi>G</mi>
            </msubsup>
          </mrow>
          <mi>G</mi>
        </msubsup>
        <mo stretchy="false">=</mo>
        <msubsup>
          <mi mathvariant="italic">MLP</mi>
          <msup>
            <mi>ε</mi>
            <mi>G</mi>
          </msup>
          <mi mathvariant="italic">embedder</mi>
        </msubsup>
      </mrow>
      <mrow>
        <mo fence="true" form="prefix" stretchy="false">(</mo>
        <mrow>
          <msubsup>
            <mi>e</mi>
            <mrow>
              <msubsup>
                <mi>v</mi>
                <mi>s</mi>
                <mi>G</mi>
              </msubsup>
              <mo stretchy="false">→</mo>
              <msubsup>
                <mi>v</mi>
                <mi>r</mi>
                <mi>G</mi>
              </msubsup>
            </mrow>
            <mrow>
              <mi>G</mi>
              <mi>,</mi>
              <mi mathvariant="italic">features</mi>
            </mrow>
          </msubsup>
        </mrow>
        <mo fence="true" form="postfix" stretchy="false">)</mo>
      </mrow>
    </mrow>
    <annotation encoding="StarMath 5.0">e^G_{v^G_s toward v^G_r} = MLP^{embedder}_{%ivarepsilon^G}(e^{G,features}_{v^G_s toward v^G_r} )</annotation>
  </semantics>
</math>
</file>

<file path=Object 22/content.xml><?xml version="1.0" encoding="utf-8"?>
<math xmlns="http://www.w3.org/1998/Math/MathML" display="block">
  <semantics>
    <msubsup>
      <mi>e</mi>
      <mrow>
        <msubsup>
          <mi>v</mi>
          <mi>s</mi>
          <mi>G</mi>
        </msubsup>
        <mo stretchy="false">→</mo>
        <msubsup>
          <mi>v</mi>
          <mi>r</mi>
          <mi>G</mi>
        </msubsup>
      </mrow>
      <mi>G</mi>
    </msubsup>
    <annotation encoding="StarMath 5.0">e^G_{v^G_s toward v^G_r}</annotation>
  </semantics>
</math>
</file>

<file path=Object 3/content.xml><?xml version="1.0" encoding="utf-8"?>
<math xmlns="http://www.w3.org/1998/Math/MathML" display="block">
  <semantics>
    <msubsup>
      <mi>v</mi>
      <mi>i</mi>
      <mi>G</mi>
    </msubsup>
    <annotation encoding="StarMath 5.0">v^G_i</annotation>
  </semantics>
</math>
</file>

<file path=Object 4/content.xml><?xml version="1.0" encoding="utf-8"?>
<math xmlns="http://www.w3.org/1998/Math/MathML" display="block">
  <semantics>
    <mrow>
      <mrow>
        <msup>
          <mover accent="true">
            <mi>X</mi>
            <mo stretchy="false">^</mo>
          </mover>
          <mrow>
            <mi>t</mi>
            <mo stretchy="false">+</mo>
            <mn>1</mn>
          </mrow>
        </msup>
        <mo stretchy="false">=</mo>
        <mi mathvariant="italic">PIFOCast</mi>
      </mrow>
      <mrow>
        <mo fence="true" form="prefix" stretchy="false">(</mo>
        <mrow>
          <msup>
            <mi>X</mi>
            <mi>t</mi>
          </msup>
        </mrow>
        <mo fence="true" form="postfix" stretchy="false">)</mo>
      </mrow>
    </mrow>
    <annotation encoding="StarMath 5.0">{hat X}^{t+1}=PIFOCast(X^{t})</annotation>
  </semantics>
</math>
</file>

<file path=Object 5/content.xml><?xml version="1.0" encoding="utf-8"?>
<math xmlns="http://www.w3.org/1998/Math/MathML" display="block">
  <semantics>
    <mrow>
      <msup>
        <mover accent="true">
          <mi>X</mi>
          <mo stretchy="false">^</mo>
        </mover>
        <mrow>
          <mrow>
            <mi>t</mi>
            <mo stretchy="false">+</mo>
            <mn>1</mn>
          </mrow>
          <mi mathvariant="normal">:</mi>
          <mrow>
            <mi>t</mi>
            <mo stretchy="false">+</mo>
            <mi>T</mi>
          </mrow>
        </mrow>
      </msup>
      <mo stretchy="false">=</mo>
      <munder>
        <munder>
          <mrow>
            <mi mathvariant="italic">PIFOCast</mi>
            <mrow>
              <mo fence="true" form="prefix" stretchy="false">(</mo>
              <mrow>
                <msup>
                  <mi>X</mi>
                  <mi>t</mi>
                </msup>
              </mrow>
              <mo fence="true" form="postfix" stretchy="false">)</mo>
            </mrow>
            <mi>,</mi>
            <mi mathvariant="italic">PIFOCast</mi>
            <mrow>
              <mo fence="true" form="prefix" stretchy="false">(</mo>
              <mrow>
                <msup>
                  <mover accent="true">
                    <mi>X</mi>
                    <mo stretchy="false">^</mo>
                  </mover>
                  <mrow>
                    <mi>t</mi>
                    <mo stretchy="false">+</mo>
                    <mn>1</mn>
                  </mrow>
                </msup>
              </mrow>
              <mo fence="true" form="postfix" stretchy="false">)</mo>
            </mrow>
            <mi>,</mi>
            <mn>...</mn>
            <mi>,</mi>
            <mi mathvariant="italic">PIFOCast</mi>
            <mrow>
              <mo fence="true" form="prefix" stretchy="false">(</mo>
              <mrow>
                <msup>
                  <mover accent="true">
                    <mi>X</mi>
                    <mo stretchy="false">^</mo>
                  </mover>
                  <mrow>
                    <mi>t</mi>
                    <mo stretchy="false">+</mo>
                    <mi>T</mi>
                    <mo stretchy="false">−</mo>
                    <mn>1</mn>
                  </mrow>
                </msup>
              </mrow>
              <mo fence="true" form="postfix" stretchy="false">)</mo>
            </mrow>
          </mrow>
          <mo stretchy="true">⏟</mo>
        </munder>
        <mrow>
          <mn>1.</mn>
          <mn>.</mn>
          <mi>T</mi>
          <mi mathvariant="italic">autoregressive</mi>
          <mi mathvariant="italic">iterations</mi>
        </mrow>
      </munder>
    </mrow>
    <annotation encoding="StarMath 5.0">{hat X}^{t+1:t+T}={PIFOCast(X^{t}),PIFOCast({hat X}^{t+1}),...,PIFOCast({hat X}^{t+T-1})} underbrace {1..T autoregressive iterations}</annotation>
  </semantics>
</math>
</file>

<file path=Object 6/content.xml><?xml version="1.0" encoding="utf-8"?>
<math xmlns="http://www.w3.org/1998/Math/MathML" display="block">
  <semantics>
    <mrow>
      <msubsup>
        <mi>v</mi>
        <mi>i</mi>
        <mi>G</mi>
      </msubsup>
      <mrow>
        <mi>'</mi>
        <mo stretchy="false">=</mo>
        <msubsup>
          <mi mathvariant="italic">MLP</mi>
          <msup>
            <mi>ν</mi>
            <mi>G</mi>
          </msup>
          <mi mathvariant="italic">decoder</mi>
        </msubsup>
      </mrow>
      <mrow>
        <mo fence="true" form="prefix" stretchy="false">(</mo>
        <mrow>
          <msubsup>
            <mi>v</mi>
            <mi>i</mi>
            <mi>G</mi>
          </msubsup>
        </mrow>
        <mo fence="true" form="postfix" stretchy="false">)</mo>
      </mrow>
    </mrow>
    <annotation encoding="StarMath 5.0">v^{G}_i' = MLP^{decoder}_{%inu^G}(v^{G}_{i} )</annotation>
  </semantics>
</math>
</file>

<file path=Object 7/content.xml><?xml version="1.0" encoding="utf-8"?>
<math xmlns="http://www.w3.org/1998/Math/MathML" display="block">
  <semantics>
    <mrow>
      <msubsup>
        <mi>e</mi>
        <mrow>
          <msubsup>
            <mi>v</mi>
            <mi>s</mi>
            <mi>G</mi>
          </msubsup>
          <mo stretchy="false">→</mo>
          <msubsup>
            <mi>v</mi>
            <mi>r</mi>
            <mi>G</mi>
          </msubsup>
        </mrow>
        <mi>G</mi>
      </msubsup>
      <mrow>
        <mi>'</mi>
        <mo stretchy="false">=</mo>
        <msubsup>
          <mi mathvariant="italic">MLP</mi>
          <msup>
            <mi>ε</mi>
            <mi>G</mi>
          </msup>
          <mi mathvariant="italic">decoder</mi>
        </msubsup>
      </mrow>
      <mrow>
        <mo fence="true" form="prefix" stretchy="false">(</mo>
        <mrow>
          <msubsup>
            <mi>e</mi>
            <mrow>
              <msubsup>
                <mi>v</mi>
                <mi>s</mi>
                <mi>G</mi>
              </msubsup>
              <mo stretchy="false">→</mo>
              <msubsup>
                <mi>v</mi>
                <mi>r</mi>
                <mi>G</mi>
              </msubsup>
            </mrow>
            <mi>G</mi>
          </msubsup>
        </mrow>
        <mo fence="true" form="postfix" stretchy="false">)</mo>
      </mrow>
    </mrow>
    <annotation encoding="StarMath 5.0">e^G_{v^G_s toward v^G_r}' = MLP^{decoder}_{%ivarepsilon^G}(e^{G}_{v^G_s toward v^G_r} )</annotation>
  </semantics>
</math>
</file>

<file path=Object 8/content.xml><?xml version="1.0" encoding="utf-8"?>
<math xmlns="http://www.w3.org/1998/Math/MathML" display="block">
  <semantics>
    <mrow>
      <msubsup>
        <mi>e</mi>
        <mrow>
          <msubsup>
            <mi>v</mi>
            <mi>s</mi>
            <mi>G</mi>
          </msubsup>
          <mo stretchy="false">→</mo>
          <msubsup>
            <mi>v</mi>
            <mi>r</mi>
            <mi>G</mi>
          </msubsup>
        </mrow>
        <mi>G</mi>
      </msubsup>
      <mrow>
        <mi>'</mi>
        <mo stretchy="false">=</mo>
        <msubsup>
          <mi mathvariant="italic">MLP</mi>
          <msup>
            <mi>ε</mi>
            <mi>G</mi>
          </msup>
          <mi mathvariant="italic">grid</mi>
        </msubsup>
      </mrow>
      <mrow>
        <mo fence="true" form="prefix" stretchy="false">(</mo>
        <mrow>
          <mrow>
            <mo fence="true" form="prefix" stretchy="true">[</mo>
            <mrow>
              <mrow>
                <msubsup>
                  <mi>e</mi>
                  <mrow>
                    <msubsup>
                      <mi>v</mi>
                      <mi>s</mi>
                      <mi>G</mi>
                    </msubsup>
                    <mo stretchy="false">→</mo>
                    <msubsup>
                      <mi>v</mi>
                      <mi>r</mi>
                      <mi>G</mi>
                    </msubsup>
                  </mrow>
                  <mi>G</mi>
                </msubsup>
                <mi>,</mi>
                <msubsup>
                  <mi>v</mi>
                  <mi>s</mi>
                  <mi>M</mi>
                </msubsup>
                <mi>,</mi>
                <msubsup>
                  <mi>v</mi>
                  <mi>r</mi>
                  <mi>M</mi>
                </msubsup>
              </mrow>
            </mrow>
            <mo fence="true" form="postfix" stretchy="true">]</mo>
          </mrow>
        </mrow>
        <mo fence="true" form="postfix" stretchy="false">)</mo>
      </mrow>
    </mrow>
    <annotation encoding="StarMath 5.0">e^G_{v^G_s toward v^G_r}' = MLP^{grid}_{%ivarepsilon^G}(left [e^{G}_{v^G_s toward v^G_r},v^M_s,v^M_r right])</annotation>
  </semantics>
</math>
</file>

<file path=Object 9/content.xml><?xml version="1.0" encoding="utf-8"?>
<math xmlns="http://www.w3.org/1998/Math/MathML" display="block">
  <semantics>
    <mrow>
      <msubsup>
        <mi>v</mi>
        <mi>i</mi>
        <mi>G</mi>
      </msubsup>
      <mrow>
        <mi>'</mi>
        <mo stretchy="false">=</mo>
        <msubsup>
          <mi mathvariant="italic">MLP</mi>
          <msup>
            <mi>ν</mi>
            <mi>G</mi>
          </msup>
          <mi mathvariant="italic">grid</mi>
        </msubsup>
      </mrow>
      <mrow>
        <mo fence="true" form="prefix" stretchy="false">(</mo>
        <mrow>
          <mrow>
            <mo fence="true" form="prefix" stretchy="true">[</mo>
            <mrow>
              <mrow>
                <msubsup>
                  <mi>v</mi>
                  <mi>i</mi>
                  <mrow>
                    <mi>G</mi>
                    <mi>,</mi>
                    <mi mathvariant="italic">features</mi>
                  </mrow>
                </msubsup>
                <mi>,</mi>
                <mrow>
                  <munder>
                    <mo stretchy="false">∑</mo>
                    <mrow>
                      <msubsup>
                        <mi>e</mi>
                        <mrow>
                          <msubsup>
                            <mi>v</mi>
                            <mi>s</mi>
                            <mi>G</mi>
                          </msubsup>
                          <mo stretchy="false">→</mo>
                          <msubsup>
                            <mi>v</mi>
                            <mi>r</mi>
                            <mi>G</mi>
                          </msubsup>
                        </mrow>
                        <mi>G</mi>
                      </msubsup>
                      <mi mathvariant="normal">:</mi>
                      <mrow>
                        <msubsup>
                          <mi>v</mi>
                          <mi>r</mi>
                          <mi>M</mi>
                        </msubsup>
                        <mo stretchy="false">=</mo>
                        <msubsup>
                          <mi>v</mi>
                          <mi>i</mi>
                          <mi>M</mi>
                        </msubsup>
                      </mrow>
                    </mrow>
                  </munder>
                  <msubsup>
                    <mi>e</mi>
                    <mrow>
                      <msubsup>
                        <mi>v</mi>
                        <mi>s</mi>
                        <mi>G</mi>
                      </msubsup>
                      <mo stretchy="false">→</mo>
                      <msubsup>
                        <mi>v</mi>
                        <mi>r</mi>
                        <mi>G</mi>
                      </msubsup>
                    </mrow>
                    <mi>G</mi>
                  </msubsup>
                </mrow>
                <mi>'</mi>
              </mrow>
            </mrow>
            <mo fence="true" form="postfix" stretchy="true">]</mo>
          </mrow>
        </mrow>
        <mo fence="true" form="postfix" stretchy="false">)</mo>
      </mrow>
    </mrow>
    <annotation encoding="StarMath 5.0">v^G_i' = MLP^{grid}_{%inu^G}(left[ v^{G,features}_{i}, sum from{ e^{G}_{v^G_s toward v^G_r} : v^M_r = v^M_i} e^G_{v^G_s toward v^G_r}'  right ])</annotation>
  </semantics>
</math>
</file>